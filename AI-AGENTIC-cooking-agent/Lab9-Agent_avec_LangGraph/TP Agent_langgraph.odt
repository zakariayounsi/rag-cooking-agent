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5" style:parent-style-name="Policepardéfaut" style:family="text">
      <style:text-properties fo:font-weight="bold" style:font-weight-asian="bold" style:font-weight-complex="bold" fo:font-size="14pt" style:font-size-asian="14pt" style:font-size-complex="14pt" fo:language="fr" fo:country="MA"/>
    </style:style>
    <style:style style:name="T6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7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8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9" style:parent-style-name="Policepardéfaut" style:family="text">
      <style:text-properties fo:language="fr" fo:country="FR"/>
    </style:style>
    <style:style style:name="P10" style:parent-style-name="Normal" style:family="paragraph">
      <style:text-properties style:language-asian="fr" style:country-asian="MA"/>
    </style:style>
    <style:style style:name="P11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2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3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4" style:parent-style-name="Lienhypertexte" style:family="text">
      <style:text-properties fo:language="fr" fo:country="MA" style:language-asian="fr" style:country-asian="MA"/>
    </style:style>
    <style:style style:name="T15" style:parent-style-name="Lienhypertexte" style:family="text">
      <style:text-properties style:language-asian="fr" style:country-asian="MA"/>
    </style:style>
    <style:style style:name="P16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7" style:parent-style-name="Lienhypertexte" style:family="text">
      <style:text-properties fo:language="fr" fo:country="MA" style:language-asian="fr" style:country-asian="MA"/>
    </style:style>
    <style:style style:name="P18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fr" fo:country="MA"/>
    </style:style>
    <style:style style:name="P1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0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2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2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2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2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5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2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7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2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2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0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3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32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3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34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35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37" style:parent-style-name="Policepardéfaut" style:family="text">
      <style:text-properties style:font-name="Consolas" style:font-name-asian="Times New Roman" fo:color="#008000" fo:font-size="10.5pt" style:font-size-asian="10.5pt" style:font-size-complex="10.5pt" fo:language="fr" fo:country="MA" style:language-asian="fr" style:country-asian="MA"/>
    </style:style>
    <style:style style:name="P38" style:parent-style-name="Normal" style:family="paragraph">
      <style:paragraph-properties style:vertical-align="auto" fo:margin-bottom="0.1666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39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4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42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4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44" style:parent-style-name="Policepardéfaut" style:family="text">
      <style:text-properties style:font-name="Consolas" style:font-name-asian="Times New Roman" fo:color="#008000" fo:font-size="10.5pt" style:font-size-asian="10.5pt" style:font-size-complex="10.5pt" fo:language="fr" fo:country="MA" style:language-asian="fr" style:country-asian="MA"/>
    </style:style>
    <style:style style:name="P45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46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47" style:parent-style-name="Normal" style:family="paragraph">
      <style:paragraph-properties style:vertical-align="auto" fo:margin-bottom="0.1666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48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4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50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5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5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5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54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P55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5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57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5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59" style:parent-style-name="Normal" style:family="paragraph">
      <style:paragraph-properties style:vertical-align="auto" fo:margin-bottom="0.1666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60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6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62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6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6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6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66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P6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6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69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7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71" style:parent-style-name="Normal" style:family="paragraph">
      <style:paragraph-properties style:vertical-align="auto" fo:margin-bottom="0.1666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72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7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74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7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7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7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78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P7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81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8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83" style:parent-style-name="Normal" style:family="paragraph">
      <style:paragraph-properties style:vertical-align="auto" fo:margin-bottom="0.1666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84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85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87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8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89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9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91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92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93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94" style:parent-style-name="Titre1" style:family="paragraph">
      <style:text-properties fo:language="en" fo:country="US"/>
    </style:style>
    <style:style style:name="P95" style:parent-style-name="Normal" style:family="paragraph">
      <style:text-properties fo:language="en" fo:country="US"/>
    </style:style>
    <style:style style:name="P96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fo:language="fr" fo:country="MA" style:language-asian="fr" style:country-asian="MA" fo:hyphenate="true"/>
    </style:style>
    <style:style style:name="P97" style:parent-style-name="Normal" style:list-style-name="LFO1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fo:language="fr" fo:country="MA" style:language-asian="fr" style:country-asian="MA" fo:hyphenate="true"/>
    </style:style>
    <style:style style:name="P98" style:parent-style-name="Normal" style:list-style-name="LFO1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fo:language="fr" fo:country="MA" style:language-asian="fr" style:country-asian="MA" fo:hyphenate="true"/>
    </style:style>
    <style:style style:name="P99" style:parent-style-name="Normal" style:list-style-name="LFO1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fo:language="fr" fo:country="MA" style:language-asian="fr" style:country-asian="MA" fo:hyphenate="true"/>
    </style:style>
    <style:style style:name="P100" style:parent-style-name="Normal" style:list-style-name="LFO1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fo:language="fr" fo:country="MA" style:language-asian="fr" style:country-asian="MA" fo:hyphenate="true"/>
    </style:style>
    <style:style style:name="P101" style:parent-style-name="Normal" style:list-style-name="LFO1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fo:language="fr" fo:country="MA" style:language-asian="fr" style:country-asian="MA" fo:hyphenate="true"/>
    </style:style>
    <style:style style:name="P102" style:parent-style-name="Normal" style:family="paragraph">
      <style:text-properties fo:language="fr" fo:country="MA"/>
    </style:style>
    <style:style style:name="P103" style:parent-style-name="Normal" style:family="paragraph">
      <style:text-properties style:font-name="Times New Roman" style:font-name-asian="Times New Roman" fo:font-size="12pt" style:font-size-asian="12pt" style:font-size-complex="12pt" fo:language="fr" fo:country="MA" style:language-asian="fr" style:country-asian="MA"/>
    </style:style>
    <style:style style:name="P104" style:parent-style-name="Normal" style:list-style-name="LFO2" style:family="paragraph">
      <style:text-properties style:font-name="Times New Roman" style:font-name-asian="Times New Roman" fo:font-size="12pt" style:font-size-asian="12pt" style:font-size-complex="12pt" fo:language="fr" fo:country="MA" style:language-asian="fr" style:country-asian="MA"/>
    </style:style>
    <style:style style:name="P105" style:parent-style-name="Normal" style:list-style-name="LFO2" style:family="paragraph">
      <style:text-properties style:font-name="Times New Roman" style:font-name-asian="Times New Roman" fo:font-size="12pt" style:font-size-asian="12pt" style:font-size-complex="12pt" fo:language="fr" fo:country="MA" style:language-asian="fr" style:country-asian="MA"/>
    </style:style>
    <style:style style:name="P106" style:parent-style-name="Normal" style:family="paragraph">
      <style:text-properties style:font-name="Times New Roman" style:font-name-asian="Times New Roman" fo:font-size="12pt" style:font-size-asian="12pt" style:font-size-complex="12pt" fo:language="fr" fo:country="MA" style:language-asian="fr" style:country-asian="MA"/>
    </style:style>
    <style:style style:name="P107" style:parent-style-name="Normal" style:list-style-name="LFO3" style:family="paragraph">
      <style:text-properties style:font-name="Times New Roman" style:font-name-asian="Times New Roman" fo:font-size="12pt" style:font-size-asian="12pt" style:font-size-complex="12pt" fo:language="fr" fo:country="MA" style:language-asian="fr" style:country-asian="MA"/>
    </style:style>
    <style:style style:name="P108" style:parent-style-name="Normal" style:family="paragraph">
      <style:text-properties style:font-name="Times New Roman" style:font-name-asian="Times New Roman" fo:font-size="12pt" style:font-size-asian="12pt" style:font-size-complex="12pt" fo:language="fr" fo:country="MA" style:language-asian="fr" style:country-asian="MA"/>
    </style:style>
    <style:style style:name="P109" style:parent-style-name="Paragraphedeliste" style:list-style-name="LFO3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fo:language="fr" fo:country="MA" style:language-asian="fr" style:country-asian="MA" fo:hyphenate="true"/>
    </style:style>
    <style:style style:name="P110" style:parent-style-name="Paragraphedeliste" style:list-style-name="LFO3" style:family="paragraph">
      <style:text-properties style:font-name="Times New Roman" style:font-name-asian="Times New Roman" fo:font-size="12pt" style:font-size-asian="12pt" style:font-size-complex="12pt" fo:language="fr" fo:country="MA" style:language-asian="fr" style:country-asian="MA"/>
    </style:style>
    <style:style style:name="P111" style:parent-style-name="Normal" style:family="paragraph">
      <style:text-properties style:font-name="Times New Roman" style:font-name-asian="Times New Roman" fo:font-size="12pt" style:font-size-asian="12pt" style:font-size-complex="12pt" fo:language="fr" fo:country="MA" style:language-asian="fr" style:country-asian="MA"/>
    </style:style>
    <style:style style:name="P112" style:parent-style-name="Normal" style:family="paragraph">
      <style:text-properties style:font-name="Times New Roman" style:font-name-asian="Times New Roman" fo:font-size="12pt" style:font-size-asian="12pt" style:font-size-complex="12pt" fo:language="fr" fo:country="MA" style:language-asian="fr" style:country-asian="MA"/>
    </style:style>
    <style:style style:name="P11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14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11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16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11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11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19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12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21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12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12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24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12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26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12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12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29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13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31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13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13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34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13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36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13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138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3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40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14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42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14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144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45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46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14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48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14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150" style:parent-style-name="Normal" style:family="paragraph">
      <style:paragraph-properties style:vertical-align="auto" fo:margin-bottom="0.1666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5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52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15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154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55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56" style:parent-style-name="Normal" style:family="paragraph">
      <style:paragraph-properties style:vertical-align="auto" fo:margin-bottom="0.1666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5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58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15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16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6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62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P163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6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6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66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16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16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6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70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17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172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73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7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7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76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17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17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7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80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18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18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8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84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18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86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18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88" style:parent-style-name="Policepardéfaut" style:family="text">
      <style:text-properties style:font-name="Consolas" style:font-name-asian="Times New Roman" fo:color="#098658" fo:font-size="10.5pt" style:font-size-asian="10.5pt" style:font-size-complex="10.5pt" fo:language="en" fo:country="US" style:language-asian="fr" style:country-asian="MA"/>
    </style:style>
    <style:style style:name="T18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90" style:parent-style-name="Policepardéfaut" style:family="text">
      <style:text-properties style:font-name="Consolas" style:font-name-asian="Times New Roman" fo:color="#098658" fo:font-size="10.5pt" style:font-size-asian="10.5pt" style:font-size-complex="10.5pt" fo:language="en" fo:country="US" style:language-asian="fr" style:country-asian="MA"/>
    </style:style>
    <style:style style:name="T19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192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93" style:parent-style-name="Normal" style:family="paragraph">
      <style:paragraph-properties style:vertical-align="auto" fo:margin-bottom="0.1666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9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95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19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19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9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99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P20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0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02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20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04" style:parent-style-name="Policepardéfaut" style:family="text">
      <style:text-properties style:font-name="Consolas" style:font-name-asian="Times New Roman" fo:color="#098658" fo:font-size="10.5pt" style:font-size-asian="10.5pt" style:font-size-complex="10.5pt" fo:language="en" fo:country="US" style:language-asian="fr" style:country-asian="MA"/>
    </style:style>
    <style:style style:name="T20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206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207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20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0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10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21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12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21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21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1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16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21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21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1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20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22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22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2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24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22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226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22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2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29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23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31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23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233" style:parent-style-name="Normal" style:family="paragraph">
      <style:paragraph-properties style:vertical-align="auto" fo:margin-bottom="0.1666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23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35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23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37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23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23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4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41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24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43" style:parent-style-name="Policepardéfaut" style:family="text">
      <style:text-properties style:font-name="Consolas" style:font-name-asian="Times New Roman" fo:color="#098658" fo:font-size="10.5pt" style:font-size-asian="10.5pt" style:font-size-complex="10.5pt" fo:language="en" fo:country="US" style:language-asian="fr" style:country-asian="MA"/>
    </style:style>
    <style:style style:name="T24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245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24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4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48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24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50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25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52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25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25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5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56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25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25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5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60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26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62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P26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6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65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26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267" style:parent-style-name="Normal" style:family="paragraph">
      <style:paragraph-properties style:vertical-align="auto" fo:margin-bottom="0.1666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268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269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27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7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72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27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27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7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76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27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278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27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8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81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28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28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8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85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28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87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28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28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9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91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29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93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29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295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296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297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29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99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30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301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30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30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0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305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30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307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30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309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31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311" style:parent-style-name="Policepardéfaut" style:family="text">
      <style:text-properties style:font-name="Consolas" style:font-name-asian="Times New Roman" fo:color="#098658" fo:font-size="10.5pt" style:font-size-asian="10.5pt" style:font-size-complex="10.5pt" fo:language="en" fo:country="US" style:language-asian="fr" style:country-asian="MA"/>
    </style:style>
    <style:style style:name="T31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313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314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315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31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1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318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31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320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32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322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32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32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2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326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32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32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2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330" style:parent-style-name="Policepardéfaut" style:family="text">
      <style:text-properties style:font-name="Consolas" fo:color="#000000" fo:font-size="10.5pt" style:font-size-asian="10.5pt" style:font-size-complex="10.5pt" fo:language="en" fo:country="US" style:language-asian="fr" style:country-asian="MA"/>
    </style:style>
    <style:style style:name="T33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332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33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3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335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33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337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33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339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34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4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34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343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34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4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346" style:parent-style-name="Policepardéfaut" style:family="text">
      <style:text-properties style:font-name="Consolas" style:font-name-asian="Times New Roman" fo:color="#008000" fo:font-size="10.5pt" style:font-size-asian="10.5pt" style:font-size-complex="10.5pt" fo:language="en" fo:country="US" style:language-asian="fr" style:country-asian="MA"/>
    </style:style>
    <style:style style:name="P347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34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4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350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35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352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35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35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355" style:parent-style-name="Policepardéfaut" style:family="text">
      <style:text-properties style:font-name="Consolas" style:font-name-asian="Times New Roman" fo:font-weight="bold" style:font-weight-asian="bold" style:font-weight-complex="bold" fo:color="#000000" fo:font-size="10.5pt" style:font-size-asian="10.5pt" style:font-size-complex="10.5pt" fo:language="fr" fo:country="MA" style:language-asian="fr" style:country-asian="MA"/>
    </style:style>
    <style:style style:name="T35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35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5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359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36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361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36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363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36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365" style:parent-style-name="Policepardéfaut" style:family="text">
      <style:text-properties style:font-name="Consolas" style:font-name-asian="Times New Roman" fo:color="#098658" fo:font-size="10.5pt" style:font-size-asian="10.5pt" style:font-size-complex="10.5pt" fo:language="fr" fo:country="MA" style:language-asian="fr" style:country-asian="MA"/>
    </style:style>
    <style:style style:name="T36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36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6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369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37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371" style:parent-style-name="Policepardéfaut" style:family="text">
      <style:text-properties style:font-name="Consolas" style:font-name-asian="Times New Roman" fo:color="#000000" fo:font-size="10.5pt" style:font-size-asian="10.5pt" style:font-size-complex="10.5pt" style:language-asian="fr" style:country-asian="MA"/>
    </style:style>
    <style:style style:name="P37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7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37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375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376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37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7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379" style:parent-style-name="Policepardéfaut" style:family="text">
      <style:text-properties style:font-name="Consolas" style:font-name-asian="Times New Roman" fo:color="#008000" fo:font-size="10.5pt" style:font-size-asian="10.5pt" style:font-size-complex="10.5pt" fo:language="en" fo:country="US" style:language-asian="fr" style:country-asian="MA"/>
    </style:style>
    <style:style style:name="P38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8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382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38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384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38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38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8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38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389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39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391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39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393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39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395" style:parent-style-name="Policepardéfaut" style:family="text">
      <style:text-properties style:font-name="Consolas" style:font-name-asian="Times New Roman" fo:color="#098658" fo:font-size="10.5pt" style:font-size-asian="10.5pt" style:font-size-complex="10.5pt" fo:language="fr" fo:country="MA" style:language-asian="fr" style:country-asian="MA"/>
    </style:style>
    <style:style style:name="T39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39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9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399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40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40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0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40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40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0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406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40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408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40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410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41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41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1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414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41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416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41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41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1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42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421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T422" style:parent-style-name="Policepardéfaut" style:family="text">
      <style:text-properties fo:language="fr" fo:country="MA" style:language-asian="fr" style:country-asian="MA"/>
    </style:style>
    <style:style style:name="T423" style:parent-style-name="Policepardéfaut" style:family="text">
      <style:text-properties style:language-asian="fr" style:country-asian="MA"/>
    </style:style>
    <style:style style:name="P424" style:parent-style-name="Normal" style:family="paragraph">
      <style:text-properties style:language-asian="fr" style:country-asian="MA"/>
    </style:style>
    <style:style style:name="P425" style:parent-style-name="Normal" style:family="paragraph">
      <style:paragraph-properties style:vertical-align="auto" fo:margin-top="0.0694in" fo:margin-bottom="0.0694in" fo:line-height="100%"/>
      <style:text-properties style:font-name-asian="Times New Roman" style:font-name-complex="Calibri" fo:font-size="12pt" style:font-size-asian="12pt" style:font-size-complex="12pt" fo:language="fr" fo:country="MA" style:language-asian="fr" style:country-asian="MA" fo:hyphenate="true"/>
    </style:style>
    <style:style style:name="P426" style:parent-style-name="Normal" style:family="paragraph">
      <style:paragraph-properties style:vertical-align="auto"/>
      <style:text-properties fo:hyphenate="true"/>
    </style:style>
    <style:style style:name="T427" style:parent-style-name="Policepardéfaut" style:family="text">
      <style:text-properties style:font-name-asian="Times New Roman" style:font-name-complex="Calibri" fo:font-size="12pt" style:font-size-asian="12pt" style:font-size-complex="12pt" fo:language="fr" fo:country="MA" style:language-asian="fr" style:country-asian="MA"/>
    </style:style>
    <style:style style:name="P428" style:parent-style-name="Normal" style:list-style-name="LFO4" style:family="paragraph">
      <style:paragraph-properties style:vertical-align="auto" fo:margin-top="0.0694in" fo:margin-bottom="0.0694in" fo:line-height="100%"/>
      <style:text-properties style:font-name-asian="Times New Roman" style:font-name-complex="Calibri" fo:font-size="12pt" style:font-size-asian="12pt" style:font-size-complex="12pt" fo:language="fr" fo:country="MA" style:language-asian="fr" style:country-asian="MA" fo:hyphenate="true"/>
    </style:style>
    <style:style style:name="P429" style:parent-style-name="Normal" style:list-style-name="LFO4" style:family="paragraph">
      <style:paragraph-properties style:vertical-align="auto" fo:margin-top="0.0694in" fo:margin-bottom="0.0694in" fo:line-height="100%"/>
      <style:text-properties style:font-name-asian="Times New Roman" style:font-name-complex="Calibri" fo:font-size="12pt" style:font-size-asian="12pt" style:font-size-complex="12pt" fo:language="fr" fo:country="MA" style:language-asian="fr" style:country-asian="MA" fo:hyphenate="true"/>
    </style:style>
    <style:style style:name="P430" style:parent-style-name="Normal" style:list-style-name="LFO4" style:family="paragraph">
      <style:paragraph-properties style:vertical-align="auto" fo:margin-top="0.0694in" fo:margin-bottom="0.0694in" fo:line-height="100%"/>
      <style:text-properties style:font-name-asian="Times New Roman" style:font-name-complex="Calibri" fo:font-size="12pt" style:font-size-asian="12pt" style:font-size-complex="12pt" fo:language="fr" fo:country="MA" style:language-asian="fr" style:country-asian="MA" fo:hyphenate="true"/>
    </style:style>
    <style:style style:name="P431" style:parent-style-name="Normal" style:list-style-name="LFO4" style:family="paragraph">
      <style:paragraph-properties style:vertical-align="auto" fo:margin-top="0.0694in" fo:margin-bottom="0.0694in" fo:line-height="100%"/>
      <style:text-properties style:font-name-asian="Times New Roman" style:font-name-complex="Calibri" fo:font-size="12pt" style:font-size-asian="12pt" style:font-size-complex="12pt" fo:language="fr" fo:country="MA" style:language-asian="fr" style:country-asian="MA" fo:hyphenate="true"/>
    </style:style>
    <style:style style:name="P432" style:parent-style-name="Normal" style:list-style-name="LFO4" style:family="paragraph">
      <style:paragraph-properties style:vertical-align="auto" fo:margin-top="0.0694in" fo:margin-bottom="0.0694in" fo:line-height="100%"/>
      <style:text-properties style:font-name-asian="Times New Roman" style:font-name-complex="Calibri" fo:font-size="12pt" style:font-size-asian="12pt" style:font-size-complex="12pt" fo:language="fr" fo:country="MA" style:language-asian="fr" style:country-asian="MA" fo:hyphenate="true"/>
    </style:style>
    <style:style style:name="P43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34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43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43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37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43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43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40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44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442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44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44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45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44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447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44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44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50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45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452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45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454" style:parent-style-name="Normal" style:family="paragraph">
      <style:paragraph-properties style:vertical-align="auto" fo:margin-bottom="0.1666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455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45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57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45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45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6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461" style:parent-style-name="Policepardéfaut" style:family="text">
      <style:text-properties style:font-name="Consolas" style:font-name-asian="Times New Roman" fo:color="#098658" fo:font-size="10.5pt" style:font-size-asian="10.5pt" style:font-size-complex="10.5pt" fo:language="en" fo:country="US" style:language-asian="fr" style:country-asian="MA"/>
    </style:style>
    <style:style style:name="T46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46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6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465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46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467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468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46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470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P471" style:parent-style-name="Normal" style:family="paragraph">
      <style:paragraph-properties style:vertical-align="auto" fo:margin-bottom="0.1666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472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47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74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47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476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47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7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479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48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481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48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483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48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485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8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487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48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489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49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491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49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493" style:parent-style-name="Normal" style:family="paragraph">
      <style:paragraph-properties style:vertical-align="auto" fo:margin-bottom="0.1666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494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495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49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9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498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49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500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50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502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50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504" style:parent-style-name="Policepardéfaut" style:family="text">
      <style:text-properties style:font-name="Consolas" style:font-name-asian="Times New Roman" fo:color="#008000" fo:font-size="10.5pt" style:font-size-asian="10.5pt" style:font-size-complex="10.5pt" fo:language="en" fo:country="US" style:language-asian="fr" style:country-asian="MA"/>
    </style:style>
    <style:style style:name="P505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506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50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508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50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510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51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512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51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514" style:parent-style-name="Policepardéfaut" style:family="text">
      <style:text-properties style:font-name="Consolas" style:font-name-asian="Times New Roman" fo:color="#008000" fo:font-size="10.5pt" style:font-size-asian="10.5pt" style:font-size-complex="10.5pt" fo:language="en" fo:country="US" style:language-asian="fr" style:country-asian="MA"/>
    </style:style>
    <style:style style:name="P515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516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51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518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51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520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52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52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52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52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525" style:parent-style-name="Normal" style:family="paragraph">
      <style:text-properties style:language-asian="fr" style:country-asian="MA"/>
    </style:style>
    <style:style style:name="P526" style:parent-style-name="Titre1" style:family="paragraph">
      <style:text-properties fo:language="fr" fo:country="MA" style:language-asian="fr" style:country-asian="MA"/>
    </style:style>
    <style:style style:name="P527" style:parent-style-name="Normal" style:family="paragraph">
      <style:text-properties style:font-name-asian="Times New Roman" style:font-name-complex="Calibri" fo:font-size="12pt" style:font-size-asian="12pt" style:font-size-complex="12pt" fo:language="fr" fo:country="MA" style:language-asian="fr" style:country-asian="MA"/>
    </style:style>
    <style:style style:name="P528" style:parent-style-name="Normal" style:list-style-name="LFO5" style:family="paragraph">
      <style:text-properties style:font-name-asian="Times New Roman" style:font-name-complex="Calibri" fo:font-size="12pt" style:font-size-asian="12pt" style:font-size-complex="12pt" fo:language="fr" fo:country="MA" style:language-asian="fr" style:country-asian="MA"/>
    </style:style>
    <style:style style:name="P529" style:parent-style-name="Normal" style:list-style-name="LFO5" style:family="paragraph">
      <style:text-properties style:font-name-asian="Times New Roman" style:font-name-complex="Calibri" fo:font-size="12pt" style:font-size-asian="12pt" style:font-size-complex="12pt" fo:language="fr" fo:country="MA" style:language-asian="fr" style:country-asian="MA"/>
    </style:style>
    <style:style style:name="P530" style:parent-style-name="Normal" style:list-style-name="LFO5" style:family="paragraph">
      <style:text-properties style:font-name-asian="Times New Roman" style:font-name-complex="Calibri" fo:font-size="12pt" style:font-size-asian="12pt" style:font-size-complex="12pt" fo:language="fr" fo:country="MA" style:language-asian="fr" style:country-asian="MA"/>
    </style:style>
    <style:style style:name="P531" style:parent-style-name="Normal" style:list-style-name="LFO5" style:family="paragraph">
      <style:text-properties style:font-name-asian="Times New Roman" style:font-name-complex="Calibri" fo:font-size="12pt" style:font-size-asian="12pt" style:font-size-complex="12pt" fo:language="fr" fo:country="MA" style:language-asian="fr" style:country-asian="MA"/>
    </style:style>
    <style:style style:name="P532" style:parent-style-name="Normal" style:list-style-name="LFO5" style:family="paragraph">
      <style:text-properties style:font-name-asian="Times New Roman" style:font-name-complex="Calibri" fo:font-size="12pt" style:font-size-asian="12pt" style:font-size-complex="12pt" fo:language="fr" fo:country="MA" style:language-asian="fr" style:country-asian="MA"/>
    </style:style>
    <style:style style:name="P533" style:parent-style-name="Normal" style:family="paragraph">
      <style:text-properties fo:language="fr" fo:country="MA" style:language-asian="fr" style:country-asian="MA"/>
    </style:style>
    <style:style style:name="P534" style:parent-style-name="Normal" style:family="paragraph">
      <style:text-properties fo:language="fr" fo:country="MA" style:language-asian="fr" style:country-asian="MA"/>
    </style:style>
    <style:style style:name="P535" style:parent-style-name="Normal" style:family="paragraph">
      <style:text-properties fo:language="fr" fo:country="MA" style:language-asian="fr" style:country-asian="MA"/>
    </style:style>
    <style:style style:name="P53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537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53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539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54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54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542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54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544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54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546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54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548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54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550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55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55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553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55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555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55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55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558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55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560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56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56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563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56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565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56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56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568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56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570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57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572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57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574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57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576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57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57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579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58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581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58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58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584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58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586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58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58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589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59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591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59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593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59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595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59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597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59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599" style:parent-style-name="Normal" style:family="paragraph">
      <style:paragraph-properties style:vertical-align="auto" fo:margin-bottom="0.1666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60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60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602" style:parent-style-name="Policepardéfaut" style:family="text">
      <style:text-properties style:font-name="Consolas" style:font-name-asian="Times New Roman" fo:color="#008000" fo:font-size="10.5pt" style:font-size-asian="10.5pt" style:font-size-complex="10.5pt" fo:language="en" fo:country="US" style:language-asian="fr" style:country-asian="MA"/>
    </style:style>
    <style:style style:name="P60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604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60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60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60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608" style:parent-style-name="Policepardéfaut" style:family="text">
      <style:text-properties style:font-name="Consolas" style:font-name-asian="Times New Roman" fo:color="#008000" fo:font-size="10.5pt" style:font-size-asian="10.5pt" style:font-size-complex="10.5pt" fo:language="en" fo:country="US" style:language-asian="fr" style:country-asian="MA"/>
    </style:style>
    <style:style style:name="P60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61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611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61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613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61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615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61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617" style:parent-style-name="Normal" style:family="paragraph">
      <style:paragraph-properties style:vertical-align="auto" fo:margin-bottom="0.1666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61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619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62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621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622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623" style:parent-style-name="Normal" style:family="paragraph">
      <style:paragraph-properties style:vertical-align="auto" fo:margin-bottom="0.1666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62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625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62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62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62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629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P630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63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63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633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63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635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63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637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63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639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640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64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64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643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64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645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64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647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64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64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65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651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65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653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65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655" style:parent-style-name="Policepardéfaut" style:family="text">
      <style:text-properties style:font-name="Consolas" style:font-name-asian="Times New Roman" fo:color="#098658" fo:font-size="10.5pt" style:font-size-asian="10.5pt" style:font-size-complex="10.5pt" fo:language="en" fo:country="US" style:language-asian="fr" style:country-asian="MA"/>
    </style:style>
    <style:style style:name="T65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657" style:parent-style-name="Policepardéfaut" style:family="text">
      <style:text-properties style:font-name="Consolas" style:font-name-asian="Times New Roman" fo:color="#098658" fo:font-size="10.5pt" style:font-size-asian="10.5pt" style:font-size-complex="10.5pt" fo:language="en" fo:country="US" style:language-asian="fr" style:country-asian="MA"/>
    </style:style>
    <style:style style:name="T65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659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660" style:parent-style-name="Normal" style:family="paragraph">
      <style:paragraph-properties style:vertical-align="auto" fo:margin-bottom="0.1666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66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662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66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66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66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666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P66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66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669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67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671" style:parent-style-name="Policepardéfaut" style:family="text">
      <style:text-properties style:font-name="Consolas" style:font-name-asian="Times New Roman" fo:color="#098658" fo:font-size="10.5pt" style:font-size-asian="10.5pt" style:font-size-complex="10.5pt" fo:language="en" fo:country="US" style:language-asian="fr" style:country-asian="MA"/>
    </style:style>
    <style:style style:name="T67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673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674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675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67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677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67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679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68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68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68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683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68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685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68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687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68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68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69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691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69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693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69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69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696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69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698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69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700" style:parent-style-name="Normal" style:family="paragraph">
      <style:paragraph-properties style:vertical-align="auto" fo:margin-bottom="0.1666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70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702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70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704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70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70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70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708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70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710" style:parent-style-name="Policepardéfaut" style:family="text">
      <style:text-properties style:font-name="Consolas" style:font-name-asian="Times New Roman" fo:color="#098658" fo:font-size="10.5pt" style:font-size-asian="10.5pt" style:font-size-complex="10.5pt" fo:language="en" fo:country="US" style:language-asian="fr" style:country-asian="MA"/>
    </style:style>
    <style:style style:name="T71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712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71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71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715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71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717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71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719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72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721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72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72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72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725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72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727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P72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72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730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73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732" style:parent-style-name="Normal" style:family="paragraph">
      <style:paragraph-properties style:vertical-align="auto" fo:margin-bottom="0.1666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73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734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73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736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73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738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73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74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74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742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74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744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74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746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74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748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74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750" style:parent-style-name="Policepardéfaut" style:family="text">
      <style:text-properties style:font-name="Consolas" style:font-name-asian="Times New Roman" fo:color="#098658" fo:font-size="10.5pt" style:font-size-asian="10.5pt" style:font-size-complex="10.5pt" fo:language="en" fo:country="US" style:language-asian="fr" style:country-asian="MA"/>
    </style:style>
    <style:style style:name="T75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75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75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754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75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756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75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758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75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760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76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762" style:parent-style-name="Normal" style:family="paragraph">
      <style:paragraph-properties style:vertical-align="auto" fo:margin-bottom="0.1666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763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764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765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76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767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76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76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77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771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77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77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77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775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77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777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778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779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78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78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782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78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78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78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786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78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788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78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79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79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792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79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794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79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796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797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798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79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0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801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80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803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80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805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80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807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80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0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810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81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812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81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814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81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816" style:parent-style-name="Policepardéfaut" style:family="text">
      <style:text-properties style:font-name="Consolas" style:font-name-asian="Times New Roman" fo:color="#098658" fo:font-size="10.5pt" style:font-size-asian="10.5pt" style:font-size-complex="10.5pt" fo:language="en" fo:country="US" style:language-asian="fr" style:country-asian="MA"/>
    </style:style>
    <style:style style:name="T81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818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81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20" style:parent-style-name="Policepardéfaut" style:family="text">
      <style:text-properties style:font-name="Consolas" style:font-name-asian="Times New Roman" fo:color="#008000" fo:font-size="10.5pt" style:font-size-asian="10.5pt" style:font-size-complex="10.5pt" fo:language="en" fo:country="US" style:language-asian="fr" style:country-asian="MA"/>
    </style:style>
    <style:style style:name="P82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22" style:parent-style-name="Policepardéfaut" style:family="text">
      <style:text-properties style:font-name="Consolas" style:font-name-asian="Times New Roman" fo:color="#008000" fo:font-size="10.5pt" style:font-size-asian="10.5pt" style:font-size-complex="10.5pt" fo:language="en" fo:country="US" style:language-asian="fr" style:country-asian="MA"/>
    </style:style>
    <style:style style:name="P82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24" style:parent-style-name="Policepardéfaut" style:family="text">
      <style:text-properties style:font-name="Consolas" style:font-name-asian="Times New Roman" fo:color="#008000" fo:font-size="10.5pt" style:font-size-asian="10.5pt" style:font-size-complex="10.5pt" fo:language="en" fo:country="US" style:language-asian="fr" style:country-asian="MA"/>
    </style:style>
    <style:style style:name="P825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26" style:parent-style-name="Policepardéfaut" style:family="text">
      <style:text-properties style:font-name="Consolas" style:font-name-asian="Times New Roman" fo:color="#008000" fo:font-size="10.5pt" style:font-size-asian="10.5pt" style:font-size-complex="10.5pt" fo:language="en" fo:country="US" style:language-asian="fr" style:country-asian="MA"/>
    </style:style>
    <style:style style:name="P82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28" style:parent-style-name="Policepardéfaut" style:family="text">
      <style:text-properties style:font-name="Consolas" style:font-name-asian="Times New Roman" fo:color="#008000" fo:font-size="10.5pt" style:font-size-asian="10.5pt" style:font-size-complex="10.5pt" fo:language="en" fo:country="US" style:language-asian="fr" style:country-asian="MA"/>
    </style:style>
    <style:style style:name="P82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30" style:parent-style-name="Policepardéfaut" style:family="text">
      <style:text-properties style:font-name="Consolas" style:font-name-asian="Times New Roman" fo:color="#008000" fo:font-size="10.5pt" style:font-size-asian="10.5pt" style:font-size-complex="10.5pt" fo:language="en" fo:country="US" style:language-asian="fr" style:country-asian="MA"/>
    </style:style>
    <style:style style:name="P83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32" style:parent-style-name="Policepardéfaut" style:family="text">
      <style:text-properties style:font-name="Consolas" style:font-name-asian="Times New Roman" fo:color="#008000" fo:font-size="10.5pt" style:font-size-asian="10.5pt" style:font-size-complex="10.5pt" fo:language="en" fo:country="US" style:language-asian="fr" style:country-asian="MA"/>
    </style:style>
    <style:style style:name="P83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34" style:parent-style-name="Policepardéfaut" style:family="text">
      <style:text-properties style:font-name="Consolas" style:font-name-asian="Times New Roman" fo:color="#008000" fo:font-size="10.5pt" style:font-size-asian="10.5pt" style:font-size-complex="10.5pt" fo:language="en" fo:country="US" style:language-asian="fr" style:country-asian="MA"/>
    </style:style>
    <style:style style:name="P835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36" style:parent-style-name="Policepardéfaut" style:family="text">
      <style:text-properties style:font-name="Consolas" style:font-name-asian="Times New Roman" fo:color="#008000" fo:font-size="10.5pt" style:font-size-asian="10.5pt" style:font-size-complex="10.5pt" fo:language="en" fo:country="US" style:language-asian="fr" style:country-asian="MA"/>
    </style:style>
    <style:style style:name="P837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83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3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840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84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842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84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844" style:parent-style-name="Policepardéfaut" style:family="text">
      <style:text-properties style:font-name="Consolas" style:font-name-asian="Times New Roman" fo:color="#098658" fo:font-size="10.5pt" style:font-size-asian="10.5pt" style:font-size-complex="10.5pt" fo:language="en" fo:country="US" style:language-asian="fr" style:country-asian="MA"/>
    </style:style>
    <style:style style:name="T84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846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84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4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849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85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85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5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853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85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855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85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857" style:parent-style-name="Policepardéfaut" style:family="text">
      <style:text-properties style:font-name="Consolas" style:font-name-asian="Times New Roman" fo:color="#098658" fo:font-size="10.5pt" style:font-size-asian="10.5pt" style:font-size-complex="10.5pt" fo:language="en" fo:country="US" style:language-asian="fr" style:country-asian="MA"/>
    </style:style>
    <style:style style:name="T85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859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86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61" style:parent-style-name="Policepardéfaut" style:family="text">
      <style:text-properties style:font-name="Consolas" style:font-name-asian="Times New Roman" fo:color="#008000" fo:font-size="10.5pt" style:font-size-asian="10.5pt" style:font-size-complex="10.5pt" fo:language="en" fo:country="US" style:language-asian="fr" style:country-asian="MA"/>
    </style:style>
    <style:style style:name="P86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63" style:parent-style-name="Policepardéfaut" style:family="text">
      <style:text-properties style:font-name="Consolas" style:font-name-asian="Times New Roman" fo:color="#008000" fo:font-size="10.5pt" style:font-size-asian="10.5pt" style:font-size-complex="10.5pt" fo:language="en" fo:country="US" style:language-asian="fr" style:country-asian="MA"/>
    </style:style>
    <style:style style:name="P86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65" style:parent-style-name="Policepardéfaut" style:family="text">
      <style:text-properties style:font-name="Consolas" style:font-name-asian="Times New Roman" fo:color="#008000" fo:font-size="10.5pt" style:font-size-asian="10.5pt" style:font-size-complex="10.5pt" fo:language="en" fo:country="US" style:language-asian="fr" style:country-asian="MA"/>
    </style:style>
    <style:style style:name="P86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67" style:parent-style-name="Policepardéfaut" style:family="text">
      <style:text-properties style:font-name="Consolas" style:font-name-asian="Times New Roman" fo:color="#008000" fo:font-size="10.5pt" style:font-size-asian="10.5pt" style:font-size-complex="10.5pt" fo:language="en" fo:country="US" style:language-asian="fr" style:country-asian="MA"/>
    </style:style>
    <style:style style:name="P86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69" style:parent-style-name="Policepardéfaut" style:family="text">
      <style:text-properties style:font-name="Consolas" style:font-name-asian="Times New Roman" fo:color="#008000" fo:font-size="10.5pt" style:font-size-asian="10.5pt" style:font-size-complex="10.5pt" fo:language="en" fo:country="US" style:language-asian="fr" style:country-asian="MA"/>
    </style:style>
    <style:style style:name="P87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71" style:parent-style-name="Policepardéfaut" style:family="text">
      <style:text-properties style:font-name="Consolas" style:font-name-asian="Times New Roman" fo:color="#008000" fo:font-size="10.5pt" style:font-size-asian="10.5pt" style:font-size-complex="10.5pt" fo:language="en" fo:country="US" style:language-asian="fr" style:country-asian="MA"/>
    </style:style>
    <style:style style:name="P87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73" style:parent-style-name="Policepardéfaut" style:family="text">
      <style:text-properties style:font-name="Consolas" style:font-name-asian="Times New Roman" fo:color="#008000" fo:font-size="10.5pt" style:font-size-asian="10.5pt" style:font-size-complex="10.5pt" fo:language="en" fo:country="US" style:language-asian="fr" style:country-asian="MA"/>
    </style:style>
    <style:style style:name="P87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75" style:parent-style-name="Policepardéfaut" style:family="text">
      <style:text-properties style:font-name="Consolas" style:font-name-asian="Times New Roman" fo:color="#008000" fo:font-size="10.5pt" style:font-size-asian="10.5pt" style:font-size-complex="10.5pt" fo:language="en" fo:country="US" style:language-asian="fr" style:country-asian="MA"/>
    </style:style>
    <style:style style:name="P87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77" style:parent-style-name="Policepardéfaut" style:family="text">
      <style:text-properties style:font-name="Consolas" style:font-name-asian="Times New Roman" fo:color="#008000" fo:font-size="10.5pt" style:font-size-asian="10.5pt" style:font-size-complex="10.5pt" fo:language="en" fo:country="US" style:language-asian="fr" style:country-asian="MA"/>
    </style:style>
    <style:style style:name="P878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87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8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881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88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883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88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885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88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887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88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8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890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89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892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89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894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89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896" style:parent-style-name="Policepardéfaut" style:family="text">
      <style:text-properties style:font-name="Consolas" style:font-name-asian="Times New Roman" fo:color="#098658" fo:font-size="10.5pt" style:font-size-asian="10.5pt" style:font-size-complex="10.5pt" fo:language="en" fo:country="US" style:language-asian="fr" style:country-asian="MA"/>
    </style:style>
    <style:style style:name="T89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898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89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90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901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90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903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90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905" style:parent-style-name="Policepardéfaut" style:family="text">
      <style:text-properties style:font-name="Consolas" style:font-name-asian="Times New Roman" fo:color="#098658" fo:font-size="10.5pt" style:font-size-asian="10.5pt" style:font-size-complex="10.5pt" fo:language="en" fo:country="US" style:language-asian="fr" style:country-asian="MA"/>
    </style:style>
    <style:style style:name="T90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907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90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90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910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91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91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91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914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91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916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91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918" style:parent-style-name="Policepardéfaut" style:family="text">
      <style:text-properties style:font-name="Consolas" style:font-name-asian="Times New Roman" fo:color="#098658" fo:font-size="10.5pt" style:font-size-asian="10.5pt" style:font-size-complex="10.5pt" fo:language="en" fo:country="US" style:language-asian="fr" style:country-asian="MA"/>
    </style:style>
    <style:style style:name="T91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920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921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92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92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924" style:parent-style-name="Policepardéfaut" style:family="text">
      <style:text-properties style:font-name="Consolas" style:font-name-asian="Times New Roman" fo:color="#098658" fo:font-size="10.5pt" style:font-size-asian="10.5pt" style:font-size-complex="10.5pt" fo:language="en" fo:country="US" style:language-asian="fr" style:country-asian="MA"/>
    </style:style>
    <style:style style:name="T92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926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927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92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92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930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93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932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93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934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93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936" style:parent-style-name="Policepardéfaut" style:family="text">
      <style:text-properties style:font-name="Consolas" style:font-name-asian="Times New Roman" fo:color="#098658" fo:font-size="10.5pt" style:font-size-asian="10.5pt" style:font-size-complex="10.5pt" fo:language="en" fo:country="US" style:language-asian="fr" style:country-asian="MA"/>
    </style:style>
    <style:style style:name="T93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93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93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940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94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942" style:parent-style-name="Policepardéfaut" style:family="text">
      <style:text-properties style:font-name="Consolas" style:font-name-asian="Times New Roman" fo:color="#008000" fo:font-size="10.5pt" style:font-size-asian="10.5pt" style:font-size-complex="10.5pt" fo:language="fr" fo:country="MA" style:language-asian="fr" style:country-asian="MA"/>
    </style:style>
    <style:style style:name="P94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94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945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94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947" style:parent-style-name="Normal" style:family="paragraph">
      <style:text-properties fo:language="fr" fo:country="MA" style:language-asian="fr" style:country-asian="MA"/>
    </style:style>
  </office:automatic-styles>
  <office:body>
    <office:text text:use-soft-page-breaks="true">
      <text:p text:style-name="P1"><text:span text:style-name="T5">LAB :<text:s/></text:span><text:span text:style-name="T6">Agent avec LangGraph</text:span></text:p>
      <text:p text:style-name="P7"/>
      <text:p text:style-name="P8"/>
      <text:p text:style-name="En-têtedetabledesmatières"><text:span text:style-name="T9">Table des matières</text:span></text:p>
      <text:p text:style-name="P10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1"><text:a xlink:href="#_Toc227146481" office:target-frame-name="_top" xlink:show="replace"><text:span text:style-name="Lienhypertexte">PARTIE 1 : LLM local avec outils (Tools)</text:span><text:tab/>2</text:a></text:p>
          <text:p text:style-name="P12"><text:a xlink:href="#_Toc227146482" office:target-frame-name="_top" xlink:show="replace"><text:span text:style-name="Lienhypertexte">PARTIE 2 : Agent comme nœud de LangGraph</text:span><text:tab/>3</text:a></text:p>
          <text:p text:style-name="P13"><text:a xlink:href="#_Toc227146483" office:target-frame-name="_top" xlink:show="replace"><text:span text:style-name="T14">PARTIE 3 :<text:s/></text:span><text:span text:style-name="T15">Un workflow LangGraph qui génère un texte et s’arrête pour validation humaine (HITL)</text:span><text:tab/>5</text:a></text:p>
          <text:p text:style-name="P16"><text:a xlink:href="#_Toc227146484" office:target-frame-name="_top" xlink:show="replace"><text:span text:style-name="T17">PARTIE 4 : TP</text:span><text:tab/>6</text:a></text:p>
        </text:index-body>
      </text:table-of-content>
      <text:p text:style-name="Normal"/>
      <text:p text:style-name="P18"/>
      <text:h text:style-name="Titre2" text:outline-level="2"/>
      <text:h text:style-name="Titre2" text:outline-level="2"/>
      <text:p text:style-name="Normal"/>
      <text:h text:style-name="Titre1" text:outline-level="1"><text:bookmark-start text:name="_Toc226121170"/>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itre1" text:outline-level="1"><text:bookmark-start text:name="_Toc227140210"/></text:h>
      <text:p text:style-name="Normal"/>
      <text:p text:style-name="Normal"/>
      <text:h text:style-name="Titre1" text:outline-level="1"><text:bookmark-start text:name="_Toc227146481"/><text:soft-page-break/>PARTIE 1 :<text:s/><text:bookmark-end text:name="_Toc226121170"/><text:bookmark-end text:name="_Toc227140210"/>LLM local avec outils (Tools<text:bookmark-start text:name="_Toc226121178"/>)<text:bookmark-end text:name="_Toc227146481"/></text:h>
      <text:p text:style-name="Normal">Créer un fichier tools_setup.py</text:p>
      <text:p text:style-name="P19"><text:span text:style-name="T20">from</text:span><text:span text:style-name="T21"><text:s/>langchain.tools<text:s/></text:span><text:span text:style-name="T22">import</text:span><text:span text:style-name="T23"><text:s/>tool</text:span></text:p>
      <text:p text:style-name="P24"><text:span text:style-name="T25">from</text:span><text:span text:style-name="T26"><text:s/>langchain_ollama<text:s/></text:span><text:span text:style-name="T27">import</text:span><text:span text:style-name="T28"><text:s/>ChatOllama</text:span></text:p>
      <text:p text:style-name="P29"><text:span text:style-name="T30">from</text:span><text:span text:style-name="T31"><text:s/>dotenv<text:s/></text:span><text:span text:style-name="T32">import</text:span><text:span text:style-name="T33"><text:s/>load_dotenv</text:span></text:p>
      <text:p text:style-name="P34"/>
      <text:p text:style-name="P35"><text:span text:style-name="T36">load_dotenv()<text:s/></text:span><text:span text:style-name="T37"># si openai , groq ...</text:span></text:p>
      <text:p text:style-name="P38"><text:line-break/></text:p>
      <text:p text:style-name="P39">model = ChatOllama(</text:p>
      <text:p text:style-name="P40"><text:span text:style-name="T41">    model=</text:span><text:span text:style-name="T42">"llama3.2:3b"</text:span><text:span text:style-name="T43">,  <text:s/></text:span><text:span text:style-name="T44"># ou mistral, gemma, etc.</text:span></text:p>
      <text:p text:style-name="P45">   <text:s/></text:p>
      <text:p text:style-name="P46">)</text:p>
      <text:p text:style-name="P47"/>
      <text:p text:style-name="P48">@tool</text:p>
      <text:p text:style-name="P49"><text:span text:style-name="T50">def</text:span><text:span text:style-name="T51"><text:s/>add(a: int, b: int) -&gt; int:</text:span></text:p>
      <text:p text:style-name="P52"><text:span text:style-name="T53">   <text:s/></text:span><text:span text:style-name="T54">"""Add two integers."""</text:span></text:p>
      <text:p text:style-name="P55"><text:span text:style-name="T56">   <text:s/></text:span><text:span text:style-name="T57">return</text:span><text:span text:style-name="T58"><text:s/>a + b</text:span></text:p>
      <text:p text:style-name="P59"/>
      <text:p text:style-name="P60">@tool</text:p>
      <text:p text:style-name="P61"><text:span text:style-name="T62">def</text:span><text:span text:style-name="T63"><text:s/>multiply(a: int, b: int) -&gt; int:</text:span></text:p>
      <text:p text:style-name="P64"><text:span text:style-name="T65">   <text:s/></text:span><text:span text:style-name="T66">"""multiply two integers."""</text:span></text:p>
      <text:p text:style-name="P67"><text:span text:style-name="T68">   <text:s/></text:span><text:span text:style-name="T69">return</text:span><text:span text:style-name="T70"><text:s/>a * b</text:span></text:p>
      <text:p text:style-name="P71"/>
      <text:p text:style-name="P72">@tool</text:p>
      <text:p text:style-name="P73"><text:span text:style-name="T74">def</text:span><text:span text:style-name="T75"><text:s/>divide(a: int, b: int) -&gt; float:</text:span></text:p>
      <text:p text:style-name="P76"><text:span text:style-name="T77">   <text:s/></text:span><text:span text:style-name="T78">"""divide two integers."""</text:span></text:p>
      <text:p text:style-name="P79"><text:span text:style-name="T80">   <text:s/></text:span><text:span text:style-name="T81">return</text:span><text:span text:style-name="T82"><text:s/>a / b</text:span></text:p>
      <text:p text:style-name="P83"/>
      <text:p text:style-name="P84">tools = [add, multiply, divide]</text:p>
      <text:p text:style-name="P85"><text:span text:style-name="T86">tools_by_name = {t.name: t<text:s/></text:span><text:span text:style-name="T87">for</text:span><text:span text:style-name="T88"><text:s/>t<text:s/></text:span><text:span text:style-name="T89">in</text:span><text:span text:style-name="T90"><text:s/>tools}</text:span></text:p>
      <text:p text:style-name="P91"/>
      <text:p text:style-name="P92">model_with_tools = model.bind_tools(tools)</text:p>
      <text:p text:style-name="P93"/>
      <text:h text:style-name="P94" text:outline-level="1"><text:bookmark-start text:name="_Toc227140211"/></text:h>
      <text:p text:style-name="P95"/>
      <text:h text:style-name="Titre1" text:outline-level="1"><text:bookmark-start text:name="_Toc227146482"/><text:soft-page-break/>PARTIE 2 :<text:s/><text:bookmark-end text:name="_Toc226121178"/><text:bookmark-end text:name="_Toc227140211"/>Agent<text:s/>ReAct<text:s/>avec<text:s/>LangGraph<text:bookmark-end text:name="_Toc227146482"/><text:s/></text:h>
      <text:p text:style-name="P96">Construire un agent avec outils (tools) basé sur LangGraph qui :</text:p>
      <text:list text:style-name="LFO1" text:continue-numbering="true">
        <text:list-item>
          <text:p text:style-name="P97">reçoit une question utilisateur<text:s/></text:p>
        </text:list-item>
        <text:list-item>
          <text:p text:style-name="P98">laisse le LLM décider s’il doit utiliser un tool<text:s/></text:p>
        </text:list-item>
        <text:list-item>
          <text:p text:style-name="P99">exécute le tool si nécessaire<text:s/></text:p>
        </text:list-item>
        <text:list-item>
          <text:p text:style-name="P100">renvoie la réponse finale<text:s/></text:p>
        </text:list-item>
        <text:list-item>
          <text:p text:style-name="P101">peut fonctionner en streaming</text:p>
        </text:list-item>
      </text:list>
      <text:p text:style-name="P102">L’ état contient :</text:p>
      <text:p text:style-name="P103">messages</text:p>
      <text:list text:style-name="LFO2" text:continue-numbering="true">
        <text:list-item>
          <text:p text:style-name="P104">historique complet de la conversation<text:s/></text:p>
        </text:list-item>
        <text:list-item>
          <text:p text:style-name="P105">utilise add pour concaténation automatique<text:s/></text:p>
        </text:list-item>
      </text:list>
      <text:p text:style-name="P106">llm_calls</text:p>
      <text:list text:style-name="LFO3" text:continue-numbering="true">
        <text:list-item>
          <text:p text:style-name="P107">compteur du nombre d’appels au LLM</text:p>
        </text:list-item>
      </text:list>
      <text:p text:style-name="P108">Le résultat :</text:p>
      <text:list text:style-name="LFO3" text:continue-numbering="true">
        <text:list-item>
          <text:p text:style-name="P109">ajoute la réponse du LLM dans messages<text:s/></text:p>
        </text:list-item>
        <text:list-item>
          <text:p text:style-name="P110">incrémente compteur</text:p>
        </text:list-item>
      </text:list>
      <text:p text:style-name="P111"/>
      <text:p text:style-name="P112">Créer un fichier agent_node.py</text:p>
      <text:p text:style-name="P113"><text:span text:style-name="T114">from</text:span><text:span text:style-name="T115"><text:s/>operator<text:s/></text:span><text:span text:style-name="T116">import</text:span><text:span text:style-name="T117"><text:s/>add</text:span></text:p>
      <text:p text:style-name="P118"><text:span text:style-name="T119">from</text:span><text:span text:style-name="T120"><text:s/>typing<text:s/></text:span><text:span text:style-name="T121">import</text:span><text:span text:style-name="T122"><text:s/>Literal</text:span></text:p>
      <text:p text:style-name="P123"><text:span text:style-name="T124">from</text:span><text:span text:style-name="T125"><text:s/>typing_extensions<text:s/></text:span><text:span text:style-name="T126">import</text:span><text:span text:style-name="T127"><text:s/>TypedDict, Annotated</text:span></text:p>
      <text:p text:style-name="P128"><text:span text:style-name="T129">from</text:span><text:span text:style-name="T130"><text:s/>langchain_core.messages<text:s/></text:span><text:span text:style-name="T131">import</text:span><text:span text:style-name="T132"><text:s/>AnyMessage</text:span></text:p>
      <text:p text:style-name="P133"><text:span text:style-name="T134">from</text:span><text:span text:style-name="T135"><text:s/>langchain.messages<text:s/></text:span><text:span text:style-name="T136">import</text:span><text:span text:style-name="T137"><text:s/>SystemMessage, ToolMessage, HumanMessage</text:span></text:p>
      <text:p text:style-name="P138"/>
      <text:p text:style-name="P139"><text:span text:style-name="T140">from</text:span><text:span text:style-name="T141"><text:s/>langgraph.graph<text:s/></text:span><text:span text:style-name="T142">import</text:span><text:span text:style-name="T143"><text:s/>StateGraph, START, END</text:span></text:p>
      <text:p text:style-name="P144"/>
      <text:p text:style-name="P145"><text:span text:style-name="T146">from</text:span><text:span text:style-name="T147"><text:s/>tools_setup<text:s/></text:span><text:span text:style-name="T148">import</text:span><text:span text:style-name="T149"><text:s/>model_with_tools, tools_by_name</text:span></text:p>
      <text:p text:style-name="P150"/>
      <text:p text:style-name="P151"><text:span text:style-name="T152">class</text:span><text:span text:style-name="T153"><text:s/>AgentState(TypedDict):</text:span></text:p>
      <text:p text:style-name="P154">    messages: Annotated[list[AnyMessage], add]</text:p>
      <text:p text:style-name="P155">    llm_calls: int</text:p>
      <text:p text:style-name="P156"/>
      <text:p text:style-name="P157"><text:span text:style-name="T158">def</text:span><text:span text:style-name="T159"><text:s/>llm_call(state: AgentState):</text:span></text:p>
      <text:p text:style-name="P160"><text:span text:style-name="T161">   <text:s/></text:span><text:span text:style-name="T162">"""LLM decides whether to call tools or respond."""</text:span></text:p>
      <text:p text:style-name="P163">    response = model_with_tools.invoke(</text:p>
      <text:soft-page-break/>
      <text:p text:style-name="P164"><text:span text:style-name="T165">        [SystemMessage(content=</text:span><text:span text:style-name="T166">"You are a helpful assistant that solves arithmetic problem using tools when needed."</text:span><text:span text:style-name="T167">)]</text:span></text:p>
      <text:p text:style-name="P168"><text:span text:style-name="T169">        + state[</text:span><text:span text:style-name="T170">"messages"</text:span><text:span text:style-name="T171">]</text:span></text:p>
      <text:p text:style-name="P172">    )</text:p>
      <text:p text:style-name="P173"/>
      <text:p text:style-name="P174"><text:span text:style-name="T175">   <text:s/></text:span><text:span text:style-name="T176">return</text:span><text:span text:style-name="T177"><text:s/>{</text:span></text:p>
      <text:p text:style-name="P178"><text:span text:style-name="T179">       <text:s/></text:span><text:span text:style-name="T180">"messages"</text:span><text:span text:style-name="T181">: [response],</text:span></text:p>
      <text:p text:style-name="P182"><text:span text:style-name="T183">       <text:s/></text:span><text:span text:style-name="T184">"llm_calls"</text:span><text:span text:style-name="T185">: state.get(</text:span><text:span text:style-name="T186">"llm_calls"</text:span><text:span text:style-name="T187">,<text:s/></text:span><text:span text:style-name="T188">0</text:span><text:span text:style-name="T189">) +<text:s/></text:span><text:span text:style-name="T190">1</text:span><text:span text:style-name="T191">,</text:span></text:p>
      <text:p text:style-name="P192">    }</text:p>
      <text:p text:style-name="P193"/>
      <text:p text:style-name="P194"><text:span text:style-name="T195">def</text:span><text:span text:style-name="T196"><text:s/>tool_node(state: AgentState):</text:span></text:p>
      <text:p text:style-name="P197"><text:span text:style-name="T198">   <text:s/></text:span><text:span text:style-name="T199">"""Execute tool calls from last AI message."""</text:span></text:p>
      <text:p text:style-name="P200"><text:span text:style-name="T201">    last = state[</text:span><text:span text:style-name="T202">"messages"</text:span><text:span text:style-name="T203">][-</text:span><text:span text:style-name="T204">1</text:span><text:span text:style-name="T205">]</text:span></text:p>
      <text:p text:style-name="P206">    results = []</text:p>
      <text:p text:style-name="P207"/>
      <text:p text:style-name="P208"><text:span text:style-name="T209">   <text:s/></text:span><text:span text:style-name="T210">for</text:span><text:span text:style-name="T211"><text:s/>call<text:s/></text:span><text:span text:style-name="T212">in</text:span><text:span text:style-name="T213"><text:s/>last.tool_calls:</text:span></text:p>
      <text:p text:style-name="P214"><text:span text:style-name="T215">        tool = tools_by_name[call[</text:span><text:span text:style-name="T216">"name"</text:span><text:span text:style-name="T217">]]</text:span></text:p>
      <text:p text:style-name="P218"><text:span text:style-name="T219">        observation = tool.invoke(call[</text:span><text:span text:style-name="T220">"args"</text:span><text:span text:style-name="T221">])</text:span></text:p>
      <text:p text:style-name="P222"><text:span text:style-name="T223">        results.append(ToolMessage(content=str(observation), tool_call_id=call[</text:span><text:span text:style-name="T224">"id"</text:span><text:span text:style-name="T225">]))</text:span></text:p>
      <text:p text:style-name="P226"/>
      <text:p text:style-name="P227"><text:span text:style-name="T228">   <text:s/></text:span><text:span text:style-name="T229">return</text:span><text:span text:style-name="T230"><text:s/>{</text:span><text:span text:style-name="T231">"messages"</text:span><text:span text:style-name="T232">: results}</text:span></text:p>
      <text:p text:style-name="P233"/>
      <text:p text:style-name="P234"><text:span text:style-name="T235">def</text:span><text:span text:style-name="T236"><text:s/>should_continue(state: AgentState) -&gt; Literal[</text:span><text:span text:style-name="T237">"tool_node"</text:span><text:span text:style-name="T238">, END]:</text:span></text:p>
      <text:p text:style-name="P239"><text:span text:style-name="T240">    last = state[</text:span><text:span text:style-name="T241">"messages"</text:span><text:span text:style-name="T242">][-</text:span><text:span text:style-name="T243">1</text:span><text:span text:style-name="T244">]</text:span></text:p>
      <text:p text:style-name="P245"/>
      <text:p text:style-name="P246"><text:span text:style-name="T247">   <text:s/></text:span><text:span text:style-name="T248">if</text:span><text:span text:style-name="T249"><text:s/>getattr(last,<text:s/></text:span><text:span text:style-name="T250">"tool_calls"</text:span><text:span text:style-name="T251">,<text:s/></text:span><text:span text:style-name="T252">None</text:span><text:span text:style-name="T253">):</text:span></text:p>
      <text:p text:style-name="P254"><text:span text:style-name="T255">       <text:s/></text:span><text:span text:style-name="T256">if</text:span><text:span text:style-name="T257"><text:s/>last.tool_calls:</text:span></text:p>
      <text:p text:style-name="P258"><text:span text:style-name="T259">           <text:s/></text:span><text:span text:style-name="T260">return</text:span><text:span text:style-name="T261"><text:s/></text:span><text:span text:style-name="T262">"tool_node"</text:span></text:p>
      <text:p text:style-name="P263"><text:span text:style-name="T264">   <text:s/></text:span><text:span text:style-name="T265">return</text:span><text:span text:style-name="T266"><text:s/>END</text:span></text:p>
      <text:p text:style-name="P267"/>
      <text:p text:style-name="P268">builder = StateGraph(AgentState)</text:p>
      <text:p text:style-name="P269"/>
      <text:p text:style-name="P270"><text:span text:style-name="T271">builder.add_node(</text:span><text:span text:style-name="T272">"llm_call"</text:span><text:span text:style-name="T273">, llm_call)</text:span></text:p>
      <text:p text:style-name="P274"><text:span text:style-name="T275">builder.add_node(</text:span><text:span text:style-name="T276">"tool_node"</text:span><text:span text:style-name="T277">, tool_node)</text:span></text:p>
      <text:p text:style-name="P278"/>
      <text:p text:style-name="P279"><text:span text:style-name="T280">builder.add_edge(START,<text:s/></text:span><text:span text:style-name="T281">"llm_call"</text:span><text:span text:style-name="T282">)</text:span></text:p>
      <text:p text:style-name="P283"><text:span text:style-name="T284">builder.add_conditional_edges(</text:span><text:span text:style-name="T285">"llm_call"</text:span><text:span text:style-name="T286">, should_continue, [</text:span><text:span text:style-name="T287">"tool_node"</text:span><text:span text:style-name="T288">, END])</text:span></text:p>
      <text:p text:style-name="P289"><text:span text:style-name="T290">builder.add_edge(</text:span><text:span text:style-name="T291">"tool_node"</text:span><text:span text:style-name="T292">,<text:s/></text:span><text:span text:style-name="T293">"llm_call"</text:span><text:span text:style-name="T294">)</text:span></text:p>
      <text:p text:style-name="P295"/>
      <text:p text:style-name="P296">agent = builder.compile()</text:p>
      <text:p text:style-name="P297"/>
      <text:p text:style-name="P298"><text:span text:style-name="T299">if</text:span><text:span text:style-name="T300"><text:s/>__name__ ==<text:s/></text:span><text:span text:style-name="T301">"__main__"</text:span><text:span text:style-name="T302">:</text:span></text:p>
      <text:p text:style-name="P303"><text:span text:style-name="T304">    result = agent.invoke({</text:span><text:span text:style-name="T305">"messages"</text:span><text:span text:style-name="T306">: [HumanMessage(content=</text:span><text:span text:style-name="T307">"Add 3 and 4."</text:span><text:span text:style-name="T308">)],<text:s/></text:span><text:span text:style-name="T309">"llm_calls"</text:span><text:span text:style-name="T310">:<text:s/></text:span><text:span text:style-name="T311">0</text:span><text:span text:style-name="T312">})</text:span></text:p>
      <text:p text:style-name="P313"/>
      <text:soft-page-break/>
      <text:p text:style-name="P314">    print(result)</text:p>
      <text:p text:style-name="P315"/>
      <text:p text:style-name="P316"><text:span text:style-name="T317">   <text:s/></text:span><text:span text:style-name="T318">for</text:span><text:span text:style-name="T319"><text:s/>m<text:s/></text:span><text:span text:style-name="T320">in</text:span><text:span text:style-name="T321"><text:s/>result[</text:span><text:span text:style-name="T322">"messages"</text:span><text:span text:style-name="T323">]: # parcourir tout l’historique conversationnel</text:span></text:p>
      <text:p text:style-name="P324"><text:span text:style-name="T325">       <text:s/></text:span><text:span text:style-name="T326">try</text:span><text:span text:style-name="T327">:</text:span></text:p>
      <text:p text:style-name="P328"><text:span text:style-name="T329">            m.pretty_print() #</text:span><text:span text:style-name="T330"><text:s/>affiche<text:s/></text:span><text:span text:style-name="T331">type du message, contenu et tool calls<text:s/></text:span></text:p>
      <text:p text:style-name="P332"/>
      <text:p text:style-name="P333"><text:span text:style-name="T334">       <text:s/></text:span><text:span text:style-name="T335">except</text:span><text:span text:style-name="T336"><text:s/>Exception<text:s/></text:span><text:span text:style-name="T337">as</text:span><text:span text:style-name="T338"><text:s/>ex:</text:span></text:p>
      <text:p text:style-name="P339">            print(ex)</text:p>
      <text:p text:style-name="P340"><text:span text:style-name="T341">           <text:s/></text:span><text:span text:style-name="T342">print(m)</text:span></text:p>
      <text:p text:style-name="P343"/>
      <text:p text:style-name="P344"><text:span text:style-name="T345">   <text:s/></text:span><text:span text:style-name="T346"># Stream updates (state deltas)</text:span></text:p>
      <text:p text:style-name="P347"/>
      <text:p text:style-name="P348"><text:span text:style-name="T349">   <text:s/></text:span><text:span text:style-name="T350">for</text:span><text:span text:style-name="T351"><text:s/>chunk<text:s/></text:span><text:span text:style-name="T352">in</text:span><text:span text:style-name="T353"><text:s/>agent.stream( <text:s text:c="2"/></text:span><text:span text:style-name="T354"># chaque chunk est une</text:span><text:span text:style-name="T355"><text:s/></text:span><text:span text:style-name="T356">modification du state</text:span></text:p>
      <text:p text:style-name="P357"><text:span text:style-name="T358">            {</text:span><text:span text:style-name="T359">"messages"</text:span><text:span text:style-name="T360">: [HumanMessage(content=</text:span><text:span text:style-name="T361">"Multiple 30 and 43."</text:span><text:span text:style-name="T362">)],<text:s/></text:span><text:span text:style-name="T363">"llm_calls"</text:span><text:span text:style-name="T364">:<text:s/></text:span><text:span text:style-name="T365">0</text:span><text:span text:style-name="T366">},</text:span></text:p>
      <text:p text:style-name="P367"><text:span text:style-name="T368">            stream_mode=</text:span><text:span text:style-name="T369">"updates"</text:span><text:span text:style-name="T370">,#</text:span><text:span text:style-name="T371">afficher chaque modification du graphe en direct node par node</text:span></text:p>
      <text:p text:style-name="P372"><text:span text:style-name="T373">   <text:s/></text:span><text:span text:style-name="T374">):</text:span></text:p>
      <text:p text:style-name="P375">        print(chunk)</text:p>
      <text:p text:style-name="P376"/>
      <text:p text:style-name="P377"><text:span text:style-name="T378">   <text:s/></text:span><text:span text:style-name="T379"># Stream messages LLM tokens et metadata</text:span></text:p>
      <text:p text:style-name="P380"><text:span text:style-name="T381">   <text:s/></text:span><text:span text:style-name="T382">for</text:span><text:span text:style-name="T383"><text:s/>message_chunk, metadata<text:s/></text:span><text:span text:style-name="T384">in</text:span><text:span text:style-name="T385"><text:s/>agent.stream(</text:span></text:p>
      <text:p text:style-name="P386"><text:span text:style-name="T387">           <text:s/></text:span><text:span text:style-name="T388">{</text:span><text:span text:style-name="T389">"messages"</text:span><text:span text:style-name="T390">: [HumanMessage(content=</text:span><text:span text:style-name="T391">"Divide 30 and 43."</text:span><text:span text:style-name="T392">)],<text:s/></text:span><text:span text:style-name="T393">"llm_calls"</text:span><text:span text:style-name="T394">:<text:s/></text:span><text:span text:style-name="T395">0</text:span><text:span text:style-name="T396">},</text:span></text:p>
      <text:p text:style-name="P397"><text:span text:style-name="T398">            stream_mode=</text:span><text:span text:style-name="T399">"messages"</text:span><text:span text:style-name="T400">, #les sorties du LLM et métadonnées</text:span></text:p>
      <text:p text:style-name="P401"><text:span text:style-name="T402">   <text:s/></text:span><text:span text:style-name="T403">):</text:span></text:p>
      <text:p text:style-name="P404"><text:span text:style-name="T405">       <text:s/></text:span><text:span text:style-name="T406">if</text:span><text:span text:style-name="T407"><text:s/>getattr(message_chunk,<text:s/></text:span><text:span text:style-name="T408">"content"</text:span><text:span text:style-name="T409">,<text:s/></text:span><text:span text:style-name="T410">None</text:span><text:span text:style-name="T411">):</text:span></text:p>
      <text:p text:style-name="P412"><text:span text:style-name="T413">            print(message_chunk.content, end=</text:span><text:span text:style-name="T414">""</text:span><text:span text:style-name="T415">, flush=</text:span><text:span text:style-name="T416">True</text:span><text:span text:style-name="T417">)</text:span></text:p>
      <text:p text:style-name="P418"><text:span text:style-name="T419">   <text:s/></text:span><text:span text:style-name="T420">print()</text:span></text:p>
      <text:p text:style-name="P421"/>
      <text:h text:style-name="Titre1" text:outline-level="1"><text:bookmark-start text:name="_Toc227146483"/><text:span text:style-name="T422">PARTIE 3 :<text:s/></text:span><text:span text:style-name="T423">Un workflow LangGraph qui génère un texte et s’arrête pour validation humaine (HITL)</text:span><text:bookmark-end text:name="_Toc227146483"/></text:h>
      <text:p text:style-name="P424"/>
      <text:p text:style-name="P425">@task transforme une fonction Python en une brique d’exécution isolée dans un workflow LangGraph.</text:p>
      <text:p text:style-name="P426"><text:span text:style-name="T427">@entrypoint définit la fonction principale qui démarre le graphe. Un entrypoint :</text:span></text:p>
      <text:list text:style-name="LFO4" text:continue-numbering="true">
        <text:list-item>
          <text:p text:style-name="P428">reçoit l’entrée utilisateur<text:s/></text:p>
        </text:list-item>
        <text:list-item>
          <text:p text:style-name="P429">orchestre les tasks<text:s/></text:p>
        </text:list-item>
        <text:list-item>
          <text:p text:style-name="P430">définit le flux global<text:s/></text:p>
        </text:list-item>
        <text:list-item>
          <text:p text:style-name="P431">peut inclure interrupt()<text:s/></text:p>
        </text:list-item>
        <text:list-item>
          <text:p text:style-name="P432">est exécuté via .stream() ou .invoke()</text:p>
        </text:list-item>
      </text:list>
      <text:soft-page-break/>
      <text:p text:style-name="P433"><text:span text:style-name="T434">import</text:span><text:span text:style-name="T435"><text:s/>time</text:span></text:p>
      <text:p text:style-name="P436"><text:span text:style-name="T437">import</text:span><text:span text:style-name="T438"><text:s/>uuid</text:span></text:p>
      <text:p text:style-name="P439"><text:span text:style-name="T440">from</text:span><text:span text:style-name="T441"><text:s/>langgraph.checkpoint.memory<text:s/></text:span><text:span text:style-name="T442">import</text:span><text:span text:style-name="T443"><text:s/>InMemorySaver</text:span></text:p>
      <text:p text:style-name="P444"><text:span text:style-name="T445">from</text:span><text:span text:style-name="T446"><text:s/>langgraph.func<text:s/></text:span><text:span text:style-name="T447">import</text:span><text:span text:style-name="T448"><text:s/>entrypoint, task</text:span></text:p>
      <text:p text:style-name="P449"><text:span text:style-name="T450">from</text:span><text:span text:style-name="T451"><text:s/>langgraph.types<text:s/></text:span><text:span text:style-name="T452">import</text:span><text:span text:style-name="T453"><text:s/>interrupt, Command</text:span></text:p>
      <text:p text:style-name="P454"/>
      <text:p text:style-name="P455">@task</text:p>
      <text:p text:style-name="P456"><text:span text:style-name="T457">def</text:span><text:span text:style-name="T458"><text:s/>write_essay(topic: str) -&gt; str:</text:span></text:p>
      <text:p text:style-name="P459"><text:span text:style-name="T460">    time.sleep(</text:span><text:span text:style-name="T461">1</text:span><text:span text:style-name="T462">)</text:span></text:p>
      <text:p text:style-name="P463"><text:span text:style-name="T464">   <text:s/></text:span><text:span text:style-name="T465">return</text:span><text:span text:style-name="T466"><text:s/></text:span><text:span text:style-name="T467">f</text:span><text:span text:style-name="T468">"Essay draft about<text:s/></text:span><text:span text:style-name="T469">{topic}</text:span><text:span text:style-name="T470">"</text:span></text:p>
      <text:p text:style-name="P471"/>
      <text:p text:style-name="P472">@entrypoint(checkpointer=InMemorySaver())</text:p>
      <text:p text:style-name="P473"><text:span text:style-name="T474">def</text:span><text:span text:style-name="T475"><text:s/>workflow(topic: str) -&gt; dict:</text:span></text:p>
      <text:p text:style-name="P476">    draft = write_essay(topic).result()</text:p>
      <text:p text:style-name="P477"><text:span text:style-name="T478">    approved = interrupt({</text:span><text:span text:style-name="T479">"draft"</text:span><text:span text:style-name="T480">: draft,<text:s/></text:span><text:span text:style-name="T481">"action"</text:span><text:span text:style-name="T482">:<text:s/></text:span><text:span text:style-name="T483">"approve or reject"</text:span><text:span text:style-name="T484">})</text:span></text:p>
      <text:p text:style-name="P485"><text:span text:style-name="T486">   <text:s/></text:span><text:span text:style-name="T487">return</text:span><text:span text:style-name="T488"><text:s/>{</text:span><text:span text:style-name="T489">"draft"</text:span><text:span text:style-name="T490">: draft,<text:s/></text:span><text:span text:style-name="T491">"approved"</text:span><text:span text:style-name="T492">: approved}</text:span></text:p>
      <text:p text:style-name="P493"/>
      <text:p text:style-name="P494">thread_id = str(uuid.uuid4())</text:p>
      <text:p text:style-name="P495"/>
      <text:p text:style-name="P496"><text:span text:style-name="T497">config = {</text:span><text:span text:style-name="T498">"configurable"</text:span><text:span text:style-name="T499">: {</text:span><text:span text:style-name="T500">"thread_id"</text:span><text:span text:style-name="T501">: thread_id}}</text:span></text:p>
      <text:p text:style-name="P502"/>
      <text:p text:style-name="P503"><text:span text:style-name="T504"># Première excécution</text:span></text:p>
      <text:p text:style-name="P505"><text:span text:style-name="T506">for</text:span><text:span text:style-name="T507"><text:s/>item<text:s/></text:span><text:span text:style-name="T508">in</text:span><text:span text:style-name="T509"><text:s/>workflow.stream(</text:span><text:span text:style-name="T510">"cats"</text:span><text:span text:style-name="T511">, config):</text:span></text:p>
      <text:p text:style-name="P512">    print(item)</text:p>
      <text:p text:style-name="P513"><text:span text:style-name="T514"># Deuxième excécution</text:span></text:p>
      <text:p text:style-name="P515"><text:span text:style-name="T516">for</text:span><text:span text:style-name="T517"><text:s/>item<text:s/></text:span><text:span text:style-name="T518">in</text:span><text:span text:style-name="T519"><text:s/>workflow.stream(Command(resume=</text:span><text:span text:style-name="T520">True</text:span><text:span text:style-name="T521">), config):</text:span></text:p>
      <text:p text:style-name="P522"><text:span text:style-name="T523">   <text:s/></text:span><text:span text:style-name="T524">print(item)</text:span></text:p>
      <text:p text:style-name="P525"/>
      <text:h text:style-name="P526" text:outline-level="1"><text:bookmark-start text:name="_Toc227146484"/>PARTIE 4 : TP<text:bookmark-end text:name="_Toc227146484"/><text:s/></text:h>
      <text:p text:style-name="P527">Ce code construit un agent LangGraph avancé capable de :</text:p>
      <text:list text:style-name="LFO5" text:continue-numbering="true">
        <text:list-item>
          <text:p text:style-name="P528">utiliser des tools<text:s/></text:p>
        </text:list-item>
        <text:list-item>
          <text:p text:style-name="P529">s’arrêter pour validation humaine<text:s/></text:p>
        </text:list-item>
        <text:list-item>
          <text:p text:style-name="P530">reprendre après interruption<text:s/></text:p>
        </text:list-item>
        <text:list-item>
          <text:p text:style-name="P531">sauvegarder l’historique complet<text:s/></text:p>
        </text:list-item>
        <text:list-item>
          <text:p text:style-name="P532">revenir dans le passé et modifier un état (fork)</text:p>
        </text:list-item>
      </text:list>
      <text:p text:style-name="P533"/>
      <text:p text:style-name="P534"/>
      <text:p text:style-name="P535"/>
      <text:p text:style-name="P536"><text:span text:style-name="T537">from</text:span><text:span text:style-name="T538"><text:s/>langgraph.checkpoint.memory<text:s/></text:span><text:span text:style-name="T539">import</text:span><text:span text:style-name="T540"><text:s/>InMemorySaver</text:span></text:p>
      <text:p text:style-name="P541"><text:span text:style-name="T542">from</text:span><text:span text:style-name="T543"><text:s/>langchain.messages<text:s/></text:span><text:span text:style-name="T544">import</text:span><text:span text:style-name="T545"><text:s/>HumanMessage</text:span></text:p>
      <text:p text:style-name="P546"/>
      <text:p text:style-name="P547"><text:span text:style-name="T548">from</text:span><text:span text:style-name="T549"><text:s/>operator<text:s/></text:span><text:span text:style-name="T550">import</text:span><text:span text:style-name="T551"><text:s/>add</text:span></text:p>
      <text:p text:style-name="P552"><text:span text:style-name="T553">from</text:span><text:span text:style-name="T554"><text:s/>typing<text:s/></text:span><text:span text:style-name="T555">import</text:span><text:span text:style-name="T556"><text:s/>Literal</text:span></text:p>
      <text:p text:style-name="P557"><text:span text:style-name="T558">from</text:span><text:span text:style-name="T559"><text:s/>typing_extensions<text:s/></text:span><text:span text:style-name="T560">import</text:span><text:span text:style-name="T561"><text:s/>TypedDict, Annotated</text:span></text:p>
      <text:p text:style-name="P562"><text:span text:style-name="T563">from</text:span><text:span text:style-name="T564"><text:s/>langchain_core.messages<text:s/></text:span><text:span text:style-name="T565">import</text:span><text:span text:style-name="T566"><text:s/>AnyMessage</text:span></text:p>
      <text:p text:style-name="P567"><text:span text:style-name="T568">from</text:span><text:span text:style-name="T569"><text:s/>langchain.messages<text:s/></text:span><text:span text:style-name="T570">import</text:span><text:span text:style-name="T571"><text:s/>SystemMessage, ToolMessage, HumanMessage</text:span></text:p>
      <text:p text:style-name="P572"/>
      <text:p text:style-name="P573"><text:span text:style-name="T574">from</text:span><text:span text:style-name="T575"><text:s/>langgraph.graph<text:s/></text:span><text:span text:style-name="T576">import</text:span><text:span text:style-name="T577"><text:s/>StateGraph, START, END</text:span></text:p>
      <text:p text:style-name="P578"><text:span text:style-name="T579">from</text:span><text:span text:style-name="T580"><text:s/>langgraph.types<text:s/></text:span><text:span text:style-name="T581">import</text:span><text:span text:style-name="T582"><text:s/>interrupt, Command</text:span></text:p>
      <text:p text:style-name="P583"><text:span text:style-name="T584">from</text:span><text:span text:style-name="T585"><text:s/>langgraph.func<text:s/></text:span><text:span text:style-name="T586">import</text:span><text:span text:style-name="T587"><text:s/>entrypoint</text:span></text:p>
      <text:p text:style-name="P588"><text:span text:style-name="T589">from</text:span><text:span text:style-name="T590"><text:s/>langgraph.store.base<text:s/></text:span><text:span text:style-name="T591">import</text:span><text:span text:style-name="T592"><text:s/>BaseStore</text:span></text:p>
      <text:p text:style-name="P593"/>
      <text:p text:style-name="P594"><text:span text:style-name="T595">from</text:span><text:span text:style-name="T596"><text:s/>tools_setup<text:s/></text:span><text:span text:style-name="T597">import</text:span><text:span text:style-name="T598"><text:s/>model_with_tools, tools_by_name</text:span></text:p>
      <text:p text:style-name="P599"/>
      <text:p text:style-name="P600"><text:span text:style-name="T601">@entrypoint(store=...)  </text:span><text:span text:style-name="T602"># pass a store instance here</text:span></text:p>
      <text:p text:style-name="P603"><text:span text:style-name="T604">def</text:span><text:span text:style-name="T605"><text:s/>workflow(user_input: dict, *, store: BaseStore):</text:span></text:p>
      <text:p text:style-name="P606"><text:span text:style-name="T607">   <text:s/></text:span><text:span text:style-name="T608"># store.get(...) store.put(...) style operations happens here</text:span></text:p>
      <text:p text:style-name="P609"><text:span text:style-name="T610">   <text:s/></text:span><text:span text:style-name="T611">return</text:span><text:span text:style-name="T612"><text:s/>{</text:span><text:span text:style-name="T613">"ok"</text:span><text:span text:style-name="T614">:<text:s/></text:span><text:span text:style-name="T615">True</text:span><text:span text:style-name="T616">}</text:span></text:p>
      <text:p text:style-name="P617"/>
      <text:p text:style-name="P618"><text:span text:style-name="T619">class</text:span><text:span text:style-name="T620"><text:s/>AgentState(TypedDict):</text:span></text:p>
      <text:p text:style-name="P621">    messages: Annotated[list[AnyMessage], add]</text:p>
      <text:p text:style-name="P622">    llm_calls: int</text:p>
      <text:p text:style-name="P623"/>
      <text:p text:style-name="P624"><text:span text:style-name="T625">def</text:span><text:span text:style-name="T626"><text:s/>llm_call(state: AgentState):</text:span></text:p>
      <text:p text:style-name="P627"><text:span text:style-name="T628">   <text:s/></text:span><text:span text:style-name="T629">"""LLM decides whether to call tools or respond."""</text:span></text:p>
      <text:p text:style-name="P630">    response = model_with_tools.invoke(</text:p>
      <text:p text:style-name="P631"><text:span text:style-name="T632">        [SystemMessage(content=</text:span><text:span text:style-name="T633">"You are a helpful assistant that solves arithmetic problem using tools when needed."</text:span><text:span text:style-name="T634">)]</text:span></text:p>
      <text:p text:style-name="P635"><text:span text:style-name="T636">        + state[</text:span><text:span text:style-name="T637">"messages"</text:span><text:span text:style-name="T638">]</text:span></text:p>
      <text:p text:style-name="P639">    )</text:p>
      <text:p text:style-name="P640"/>
      <text:p text:style-name="P641"><text:span text:style-name="T642">   <text:s/></text:span><text:span text:style-name="T643">return</text:span><text:span text:style-name="T644"><text:s/>{</text:span></text:p>
      <text:p text:style-name="P645"><text:span text:style-name="T646">       <text:s/></text:span><text:span text:style-name="T647">"messages"</text:span><text:span text:style-name="T648">: [response],</text:span></text:p>
      <text:p text:style-name="P649"><text:span text:style-name="T650">       <text:s/></text:span><text:span text:style-name="T651">"llm_calls"</text:span><text:span text:style-name="T652">: state.get(</text:span><text:span text:style-name="T653">"llm_calls"</text:span><text:span text:style-name="T654">,<text:s/></text:span><text:span text:style-name="T655">0</text:span><text:span text:style-name="T656">) +<text:s/></text:span><text:span text:style-name="T657">1</text:span><text:span text:style-name="T658">,</text:span></text:p>
      <text:p text:style-name="P659">    }</text:p>
      <text:p text:style-name="P660"/>
      <text:p text:style-name="P661"><text:span text:style-name="T662">def</text:span><text:span text:style-name="T663"><text:s/>tool_node(state: AgentState):</text:span></text:p>
      <text:p text:style-name="P664"><text:span text:style-name="T665">   <text:s/></text:span><text:span text:style-name="T666">"""Execute tool calls from last AI message."""</text:span></text:p>
      <text:p text:style-name="P667"><text:span text:style-name="T668">    last = state[</text:span><text:span text:style-name="T669">"messages"</text:span><text:span text:style-name="T670">][-</text:span><text:span text:style-name="T671">1</text:span><text:span text:style-name="T672">]</text:span></text:p>
      <text:p text:style-name="P673">    results = []</text:p>
      <text:p text:style-name="P674"/>
      <text:soft-page-break/>
      <text:p text:style-name="P675"><text:span text:style-name="T676">   <text:s/></text:span><text:span text:style-name="T677">for</text:span><text:span text:style-name="T678"><text:s/>call<text:s/></text:span><text:span text:style-name="T679">in</text:span><text:span text:style-name="T680"><text:s/>last.tool_calls:</text:span></text:p>
      <text:p text:style-name="P681"><text:span text:style-name="T682">        tool = tools_by_name[call[</text:span><text:span text:style-name="T683">"name"</text:span><text:span text:style-name="T684">]]</text:span></text:p>
      <text:p text:style-name="P685"><text:span text:style-name="T686">        observation = tool.invoke(call[</text:span><text:span text:style-name="T687">"args"</text:span><text:span text:style-name="T688">])</text:span></text:p>
      <text:p text:style-name="P689"><text:span text:style-name="T690">        results.append(ToolMessage(content=str(observation), tool_call_id=call[</text:span><text:span text:style-name="T691">"id"</text:span><text:span text:style-name="T692">]))</text:span></text:p>
      <text:p text:style-name="P693"/>
      <text:p text:style-name="P694"><text:span text:style-name="T695">   <text:s/></text:span><text:span text:style-name="T696">return</text:span><text:span text:style-name="T697"><text:s/>{</text:span><text:span text:style-name="T698">"messages"</text:span><text:span text:style-name="T699">: results}</text:span></text:p>
      <text:p text:style-name="P700"/>
      <text:p text:style-name="P701"><text:span text:style-name="T702">def</text:span><text:span text:style-name="T703"><text:s/>should_continue(state: AgentState) -&gt; Literal[</text:span><text:span text:style-name="T704">"approve"</text:span><text:span text:style-name="T705">, END]:</text:span></text:p>
      <text:p text:style-name="P706"><text:span text:style-name="T707">    last = state[</text:span><text:span text:style-name="T708">"messages"</text:span><text:span text:style-name="T709">][-</text:span><text:span text:style-name="T710">1</text:span><text:span text:style-name="T711">]</text:span></text:p>
      <text:p text:style-name="P712"/>
      <text:p text:style-name="P713"><text:span text:style-name="T714">   <text:s/></text:span><text:span text:style-name="T715">if</text:span><text:span text:style-name="T716"><text:s/>getattr(last,<text:s/></text:span><text:span text:style-name="T717">"tool_calls"</text:span><text:span text:style-name="T718">,<text:s/></text:span><text:span text:style-name="T719">None</text:span><text:span text:style-name="T720">)<text:s/></text:span><text:span text:style-name="T721">and</text:span><text:span text:style-name="T722"><text:s/>last.tool_calls:</text:span></text:p>
      <text:p text:style-name="P723"><text:span text:style-name="T724">       <text:s/></text:span><text:span text:style-name="T725">return</text:span><text:span text:style-name="T726"><text:s/></text:span><text:span text:style-name="T727">"approve"</text:span></text:p>
      <text:p text:style-name="P728"><text:span text:style-name="T729">   <text:s/></text:span><text:span text:style-name="T730">return</text:span><text:span text:style-name="T731"><text:s/>END</text:span></text:p>
      <text:p text:style-name="P732"/>
      <text:p text:style-name="P733"><text:span text:style-name="T734">def</text:span><text:span text:style-name="T735"><text:s/>approve_node(state: AgentState) -&gt; Command[Literal[</text:span><text:span text:style-name="T736">"tool_node"</text:span><text:span text:style-name="T737">,<text:s/></text:span><text:span text:style-name="T738">"__end__"</text:span><text:span text:style-name="T739">]]:</text:span></text:p>
      <text:p text:style-name="P740"><text:span text:style-name="T741">    decision = interrupt({</text:span><text:span text:style-name="T742">"question"</text:span><text:span text:style-name="T743">:<text:s/></text:span><text:span text:style-name="T744">"Approve tool execution?"</text:span><text:span text:style-name="T745">,<text:s/></text:span><text:span text:style-name="T746">"tool_calls"</text:span><text:span text:style-name="T747">: state[</text:span><text:span text:style-name="T748">"messages"</text:span><text:span text:style-name="T749">][-</text:span><text:span text:style-name="T750">1</text:span><text:span text:style-name="T751">].tool_calls})</text:span></text:p>
      <text:p text:style-name="P752"><text:span text:style-name="T753">   <text:s/></text:span><text:span text:style-name="T754">return</text:span><text:span text:style-name="T755"><text:s/>Command(goto=</text:span><text:span text:style-name="T756">"tool_node"</text:span><text:span text:style-name="T757"><text:s/></text:span><text:span text:style-name="T758">if</text:span><text:span text:style-name="T759"><text:s/>decision<text:s/></text:span><text:span text:style-name="T760">else</text:span><text:span text:style-name="T761"><text:s/>END)</text:span></text:p>
      <text:p text:style-name="P762"/>
      <text:p text:style-name="P763">builder = StateGraph(AgentState)</text:p>
      <text:p text:style-name="P764"/>
      <text:p text:style-name="P765"><text:span text:style-name="T766">builder.add_node(</text:span><text:span text:style-name="T767">"llm_call"</text:span><text:span text:style-name="T768">, llm_call)</text:span></text:p>
      <text:p text:style-name="P769"><text:span text:style-name="T770">builder.add_node(</text:span><text:span text:style-name="T771">"approve"</text:span><text:span text:style-name="T772">, approve_node)</text:span></text:p>
      <text:p text:style-name="P773"><text:span text:style-name="T774">builder.add_node(</text:span><text:span text:style-name="T775">"tool_node"</text:span><text:span text:style-name="T776">, tool_node)</text:span></text:p>
      <text:p text:style-name="P777"/>
      <text:p text:style-name="P778">checkpointer = InMemorySaver()</text:p>
      <text:p text:style-name="P779"/>
      <text:p text:style-name="P780"><text:span text:style-name="T781">builder.add_edge(START,<text:s/></text:span><text:span text:style-name="T782">"llm_call"</text:span><text:span text:style-name="T783">)</text:span></text:p>
      <text:p text:style-name="P784"><text:span text:style-name="T785">builder.add_conditional_edges(</text:span><text:span text:style-name="T786">"llm_call"</text:span><text:span text:style-name="T787">, should_continue, [</text:span><text:span text:style-name="T788">"approve"</text:span><text:span text:style-name="T789">, END])</text:span></text:p>
      <text:p text:style-name="P790"><text:span text:style-name="T791">builder.add_edge(</text:span><text:span text:style-name="T792">"tool_node"</text:span><text:span text:style-name="T793">,<text:s/></text:span><text:span text:style-name="T794">"llm_call"</text:span><text:span text:style-name="T795">)</text:span></text:p>
      <text:p text:style-name="P796"/>
      <text:p text:style-name="P797">agent = builder.compile(checkpointer=checkpointer)</text:p>
      <text:p text:style-name="P798"/>
      <text:p text:style-name="P799"><text:span text:style-name="T800">config = {</text:span><text:span text:style-name="T801">"configurable"</text:span><text:span text:style-name="T802">: {</text:span><text:span text:style-name="T803">"thread_id"</text:span><text:span text:style-name="T804">:<text:s/></text:span><text:span text:style-name="T805">"thread-1"</text:span><text:span text:style-name="T806">}}</text:span></text:p>
      <text:p text:style-name="P807"/>
      <text:p text:style-name="P808"><text:span text:style-name="T809">result = agent.invoke({</text:span><text:span text:style-name="T810">"messages"</text:span><text:span text:style-name="T811">: [HumanMessage(content=</text:span><text:span text:style-name="T812">"Add 3 and 4."</text:span><text:span text:style-name="T813">)],<text:s/></text:span><text:span text:style-name="T814">"llm_calls"</text:span><text:span text:style-name="T815">:<text:s/></text:span><text:span text:style-name="T816">0</text:span><text:span text:style-name="T817">}, config=config)</text:span></text:p>
      <text:p text:style-name="P818"/>
      <text:p text:style-name="P819"><text:span text:style-name="T820"># print("Final:", result["messages"][-1])</text:span></text:p>
      <text:p text:style-name="P821"><text:span text:style-name="T822">#</text:span></text:p>
      <text:p text:style-name="P823"><text:span text:style-name="T824"># snap = agent.get_state(config)</text:span></text:p>
      <text:p text:style-name="P825"><text:span text:style-name="T826">#</text:span></text:p>
      <text:p text:style-name="P827"><text:span text:style-name="T828"># print("Latest checkpoint next:", snap.next)</text:span></text:p>
      <text:p text:style-name="P829"><text:span text:style-name="T830">#</text:span></text:p>
      <text:soft-page-break/>
      <text:p text:style-name="P831"><text:span text:style-name="T832"># history = list(agent.get_state_history(config))</text:span></text:p>
      <text:p text:style-name="P833"><text:span text:style-name="T834"># print("Number of checkpoints:", len(history))</text:span></text:p>
      <text:p text:style-name="P835"><text:span text:style-name="T836"># print("Most recent checkpoint id:", history[0].config["configurable"]["checkpoint_id"])</text:span></text:p>
      <text:p text:style-name="P837"/>
      <text:p text:style-name="P838"><text:span text:style-name="T839">print(</text:span><text:span text:style-name="T840">"Interrupt payload:"</text:span><text:span text:style-name="T841">, result[</text:span><text:span text:style-name="T842">"__interrupt__"</text:span><text:span text:style-name="T843">][</text:span><text:span text:style-name="T844">0</text:span><text:span text:style-name="T845">].value)</text:span></text:p>
      <text:p text:style-name="P846"/>
      <text:p text:style-name="P847"><text:span text:style-name="T848">resume = agent.invoke(Command(resume=</text:span><text:span text:style-name="T849">True</text:span><text:span text:style-name="T850">), config=config)</text:span></text:p>
      <text:p text:style-name="P851"><text:span text:style-name="T852">print(</text:span><text:span text:style-name="T853">"Done. Last message:"</text:span><text:span text:style-name="T854">, resume[</text:span><text:span text:style-name="T855">"messages"</text:span><text:span text:style-name="T856">][-</text:span><text:span text:style-name="T857">1</text:span><text:span text:style-name="T858">])</text:span></text:p>
      <text:p text:style-name="P859"/>
      <text:p text:style-name="P860"><text:span text:style-name="T861"># print("Final:", result["messages"][-1])</text:span></text:p>
      <text:p text:style-name="P862"><text:span text:style-name="T863">#</text:span></text:p>
      <text:p text:style-name="P864"><text:span text:style-name="T865"># snap = agent.get_state(config)</text:span></text:p>
      <text:p text:style-name="P866"><text:span text:style-name="T867">#</text:span></text:p>
      <text:p text:style-name="P868"><text:span text:style-name="T869"># print("Latest checkpoint next:", snap.next)</text:span></text:p>
      <text:p text:style-name="P870"><text:span text:style-name="T871">#</text:span></text:p>
      <text:p text:style-name="P872"><text:span text:style-name="T873"># history = list(agent.get_state_history(config))</text:span></text:p>
      <text:p text:style-name="P874"><text:span text:style-name="T875"># print("Number of checkpoints:", len(history))</text:span></text:p>
      <text:p text:style-name="P876"><text:span text:style-name="T877"># print("Most recent checkpoint id:", history[0].config["configurable"]["checkpoint_id"])</text:span></text:p>
      <text:p text:style-name="P878"/>
      <text:p text:style-name="P879"><text:span text:style-name="T880">config_reject = {</text:span><text:span text:style-name="T881">"configurable"</text:span><text:span text:style-name="T882">: {</text:span><text:span text:style-name="T883">"thread_id"</text:span><text:span text:style-name="T884">:<text:s/></text:span><text:span text:style-name="T885">"thread-1-reject"</text:span><text:span text:style-name="T886">}}</text:span></text:p>
      <text:p text:style-name="P887"/>
      <text:p text:style-name="P888"><text:span text:style-name="T889">result = agent.invoke({</text:span><text:span text:style-name="T890">"messages"</text:span><text:span text:style-name="T891">: [HumanMessage(content=</text:span><text:span text:style-name="T892">"Multiply 30 and 41."</text:span><text:span text:style-name="T893">)],<text:s/></text:span><text:span text:style-name="T894">"llm_calls"</text:span><text:span text:style-name="T895">:<text:s/></text:span><text:span text:style-name="T896">0</text:span><text:span text:style-name="T897">}, config=config_reject)</text:span></text:p>
      <text:p text:style-name="P898"/>
      <text:p text:style-name="P899"><text:span text:style-name="T900">print(</text:span><text:span text:style-name="T901">"Interrupt payload:"</text:span><text:span text:style-name="T902">, result[</text:span><text:span text:style-name="T903">"__interrupt__"</text:span><text:span text:style-name="T904">][</text:span><text:span text:style-name="T905">0</text:span><text:span text:style-name="T906">].value)</text:span></text:p>
      <text:p text:style-name="P907"/>
      <text:p text:style-name="P908"><text:span text:style-name="T909">resume = agent.invoke(Command(resume=</text:span><text:span text:style-name="T910">False</text:span><text:span text:style-name="T911">), config=config_reject)</text:span></text:p>
      <text:p text:style-name="P912"><text:span text:style-name="T913">print(</text:span><text:span text:style-name="T914">"Done. Last message:"</text:span><text:span text:style-name="T915">, resume[</text:span><text:span text:style-name="T916">"messages"</text:span><text:span text:style-name="T917">][-</text:span><text:span text:style-name="T918">1</text:span><text:span text:style-name="T919">])</text:span></text:p>
      <text:p text:style-name="P920"/>
      <text:p text:style-name="P921">history = list(agent.get_state_history(config_reject))</text:p>
      <text:p text:style-name="P922"><text:span text:style-name="T923">picked = history[</text:span><text:span text:style-name="T924">1</text:span><text:span text:style-name="T925">]</text:span></text:p>
      <text:p text:style-name="P926"/>
      <text:p text:style-name="P927">new_config = agent.update_state(picked.config,</text:p>
      <text:p text:style-name="P928"><text:span text:style-name="T929">                                values={</text:span><text:span text:style-name="T930">"messages"</text:span><text:span text:style-name="T931">: [HumanMessage(content=</text:span><text:span text:style-name="T932">"Multiply 30 and 41."</text:span><text:span text:style-name="T933">)],<text:s/></text:span><text:span text:style-name="T934">"llm_calls"</text:span><text:span text:style-name="T935">:<text:s/></text:span><text:span text:style-name="T936">0</text:span><text:span text:style-name="T937">})</text:span></text:p>
      <text:p text:style-name="P938"><text:span text:style-name="T939">forked = agent.invoke(</text:span><text:span text:style-name="T940">None</text:span><text:span text:style-name="T941">, new_config)<text:s/></text:span><text:span text:style-name="T942">#relance le graphe depuis un point historique</text:span></text:p>
      <text:p text:style-name="P943"><text:span text:style-name="T944">print(</text:span><text:span text:style-name="T945">"Forked:"</text:span><text:span text:style-name="T946">, forked)</text:span></text:p>
      <text:p text:style-name="P9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fo:color="#365F9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fo:color="#365F9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365F9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365F9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365F9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365F9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365F9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365F9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fo:margin-bottom="0.0555in" fo:line-height="100%"/>
      <style:text-properties style:font-name="Cambria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365F91"/>
    </style:style>
    <style:style style:name="Citationintense" style:display-name="Citation intens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365F9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365F91" fo:letter-spacing="0.0034in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fo:hyphenate="false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style:vertical-align="auto" fo:margin-top="0.1666in" fo:margin-bottom="0in" fo:line-height="104%"/>
      <style:text-properties style:font-name="Calibri Light" fo:color="#2F5496" fo:font-size="16pt" style:font-size-asian="16pt" style:font-size-complex="16pt" fo:language="fr" fo:country="MA" style:language-asian="fr" style:country-asian="MA" fo:hyphenate="tru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En-tête" style:family="paragraph">
      <style:paragraph-properties>
        <style:tab-stops>
          <style:tab-stop style:type="center" style:position="3.15in"/>
        </style:tab-stops>
      </style:paragraph-properties>
    </style:style>
    <style:style style:name="T3" style:parent-style-name="Policepardéfaut" style:family="text">
      <style:text-properties fo:language="en" fo:country="US"/>
    </style:style>
    <style:style style:name="T4" style:parent-style-name="Policepardéfaut" style:family="text">
      <style:text-properties fo:language="en" fo:country="US"/>
    </style:style>
  </office:automatic-styles>
  <office:master-styles>
    <style:master-page style:name="MP0" style:page-layout-name="PL0">
      <style:header>
        <text:p text:style-name="P2"><text:span text:style-name="T3">SMA et IAD</text:span><text:span text:style-name="T4"><text:tab/>Master SDIA Prof. RETAL SARA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User Ob</meta:initial-creator>
    <dc:creator>user</dc:creator>
    <meta:creation-date>2025-03-18T10:48:00Z</meta:creation-date>
    <dc:date>2026-06-05T13:53:00Z</dc:date>
    <meta:print-date>2026-04-15T10:10:00Z</meta:print-date>
    <meta:template xlink:href="Normal" xlink:type="simple"/>
    <meta:editing-cycles>48</meta:editing-cycles>
    <meta:editing-duration>PT39000S</meta:editing-duration>
    <meta:document-statistic meta:page-count="9" meta:paragraph-count="20" meta:word-count="1550" meta:character-count="10060" meta:row-count="71" meta:non-whitespace-character-count="8530"/>
  </office:meta>
</office:document-meta>
</file>