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10" style:parent-style-name="Policepardéfaut" style:family="text">
      <style:text-properties fo:language="fr" fo:country="FR"/>
    </style:style>
    <style:style style:name="P11" style:parent-style-name="Normal" style:family="paragraph">
      <style:text-properties style:language-asian="fr" style:country-asian="MA"/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3" style:parent-style-name="Lienhypertexte" style:family="text">
      <style:text-properties fo:language="fr" fo:country="MA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fo:language="fr" fo:country="MA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7" style:parent-style-name="Lienhypertexte" style:family="text">
      <style:text-properties fo:language="fr" fo:country="MA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9" style:parent-style-name="Lienhypertexte" style:family="text">
      <style:text-properties fo:language="fr" fo:country="MA"/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1" style:parent-style-name="Lienhypertexte" style:family="text">
      <style:text-properties fo:language="fr" fo:country="MA" style:language-asian="fr" style:country-asian="MA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fo:language="fr" fo:country="MA" style:language-asian="fr" style:country-asian="MA"/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5" style:parent-style-name="Lienhypertexte" style:family="text">
      <style:text-properties fo:language="fr" fo:country="MA" style:language-asian="fr" style:country-asian="MA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P27" style:parent-style-name="Titre2" style:family="paragraph">
      <style:text-properties fo:font-size="20pt" style:font-size-asian="20pt" style:font-size-complex="20pt"/>
    </style:style>
    <style:style style:name="P28" style:parent-style-name="Titre2" style:family="paragraph">
      <style:text-properties fo:font-size="20pt" style:font-size-asian="20pt" style:font-size-complex="20pt"/>
    </style:style>
    <style:style style:name="T29" style:parent-style-name="Policepardéfaut" style:family="text">
      <style:text-properties fo:language="fr" fo:country="MA"/>
    </style:style>
    <style:style style:name="P3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 fo:hyphenate="true"/>
    </style:style>
    <style:style style:name="P3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4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4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P4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4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47" style:parent-style-name="Policepardéfaut" style:family="text">
      <style:text-properties fo:language="fr" fo:country="MA"/>
    </style:style>
    <style:style style:name="P4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5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5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5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5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5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5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5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6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6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63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6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6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6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7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7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7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7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7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7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7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7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8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8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8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8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87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89" style:parent-style-name="Normal" style:family="paragraph">
      <style:text-properties fo:language="fr" fo:country="MA"/>
    </style:style>
    <style:style style:name="T90" style:parent-style-name="Policepardéfaut" style:family="text">
      <style:text-properties fo:language="fr" fo:country="MA"/>
    </style:style>
    <style:style style:name="T91" style:parent-style-name="Policepardéfaut" style:family="text">
      <style:text-properties fo:language="fr" fo:country="MA"/>
    </style:style>
    <style:style style:name="T92" style:parent-style-name="Policepardéfaut" style:family="text">
      <style:text-properties fo:language="fr" fo:country="MA"/>
    </style:style>
    <style:style style:name="T93" style:parent-style-name="Policepardéfaut" style:family="text">
      <style:text-properties fo:language="fr" fo:country="MA"/>
    </style:style>
    <style:style style:name="P9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0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0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0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0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10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0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1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1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1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1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1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1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1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2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2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2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3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3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3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3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3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2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1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4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45" style:parent-style-name="Titre1" style:family="paragraph">
      <style:text-properties fo:language="fr" fo:country="MA"/>
    </style:style>
    <style:style style:name="P146" style:parent-style-name="Normal" style:family="paragraph">
      <style:text-properties fo:language="fr" fo:country="MA"/>
    </style:style>
    <style:style style:name="P14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4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5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5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5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5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6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6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6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64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16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6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67" style:parent-style-name="Titre1" style:family="paragraph">
      <style:text-properties fo:language="fr" fo:country="MA" style:language-asian="fr" style:country-asian="MA"/>
    </style:style>
    <style:style style:name="P168" style:parent-style-name="Normal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language="fr" fo:country="MA" style:language-asian="fr" style:country-asian="MA" fo:hyphenate="true"/>
    </style:style>
    <style:style style:name="P169" style:parent-style-name="Normal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language="fr" fo:country="MA" style:language-asian="fr" style:country-asian="MA" fo:hyphenate="true"/>
    </style:style>
    <style:style style:name="P17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7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7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7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7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7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8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84" style:parent-style-name="Titre1" style:family="paragraph">
      <style:text-properties fo:language="fr" fo:country="MA" style:language-asian="fr" style:country-asian="MA"/>
    </style:style>
    <style:style style:name="P185" style:parent-style-name="Titre1" style:family="paragraph">
      <style:text-properties fo:language="fr" fo:country="MA" style:language-asian="fr" style:country-asian="MA"/>
    </style:style>
    <style:style style:name="P18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9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9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9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9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0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0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0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0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2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1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1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2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2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2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24" style:parent-style-name="Normal" style:family="paragraph">
      <style:text-properties fo:language="en" fo:country="US" style:language-asian="fr" style:country-asian="MA"/>
    </style:style>
    <style:style style:name="P22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2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2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2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3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3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3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3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3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3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3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4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4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4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4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4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4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4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4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5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5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5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5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5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6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6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6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6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6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6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6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6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70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27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72" style:parent-style-name="Normal" style:family="paragraph">
      <style:text-properties fo:language="fr" fo:country="MA"/>
    </style:style>
    <style:style style:name="P273" style:parent-style-name="Titre1" style:family="paragraph">
      <style:text-properties fo:language="fr" fo:country="MA" style:language-asian="fr" style:country-asian="MA"/>
    </style:style>
    <style:style style:name="P274" style:parent-style-name="Normal" style:family="paragraph">
      <style:text-properties fo:language="fr" fo:country="MA" style:language-asian="fr" style:country-asian="MA"/>
    </style:style>
    <style:style style:name="P275" style:parent-style-name="Normal" style:family="paragraph">
      <style:text-properties fo:language="fr" fo:country="MA" style:language-asian="fr" style:country-asian="MA"/>
    </style:style>
    <style:style style:name="P276" style:parent-style-name="Titre1" style:family="paragraph">
      <style:text-properties fo:language="fr" fo:country="MA" style:language-asian="fr" style:country-asian="MA"/>
    </style:style>
    <style:style style:name="P277" style:parent-style-name="Normal" style:family="paragraph">
      <style:text-properties fo:language="fr" fo:country="MA"/>
    </style:style>
    <style:style style:name="P27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8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8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8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2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8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9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9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0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0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0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30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0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0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0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0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0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1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1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1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1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1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1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2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2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2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2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2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2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2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2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3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3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33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3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35" style:parent-style-name="Normal" style:family="paragraph">
      <style:text-properties fo:language="fr" fo:country="MA"/>
    </style:style>
    <style:style style:name="P336" style:parent-style-name="Normal" style:family="paragraph">
      <style:text-properties fo:language="fr" fo:country="MA"/>
    </style:style>
    <style:style style:name="P33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3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4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4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4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4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4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5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5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5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5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5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58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3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60" style:parent-style-name="Normal" style:family="paragraph">
      <style:text-properties fo:language="fr" fo:country="MA"/>
    </style:style>
  </office:automatic-styles>
  <office:body>
    <office:text text:use-soft-page-breaks="true">
      <text:p text:style-name="P1"><text:span text:style-name="T5">LAB :</text:span><text:span text:style-name="T6"><text:s/></text:span><text:span text:style-name="T7">L’état et le contexte d’un agent</text:span></text:p>
      <text:p text:style-name="P8"/>
      <text:p text:style-name="P9"/>
      <text:p text:style-name="En-têtedetabledesmatières"><text:span text:style-name="T10">Table des matières</text:span></text:p>
      <text:p text:style-name="P1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227080786" office:target-frame-name="_top" xlink:show="replace"><text:span text:style-name="T13">PARTIE 1 :<text:s/></text:span><text:span text:style-name="Lienhypertexte">Définir une classe de contexte structurée appelée ColourContext</text:span><text:tab/>2</text:a></text:p>
          <text:p text:style-name="P14"><text:a xlink:href="#_Toc227080787" office:target-frame-name="_top" xlink:show="replace"><text:span text:style-name="T15">PARTIE 2 :<text:s/></text:span><text:span text:style-name="Lienhypertexte">Agent sans contexte</text:span><text:tab/>2</text:a></text:p>
          <text:p text:style-name="P16"><text:a xlink:href="#_Toc227080788" office:target-frame-name="_top" xlink:show="replace"><text:span text:style-name="T17">PARTIE 3 : Agent avec contexte</text:span><text:tab/>2</text:a></text:p>
          <text:p text:style-name="P18"><text:a xlink:href="#_Toc227080789" office:target-frame-name="_top" xlink:show="replace"><text:span text:style-name="T19">PARTIE 4 : Changement de contexte</text:span><text:tab/>3</text:a></text:p>
          <text:p text:style-name="P20"><text:a xlink:href="#_Toc227080790" office:target-frame-name="_top" xlink:show="replace"><text:span text:style-name="T21">PARTIE 5 : Définir un état personnalisé d’agent en héritant de AgentState</text:span><text:tab/>3</text:a></text:p>
          <text:p text:style-name="P22"><text:a xlink:href="#_Toc227080791" office:target-frame-name="_top" xlink:show="replace"><text:span text:style-name="T23">PARTIE 6 : Agent qui modifie un état</text:span><text:tab/>4</text:a></text:p>
          <text:p text:style-name="P24"><text:a xlink:href="#_Toc227080792" office:target-frame-name="_top" xlink:show="replace"><text:span text:style-name="T25">PARTIE 6 : Agent qui récupère un état</text:span><text:tab/>5</text:a></text:p>
        </text:index-body>
      </text:table-of-content>
      <text:p text:style-name="Normal"/>
      <text:p text:style-name="P26"/>
      <text:h text:style-name="Titre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226121170"/></text:h>
      <text:p text:style-name="Normal"/>
      <text:p text:style-name="Normal"/>
      <text:p text:style-name="Normal"/>
      <text:h text:style-name="P27" text:outline-level="2"><text:bookmark-start text:name="_Toc226121171"/><text:bookmark-end text:name="_Toc226121170"/></text:h>
      <text:p text:style-name="Normal"/>
      <text:h text:style-name="P28" text:outline-level="2"/>
      <text:h text:style-name="Titre1" text:outline-level="1"><text:bookmark-start text:name="_Toc226122703"/><text:bookmark-start text:name="_Toc227065606"/><text:bookmark-start text:name="_Toc227067572"/><text:bookmark-start text:name="_Toc227080786"/><text:span text:style-name="T29">PARTIE 1 :<text:s/></text:span><text:bookmark-end text:name="_Toc226122703"/><text:bookmark-end text:name="_Toc227065606"/><text:bookmark-end text:name="_Toc227067572"/>Définir<text:s/>une classe de contexte structurée appelée ColourContext<text:bookmark-end text:name="_Toc227080786"/><text:s/></text:h>
      <text:p text:style-name="P30"><text:bookmark-end text:name="_Toc226121171"/></text:p>
      <text:p text:style-name="P31"><text:span text:style-name="T32">from</text:span><text:span text:style-name="T33"><text:s/>dataclasses<text:s/></text:span><text:span text:style-name="T34">import</text:span><text:span text:style-name="T35"><text:s/>dataclass</text:span></text:p>
      <text:p text:style-name="P36"/>
      <text:p text:style-name="P37">@dataclass</text:p>
      <text:p text:style-name="P38"><text:span text:style-name="T39">class</text:span><text:span text:style-name="T40"><text:s/>ColourContext:</text:span></text:p>
      <text:p text:style-name="P41"><text:span text:style-name="T42">    favourite_colour: str =<text:s/></text:span><text:span text:style-name="T43">"blue"</text:span></text:p>
      <text:p text:style-name="P44"><text:span text:style-name="T45">    least_favourite_colour: str =<text:s/></text:span><text:span text:style-name="T46">"yellow"</text:span></text:p>
      <text:p text:style-name="Normal"/>
      <text:h text:style-name="Titre1" text:outline-level="1"><text:bookmark-start text:name="_Toc227065607"/><text:bookmark-start text:name="_Toc227067573"/><text:bookmark-start text:name="_Toc227080787"/><text:span text:style-name="T47">PARTIE 2 :<text:s/></text:span><text:bookmark-end text:name="_Toc227065607"/><text:bookmark-end text:name="_Toc227067573"/>Agent sans contexte<text:bookmark-end text:name="_Toc227080787"/><text:s/></text:h>
      <text:p text:style-name="P48"><text:span text:style-name="T49">from</text:span><text:span text:style-name="T50"><text:s/>langchain_ollama<text:s/></text:span><text:span text:style-name="T51">import</text:span><text:span text:style-name="T52"><text:s/>ChatOllama</text:span></text:p>
      <text:p text:style-name="P53"><text:span text:style-name="T54">from</text:span><text:span text:style-name="T55"><text:s/>langchain.agents<text:s/></text:span><text:span text:style-name="T56">import</text:span><text:span text:style-name="T57"><text:s/>create_agent</text:span></text:p>
      <text:p text:style-name="P58">model = ChatOllama(</text:p>
      <text:p text:style-name="P59"><text:span text:style-name="T60">    model=</text:span><text:span text:style-name="T61">"llama3.2:3b"</text:span><text:span text:style-name="T62">,  <text:s/></text:span><text:span text:style-name="T63"># ou mistral, gemma, etc.</text:span></text:p>
      <text:p text:style-name="P64">   <text:s/></text:p>
      <text:p text:style-name="P65">)</text:p>
      <text:p text:style-name="P66">agent = create_agent(model=model,</text:p>
      <text:p text:style-name="P67">context_schema=ColourContext)</text:p>
      <text:p text:style-name="Normal"/>
      <text:p text:style-name="Normal"/>
      <text:p text:style-name="P68"><text:span text:style-name="T69">from</text:span><text:span text:style-name="T70"><text:s/>langchain.messages<text:s/></text:span><text:span text:style-name="T71">import</text:span><text:span text:style-name="T72"><text:s/>HumanMessage</text:span></text:p>
      <text:p text:style-name="P73"/>
      <text:p text:style-name="P74">response = agent.invoke(</text:p>
      <text:p text:style-name="P75"><text:span text:style-name="T76">    {</text:span><text:span text:style-name="T77">"messages"</text:span><text:span text:style-name="T78">: [HumanMessage(content=</text:span><text:span text:style-name="T79">"What is my favourite colour?"</text:span><text:span text:style-name="T80">)]},</text:span></text:p>
      <text:p text:style-name="P81">    context=ColourContext()</text:p>
      <text:p text:style-name="P82">)</text:p>
      <text:p text:style-name="P83"><text:span text:style-name="T84">print(response[</text:span><text:span text:style-name="T85">'messages'</text:span><text:span text:style-name="T86">][-</text:span><text:span text:style-name="T87">1</text:span><text:span text:style-name="T88">].content)</text:span></text:p>
      <text:p text:style-name="P89"/>
      <text:h text:style-name="Titre1" text:outline-level="1"><text:bookmark-start text:name="_Toc227065608"/><text:bookmark-start text:name="_Toc227067574"/><text:bookmark-start text:name="_Toc227080788"/><text:span text:style-name="T90">PARTIE<text:s/></text:span><text:span text:style-name="T91">3</text:span><text:span text:style-name="T92"> :<text:s/></text:span><text:bookmark-end text:name="_Toc227065608"/><text:bookmark-end text:name="_Toc227067574"/><text:span text:style-name="T93">Agent avec contexte</text:span><text:bookmark-end text:name="_Toc227080788"/></text:h>
      <text:p text:style-name="P94"><text:bookmark-start text:name="_Toc227065609"/><text:bookmark-start text:name="_Toc227067575"/><text:span text:style-name="T95">from</text:span><text:span text:style-name="T96"><text:s/>langchain.tools<text:s/></text:span><text:span text:style-name="T97">import</text:span><text:span text:style-name="T98"><text:s/>tool, ToolRuntime</text:span></text:p>
      <text:p text:style-name="P99"/>
      <text:p text:style-name="P100">@tool</text:p>
      <text:p text:style-name="P101"><text:span text:style-name="T102">def</text:span><text:span text:style-name="T103"><text:s/>get_favourite_colour(runtime: ToolRuntime) -&gt; str:</text:span></text:p>
      <text:p text:style-name="P104"><text:span text:style-name="T105">   <text:s/></text:span><text:span text:style-name="T106">"""Get the favourite colour of the user"""</text:span></text:p>
      <text:p text:style-name="P107"><text:span text:style-name="T108">   <text:s/></text:span><text:span text:style-name="T109">return</text:span><text:span text:style-name="T110"><text:s/>runtime.context.favourite_colour</text:span></text:p>
      <text:p text:style-name="P111"/>
      <text:soft-page-break/>
      <text:p text:style-name="P112">@tool</text:p>
      <text:p text:style-name="P113"><text:span text:style-name="T114">def</text:span><text:span text:style-name="T115"><text:s/>get_least_favourite_colour(runtime: ToolRuntime) -&gt; str:</text:span></text:p>
      <text:p text:style-name="P116"><text:span text:style-name="T117">   <text:s/></text:span><text:span text:style-name="T118">"""Get the least favourite colour of the user"""</text:span></text:p>
      <text:p text:style-name="P119"><text:span text:style-name="T120">   <text:s/></text:span><text:span text:style-name="T121">return</text:span><text:span text:style-name="T122"><text:s/>runtime.context.least_favourite_colour</text:span></text:p>
      <text:p text:style-name="P123"/>
      <text:p text:style-name="P124">agent = create_agent(</text:p>
      <text:p text:style-name="P125">    model=model,</text:p>
      <text:p text:style-name="P126">    tools=[get_favourite_colour, get_least_favourite_colour],</text:p>
      <text:p text:style-name="P127">    context_schema=ColourContext</text:p>
      <text:p text:style-name="P128">)</text:p>
      <text:p text:style-name="P129">response = agent.invoke(</text:p>
      <text:p text:style-name="P130"><text:span text:style-name="T131">    {</text:span><text:span text:style-name="T132">"messages"</text:span><text:span text:style-name="T133">: [HumanMessage(content=</text:span><text:span text:style-name="T134">"What is my favourite colour?"</text:span><text:span text:style-name="T135">)]},</text:span></text:p>
      <text:p text:style-name="P136">    context=ColourContext()</text:p>
      <text:p text:style-name="P137">)</text:p>
      <text:p text:style-name="P138"><text:span text:style-name="T139">print(response[</text:span><text:span text:style-name="T140">'messages'</text:span><text:span text:style-name="T141">][-</text:span><text:span text:style-name="T142">1</text:span><text:span text:style-name="T143">].content)</text:span></text:p>
      <text:p text:style-name="P144"/>
      <text:h text:style-name="P145" text:outline-level="1"><text:bookmark-start text:name="_Toc227080789"/>PARTIE<text:s/>4 :<text:s/><text:bookmark-end text:name="_Toc227065609"/><text:bookmark-end text:name="_Toc227067575"/>Changement de contexte<text:bookmark-end text:name="_Toc227080789"/><text:s/></text:h>
      <text:p text:style-name="P146"/>
      <text:p text:style-name="P147">response = agent.invoke(</text:p>
      <text:p text:style-name="P148"><text:span text:style-name="T149">    {</text:span><text:span text:style-name="T150">"messages"</text:span><text:span text:style-name="T151">: [HumanMessage(content=</text:span><text:span text:style-name="T152">"What is my favourite colour?"</text:span><text:span text:style-name="T153">)]},</text:span></text:p>
      <text:p text:style-name="P154"><text:span text:style-name="T155">   <text:s/></text:span><text:span text:style-name="T156">context=ColourContext(favourite_colour=</text:span><text:span text:style-name="T157">"green"</text:span><text:span text:style-name="T158">)</text:span></text:p>
      <text:p text:style-name="P159">)</text:p>
      <text:p text:style-name="P160"><text:span text:style-name="T161">print(response[</text:span><text:span text:style-name="T162">'messages'</text:span><text:span text:style-name="T163">][-</text:span><text:span text:style-name="T164">1</text:span><text:span text:style-name="T165">].content)</text:span></text:p>
      <text:p text:style-name="P166"/>
      <text:h text:style-name="P167" text:outline-level="1"><text:bookmark-start text:name="_Toc227080790"/>PARTIE 5 : Définir<text:s/>un état personnalisé d’agent en héritant de AgentState<text:bookmark-end text:name="_Toc227080790"/></text:h>
      <text:p text:style-name="P168">AgentState<text:s/>est une<text:s/>structure de base utilisée par les agents LangChain<text:s/></text:p>
      <text:p text:style-name="P169">CustomState<text:s/>est<text:s/>notre<text:s/>état enrichi</text:p>
      <text:p text:style-name="P170"/>
      <text:p text:style-name="P171"><text:span text:style-name="T172">from</text:span><text:span text:style-name="T173"><text:s/>langchain.agents<text:s/></text:span><text:span text:style-name="T174">import</text:span><text:span text:style-name="T175"><text:s/>AgentState</text:span></text:p>
      <text:p text:style-name="P176"/>
      <text:p text:style-name="P177"><text:span text:style-name="T178">class</text:span><text:span text:style-name="T179"><text:s/>CustomState(AgentState):</text:span></text:p>
      <text:p text:style-name="P180"><text:span text:style-name="T181">   <text:s/></text:span><text:span text:style-name="T182">favourite_colour: str</text:span></text:p>
      <text:p text:style-name="P183"/>
      <text:p text:style-name="Normal"/>
      <text:h text:style-name="P184" text:outline-level="1"/>
      <text:h text:style-name="P185" text:outline-level="1"><text:bookmark-start text:name="_Toc227080791"/>PARTIE 6 :<text:s/>Agent qui modifie un état<text:bookmark-end text:name="_Toc227080791"/></text:h>
      <text:p text:style-name="P186"><text:span text:style-name="T187">from</text:span><text:span text:style-name="T188"><text:s/>langchain.tools<text:s/></text:span><text:span text:style-name="T189">import</text:span><text:span text:style-name="T190"><text:s/>tool, ToolRuntime</text:span></text:p>
      <text:p text:style-name="P191"><text:span text:style-name="T192">from</text:span><text:span text:style-name="T193"><text:s/>langgraph.types<text:s/></text:span><text:span text:style-name="T194">import</text:span><text:span text:style-name="T195"><text:s/>Command</text:span></text:p>
      <text:p text:style-name="P196"><text:span text:style-name="T197">from</text:span><text:span text:style-name="T198"><text:s/>langchain.messages<text:s/></text:span><text:span text:style-name="T199">import</text:span><text:span text:style-name="T200"><text:s/>ToolMessage</text:span></text:p>
      <text:p text:style-name="P201"/>
      <text:p text:style-name="P202">@tool</text:p>
      <text:p text:style-name="P203"><text:span text:style-name="T204">def</text:span><text:span text:style-name="T205"><text:s/>update_favourite_colour(favourite_colour: str, runtime: ToolRuntime) -&gt; Command:</text:span></text:p>
      <text:p text:style-name="P206"><text:span text:style-name="T207">   <text:s/></text:span><text:span text:style-name="T208">"""Update the favourite colour of the user in the state once they've revealed it."""</text:span></text:p>
      <text:p text:style-name="P209"><text:span text:style-name="T210">   <text:s/></text:span><text:span text:style-name="T211">return</text:span><text:span text:style-name="T212"><text:s/>Command(update={</text:span></text:p>
      <text:p text:style-name="P213"><text:span text:style-name="T214">       <text:s/></text:span><text:span text:style-name="T215">"favourite_colour"</text:span><text:span text:style-name="T216">: favourite_colour,<text:s/></text:span></text:p>
      <text:p text:style-name="P217"><text:span text:style-name="T218">       <text:s/></text:span><text:span text:style-name="T219">"messages"</text:span><text:span text:style-name="T220">: [ToolMessage(</text:span><text:span text:style-name="T221">"Successfully updated favourite colour"</text:span><text:span text:style-name="T222">, tool_call_id=runtime.tool_call_id)]}</text:span></text:p>
      <text:p text:style-name="P223">        )</text:p>
      <text:p text:style-name="P224"/>
      <text:p text:style-name="P225"><text:span text:style-name="T226">from</text:span><text:span text:style-name="T227"><text:s/>langchain.agents<text:s/></text:span><text:span text:style-name="T228">import</text:span><text:span text:style-name="T229"><text:s/>create_agent</text:span></text:p>
      <text:p text:style-name="P230"><text:span text:style-name="T231">from</text:span><text:span text:style-name="T232"><text:s/>langgraph.checkpoint.memory<text:s/></text:span><text:span text:style-name="T233">import</text:span><text:span text:style-name="T234"><text:s/>InMemorySaver</text:span></text:p>
      <text:p text:style-name="P235"/>
      <text:p text:style-name="P236">agent = create_agent(</text:p>
      <text:p text:style-name="P237">    model=model,</text:p>
      <text:p text:style-name="P238">    tools=[update_favourite_colour],</text:p>
      <text:p text:style-name="P239">    checkpointer=InMemorySaver(),</text:p>
      <text:p text:style-name="P240">    state_schema=CustomState</text:p>
      <text:p text:style-name="P241">)</text:p>
      <text:p text:style-name="P242"/>
      <text:p text:style-name="P243"><text:span text:style-name="T244">from</text:span><text:span text:style-name="T245"><text:s/>langchain.messages<text:s/></text:span><text:span text:style-name="T246">import</text:span><text:span text:style-name="T247"><text:s/>HumanMessage</text:span></text:p>
      <text:p text:style-name="P248"/>
      <text:p text:style-name="P249">response = agent.invoke(</text:p>
      <text:p text:style-name="P250"><text:span text:style-name="T251">    {<text:s/></text:span><text:span text:style-name="T252">"messages"</text:span><text:span text:style-name="T253">: [HumanMessage(content=</text:span><text:span text:style-name="T254">"My favourite colour is green"</text:span><text:span text:style-name="T255">)]},</text:span></text:p>
      <text:p text:style-name="P256"><text:span text:style-name="T257">   <text:s/></text:span><text:span text:style-name="T258">{</text:span><text:span text:style-name="T259">"configurable"</text:span><text:span text:style-name="T260">: {</text:span><text:span text:style-name="T261">"thread_id"</text:span><text:span text:style-name="T262">:<text:s/></text:span><text:span text:style-name="T263">"1"</text:span><text:span text:style-name="T264">}}</text:span></text:p>
      <text:p text:style-name="P265">)</text:p>
      <text:p text:style-name="P266"><text:span text:style-name="T267">print(response[</text:span><text:span text:style-name="T268">'messages'</text:span><text:span text:style-name="T269">][-</text:span><text:span text:style-name="T270">1</text:span><text:span text:style-name="T271">].content)</text:span></text:p>
      <text:p text:style-name="P272"/>
      <text:h text:style-name="P273" text:outline-level="1"/>
      <text:p text:style-name="P274"/>
      <text:p text:style-name="P275"/>
      <text:h text:style-name="P276" text:outline-level="1"><text:bookmark-start text:name="_Toc227080792"/><text:soft-page-break/>PARTIE 6 : Agent qui récupère un état<text:bookmark-end text:name="_Toc227080792"/></text:h>
      <text:p text:style-name="P277"/>
      <text:p text:style-name="P278">@tool</text:p>
      <text:p text:style-name="P279"><text:span text:style-name="T280">def</text:span><text:span text:style-name="T281"><text:s/>read_favourite_colour(runtime: ToolRuntime) -&gt; str:</text:span></text:p>
      <text:p text:style-name="P282"><text:span text:style-name="T283">   <text:s/></text:span><text:span text:style-name="T284">"""Read the favourite colour of the user from the state."""</text:span></text:p>
      <text:p text:style-name="P285"><text:span text:style-name="T286">   <text:s/></text:span><text:span text:style-name="T287">try</text:span><text:span text:style-name="T288">:</text:span></text:p>
      <text:p text:style-name="P289"><text:span text:style-name="T290">       <text:s/></text:span><text:span text:style-name="T291">return</text:span><text:span text:style-name="T292"><text:s/>runtime.state[</text:span><text:span text:style-name="T293">"favourite_colour"</text:span><text:span text:style-name="T294">]</text:span></text:p>
      <text:p text:style-name="P295"><text:span text:style-name="T296">   <text:s/></text:span><text:span text:style-name="T297">except</text:span><text:span text:style-name="T298"><text:s/>KeyError:</text:span></text:p>
      <text:p text:style-name="P299"><text:span text:style-name="T300">       <text:s/></text:span><text:span text:style-name="T301">return</text:span><text:span text:style-name="T302"><text:s/></text:span><text:span text:style-name="T303">"No favourite colour found in state"</text:span></text:p>
      <text:p text:style-name="P304"/>
      <text:p text:style-name="P305">agent = create_agent(</text:p>
      <text:p text:style-name="P306">    model=model,</text:p>
      <text:p text:style-name="P307">    tools=[update_favourite_colour, read_favourite_colour],</text:p>
      <text:p text:style-name="P308">    checkpointer=InMemorySaver(),</text:p>
      <text:p text:style-name="P309">    state_schema=CustomState</text:p>
      <text:p text:style-name="P310">)</text:p>
      <text:p text:style-name="P311"/>
      <text:p text:style-name="P312">response = agent.invoke(</text:p>
      <text:p text:style-name="P313"><text:span text:style-name="T314">    {<text:s/></text:span><text:span text:style-name="T315">"messages"</text:span><text:span text:style-name="T316">: [HumanMessage(content=</text:span><text:span text:style-name="T317">"My favourite colour is green"</text:span><text:span text:style-name="T318">)]},</text:span></text:p>
      <text:p text:style-name="P319"><text:span text:style-name="T320">   <text:s/></text:span><text:span text:style-name="T321">{</text:span><text:span text:style-name="T322">"configurable"</text:span><text:span text:style-name="T323">: {</text:span><text:span text:style-name="T324">"thread_id"</text:span><text:span text:style-name="T325">:<text:s/></text:span><text:span text:style-name="T326">"1"</text:span><text:span text:style-name="T327">}}</text:span></text:p>
      <text:p text:style-name="P328">)</text:p>
      <text:p text:style-name="P329"><text:span text:style-name="T330">print(response[</text:span><text:span text:style-name="T331">'messages'</text:span><text:span text:style-name="T332">][-</text:span><text:span text:style-name="T333">1</text:span><text:span text:style-name="T334">].content)</text:span></text:p>
      <text:p text:style-name="P335"/>
      <text:p text:style-name="P336"/>
      <text:p text:style-name="P337">response = agent.invoke(</text:p>
      <text:p text:style-name="P338"><text:span text:style-name="T339">    {<text:s/></text:span><text:span text:style-name="T340">"messages"</text:span><text:span text:style-name="T341">: [HumanMessage(content=</text:span><text:span text:style-name="T342">"What's my favourite colour?"</text:span><text:span text:style-name="T343">)]},</text:span></text:p>
      <text:p text:style-name="P344"><text:span text:style-name="T345">   <text:s/></text:span><text:span text:style-name="T346">{</text:span><text:span text:style-name="T347">"configurable"</text:span><text:span text:style-name="T348">: {</text:span><text:span text:style-name="T349">"thread_id"</text:span><text:span text:style-name="T350">:<text:s/></text:span><text:span text:style-name="T351">"1"</text:span><text:span text:style-name="T352">}}</text:span></text:p>
      <text:p text:style-name="P353">)</text:p>
      <text:p text:style-name="P354"><text:span text:style-name="T355">print(response[</text:span><text:span text:style-name="T356">'messages'</text:span><text:span text:style-name="T357">][-</text:span><text:span text:style-name="T358">1</text:span><text:span text:style-name="T359">].content)</text:span></text:p>
      <text:p text:style-name="P36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365F9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365F9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365F9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3%"/>
      <style:text-properties style:font-name="Calibri Light" fo:color="#2F5496" fo:font-size="16pt" style:font-size-asian="16pt" style:font-size-complex="16pt" fo:language="fr" fo:country="MA" style:language-asian="fr" style:country-asian="MA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SMA et IAD</text:span><text:span text:style-name="T4"><text:tab/>Master SDIA Prof. RETAL SAR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 Ob</meta:initial-creator>
    <dc:creator>user</dc:creator>
    <meta:creation-date>2025-03-18T10:48:00Z</meta:creation-date>
    <dc:date>2026-04-14T16:39:00Z</dc:date>
    <meta:print-date>2026-04-03T14:32:00Z</meta:print-date>
    <meta:template xlink:href="Normal" xlink:type="simple"/>
    <meta:editing-cycles>48</meta:editing-cycles>
    <meta:editing-duration>PT45960S</meta:editing-duration>
    <meta:document-statistic meta:page-count="5" meta:paragraph-count="9" meta:word-count="714" meta:character-count="4634" meta:row-count="32" meta:non-whitespace-character-count="3929"/>
  </office:meta>
</office:document-meta>
</file>