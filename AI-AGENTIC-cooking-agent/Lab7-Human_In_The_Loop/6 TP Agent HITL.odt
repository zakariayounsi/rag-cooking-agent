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" style:parent-style-name="Policepardéfaut" style:family="text">
      <style:text-properties fo:language="fr" fo:country="FR"/>
    </style:style>
    <style:style style:name="P11" style:parent-style-name="Normal" style:family="paragraph">
      <style:text-properties style:language-asian="fr" style:country-asian="MA"/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3" style:parent-style-name="Lienhypertexte" style:family="text">
      <style:text-properties fo:language="fr" fo:country="MA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fo:language="fr" fo:country="MA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7" style:parent-style-name="Lienhypertexte" style:family="text">
      <style:text-properties fo:language="fr" fo:country="MA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9" style:parent-style-name="Lienhypertexte" style:family="text">
      <style:text-properties fo:language="fr" fo:country="MA"/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1" style:parent-style-name="Lienhypertexte" style:family="text">
      <style:text-properties fo:language="fr" fo:country="MA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P23" style:parent-style-name="Titre2" style:family="paragraph">
      <style:text-properties fo:font-size="20pt" style:font-size-asian="20pt" style:font-size-complex="20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T27" style:parent-style-name="Policepardéfaut" style:family="text">
      <style:text-properties fo:language="fr" fo:country="MA"/>
    </style:style>
    <style:style style:name="P28" style:parent-style-name="Normal" style:family="paragraph">
      <style:text-properties fo:language="fr" fo:country="MA"/>
    </style:style>
    <style:style style:name="P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4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4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5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1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6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fr" fo:country="MA"/>
    </style:style>
    <style:style style:name="P70" style:parent-style-name="Normal" style:family="paragraph">
      <style:text-properties fo:language="fr" fo:country="MA"/>
    </style:style>
    <style:style style:name="P71" style:parent-style-name="Normal" style:family="paragraph">
      <style:text-properties fo:language="fr" fo:country="MA"/>
    </style:style>
    <style:style style:name="P72" style:parent-style-name="Normal" style:family="paragraph">
      <style:text-properties fo:language="fr" fo:country="MA"/>
    </style:style>
    <style:style style:name="P73" style:parent-style-name="Normal" style:family="paragraph">
      <style:text-properties fo:language="fr" fo:country="MA"/>
    </style:style>
    <style:style style:name="P74" style:parent-style-name="Normal" style:family="paragraph">
      <style:text-properties fo:language="fr" fo:country="MA"/>
    </style:style>
    <style:style style:name="P75" style:parent-style-name="Normal" style:family="paragraph">
      <style:text-properties fo:language="fr" fo:country="MA"/>
    </style:style>
    <style:style style:name="P76" style:parent-style-name="Normal" style:family="paragraph">
      <style:text-properties fo:language="fr" fo:country="MA"/>
    </style:style>
    <style:style style:name="P77" style:parent-style-name="Normal" style:family="paragraph">
      <style:text-properties fo:language="fr" fo:country="MA"/>
    </style:style>
    <style:style style:name="P78" style:parent-style-name="Normal" style:family="paragraph">
      <style:text-properties fo:language="fr" fo:country="MA"/>
    </style:style>
    <style:style style:name="P79" style:parent-style-name="Normal" style:family="paragraph">
      <style:text-properties fo:language="fr" fo:country="MA"/>
    </style:style>
    <style:style style:name="P80" style:parent-style-name="Normal" style:family="paragraph">
      <style:text-properties fo:language="fr" fo:country="MA"/>
    </style:style>
    <style:style style:name="P81" style:parent-style-name="Normal" style:family="paragraph">
      <style:text-properties fo:font-size="12pt" style:font-size-asian="12pt" style:font-size-complex="12pt" fo:language="fr" fo:country="MA"/>
    </style:style>
    <style:style style:name="P82" style:parent-style-name="Normal" style:family="paragraph">
      <style:paragraph-properties style:vertical-align="auto" fo:margin-top="0.0694in" fo:margin-bottom="0.0694in" fo:line-height="100%"/>
      <style:text-properties fo:font-size="12pt" style:font-size-asian="12pt" style:font-size-complex="12pt" fo:language="fr" fo:country="MA" fo:hyphenate="true"/>
    </style:style>
    <style:style style:name="T83" style:parent-style-name="Policepardéfaut" style:family="text">
      <style:text-properties fo:language="fr" fo:country="MA"/>
    </style:style>
    <style:style style:name="P84" style:parent-style-name="Normal" style:family="paragraph">
      <style:text-properties fo:font-weight="bold" style:font-weight-asian="bold" style:font-weight-complex="bold" fo:font-size="12pt" style:font-size-asian="12pt" style:font-size-complex="12pt" fo:language="fr" fo:country="MA" style:language-asian="fr" style:country-asian="MA"/>
    </style:style>
    <style:style style:name="P8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 fo:hyphenate="true"/>
    </style:style>
    <style:style style:name="P8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0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0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0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0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1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1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1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1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1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1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1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2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2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2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2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2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3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3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4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4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4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5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5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6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6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6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6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6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7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7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7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17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7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7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78" style:parent-style-name="Normal" style:family="paragraph">
      <style:text-properties fo:language="fr" fo:country="MA"/>
    </style:style>
    <style:style style:name="P179" style:parent-style-name="Normal" style:family="paragraph">
      <style:text-properties fo:font-weight="bold" style:font-weight-asian="bold" style:font-weight-complex="bold" fo:font-size="12pt" style:font-size-asian="12pt" style:font-size-complex="12pt" fo:language="fr" fo:country="MA"/>
    </style:style>
    <style:style style:name="P1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8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8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8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85" style:parent-style-name="Normal" style:family="paragraph">
      <style:text-properties fo:font-weight="bold" style:font-weight-asian="bold" style:font-weight-complex="bold" fo:font-size="12pt" style:font-size-asian="12pt" style:font-size-complex="12pt" fo:language="fr" fo:country="MA"/>
    </style:style>
    <style:style style:name="P18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1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5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T1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9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0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02" style:parent-style-name="Policepardéfaut" style:family="text">
      <style:text-properties fo:language="fr" fo:country="MA"/>
    </style:style>
    <style:style style:name="P2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0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0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0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0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1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1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1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1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1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2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22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T223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22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2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2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2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29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23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31" style:parent-style-name="Policepardéfaut" style:family="text">
      <style:text-properties fo:language="fr" fo:country="MA"/>
    </style:style>
    <style:style style:name="T232" style:parent-style-name="Policepardéfaut" style:family="text">
      <style:text-properties fo:language="fr" fo:country="MA"/>
    </style:style>
    <style:style style:name="T233" style:parent-style-name="Policepardéfaut" style:family="text">
      <style:text-properties fo:language="fr" fo:country="MA"/>
    </style:style>
    <style:style style:name="P23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3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3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4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4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4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4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4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4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50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T251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2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5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5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P2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6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6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6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65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T266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26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6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6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7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T271" style:parent-style-name="Policepardéfaut" style:family="text">
      <style:text-properties fo:language="fr" fo:country="MA"/>
    </style:style>
    <style:style style:name="T272" style:parent-style-name="Policepardéfaut" style:family="text">
      <style:text-properties fo:language="fr" fo:country="MA"/>
    </style:style>
    <style:style style:name="T273" style:parent-style-name="Policepardéfaut" style:family="text">
      <style:text-properties fo:language="fr" fo:country="MA"/>
    </style:style>
    <style:style style:name="P27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 fo:hyphenate="true"/>
    </style:style>
    <style:style style:name="P27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6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7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7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7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8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8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8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8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8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8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8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9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9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0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02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3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0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0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0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0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11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31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1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1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1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1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2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2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2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2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2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28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T329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T330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33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3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3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37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3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40" style:parent-style-name="Normal" style:family="paragraph">
      <style:text-properties fo:font-weight="bold" style:font-weight-asian="bold" style:font-weight-complex="bold" fo:font-size="12pt" style:font-size-asian="12pt" style:font-size-complex="12pt" fo:language="fr" fo:country="MA"/>
    </style:style>
    <style:style style:name="P341" style:parent-style-name="Normal" style:family="paragraph">
      <style:text-properties fo:font-weight="bold" style:font-weight-asian="bold" style:font-weight-complex="bold" fo:font-size="12pt" style:font-size-asian="12pt" style:font-size-complex="12pt" fo:language="fr" fo:country="MA"/>
    </style:style>
    <style:style style:name="P342" style:parent-style-name="Normal" style:family="paragraph">
      <style:text-properties fo:language="fr" fo:country="MA"/>
    </style:style>
    <style:style style:name="P343" style:parent-style-name="Normal" style:family="paragraph">
      <style:text-properties fo:language="fr" fo:country="MA"/>
    </style:style>
    <style:style style:name="P344" style:parent-style-name="Normal" style:family="paragraph">
      <style:text-properties fo:language="fr" fo:country="MA"/>
    </style:style>
    <style:style style:name="P345" style:parent-style-name="Normal" style:family="paragraph">
      <style:text-properties fo:language="fr" fo:country="MA"/>
    </style:style>
  </office:automatic-styles>
  <office:body>
    <office:text text:use-soft-page-breaks="true">
      <text:p text:style-name="P1"><text:span text:style-name="T5">LAB :</text:span><text:span text:style-name="T6"><text:s/></text:span><text:span text:style-name="T7">Un agent HITL (Human-In-The-Loop)</text:span></text:p>
      <text:p text:style-name="P8"/>
      <text:p text:style-name="P9"/>
      <text:p text:style-name="En-têtedetabledesmatières"><text:span text:style-name="T10">Table des matières</text:span></text:p>
      <text:p text:style-name="P1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227069539" office:target-frame-name="_top" xlink:show="replace"><text:span text:style-name="T13">PARTIE 1 :<text:s/></text:span><text:span text:style-name="Lienhypertexte">Définition des outils</text:span><text:tab/>2</text:a></text:p>
          <text:p text:style-name="P14"><text:a xlink:href="#_Toc227069540" office:target-frame-name="_top" xlink:show="replace"><text:span text:style-name="T15">PARTIE 2 :<text:s/></text:span><text:span text:style-name="Lienhypertexte">Création d’un agent HITL</text:span><text:tab/>3</text:a></text:p>
          <text:p text:style-name="P16"><text:a xlink:href="#_Toc227069541" office:target-frame-name="_top" xlink:show="replace"><text:span text:style-name="T17">PARTIE 3 :<text:s/></text:span><text:span text:style-name="Lienhypertexte">Approuver le résultat</text:span><text:tab/>4</text:a></text:p>
          <text:p text:style-name="P18"><text:a xlink:href="#_Toc227069542" office:target-frame-name="_top" xlink:show="replace"><text:span text:style-name="T19">PARTIE 4 :<text:s/></text:span><text:span text:style-name="Lienhypertexte">Refuser le résultat</text:span><text:tab/>4</text:a></text:p>
          <text:p text:style-name="P20"><text:a xlink:href="#_Toc227069543" office:target-frame-name="_top" xlink:show="replace"><text:span text:style-name="T21">PARTIE 5 :Modifier</text:span><text:span text:style-name="Lienhypertexte"><text:s/>le résultat</text:span><text:tab/>5</text:a></text:p>
        </text:index-body>
      </text:table-of-content>
      <text:p text:style-name="Normal"/>
      <text:p text:style-name="P22"/>
      <text:h text:style-name="Titre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226121170"/></text:h>
      <text:p text:style-name="Normal"/>
      <text:p text:style-name="Normal"/>
      <text:p text:style-name="Normal"/>
      <text:h text:style-name="P23" text:outline-level="2"><text:bookmark-start text:name="_Toc226121171"/><text:bookmark-end text:name="_Toc226121170"/></text:h>
      <text:p text:style-name="Normal"/>
      <text:p text:style-name="P24"/>
      <text:p text:style-name="P25"/>
      <text:soft-page-break/>
      <text:p text:style-name="P26">Un agent HITL (Human-In-The-Loop) est un agent d’IA dont le fonctionnement inclut explicitement une intervention humaine pendant l’exécution du processus, et pas seulement avant (instruction) ou après (validation).</text:p>
      <text:p text:style-name="Normal">Cet agent<text:s/>exécute une tâche, mais s’arrête à certains points clés pour demander une validation, une correction ou une décision à un humain avant de continuer.</text:p>
      <text:h text:style-name="Titre1" text:outline-level="1"><text:bookmark-start text:name="_Toc226122703"/><text:bookmark-start text:name="_Toc227065606"/><text:bookmark-start text:name="_Toc227067572"/><text:bookmark-start text:name="_Toc227069539"/><text:span text:style-name="T27">PARTIE 1 :<text:s/></text:span><text:bookmark-end text:name="_Toc226122703"/><text:bookmark-end text:name="_Toc227065606"/><text:bookmark-end text:name="_Toc227067572"/>Définition des outils<text:bookmark-end text:name="_Toc227069539"/></text:h>
      <text:p text:style-name="P28"><text:bookmark-end text:name="_Toc226121171"/></text:p>
      <text:p text:style-name="P29"><text:span text:style-name="T30">from</text:span><text:span text:style-name="T31"><text:s/>langchain.tools<text:s/></text:span><text:span text:style-name="T32">import</text:span><text:span text:style-name="T33"><text:s/>tool, ToolRuntime</text:span></text:p>
      <text:p text:style-name="P34"/>
      <text:p text:style-name="P35">@tool</text:p>
      <text:p text:style-name="P36"><text:span text:style-name="T37">def</text:span><text:span text:style-name="T38"><text:s/>read_email(runtime: ToolRuntime) -&gt; str:</text:span></text:p>
      <text:p text:style-name="P39"><text:span text:style-name="T40">   <text:s/></text:span><text:span text:style-name="T41">"""Read an email from the given address."""</text:span></text:p>
      <text:p text:style-name="P42"><text:span text:style-name="T43">   <text:s/></text:span><text:span text:style-name="T44"># take email from state</text:span></text:p>
      <text:p text:style-name="P45"><text:span text:style-name="T46">   <text:s/></text:span><text:span text:style-name="T47">return</text:span><text:span text:style-name="T48"><text:s/>runtime.state[</text:span><text:span text:style-name="T49">"email"</text:span><text:span text:style-name="T50">]</text:span></text:p>
      <text:p text:style-name="P51"/>
      <text:p text:style-name="P52">@tool</text:p>
      <text:p text:style-name="P53"><text:span text:style-name="T54">def</text:span><text:span text:style-name="T55"><text:s/>send_email(body: str) -&gt; str:</text:span></text:p>
      <text:p text:style-name="P56"><text:span text:style-name="T57">   <text:s/></text:span><text:span text:style-name="T58">"""Send an email to the given address with the given subject and body."""</text:span></text:p>
      <text:p text:style-name="P59"><text:span text:style-name="T60">   <text:s/></text:span><text:span text:style-name="T61"># fake email sending</text:span></text:p>
      <text:p text:style-name="P62"><text:span text:style-name="T63">   <text:s/></text:span><text:span text:style-name="T64">return</text:span><text:span text:style-name="T65"><text:s/></text:span><text:span text:style-name="T66">f</text:span><text:span text:style-name="T67">"Email sent"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soft-page-break/>
      <text:p text:style-name="P81">Dans un système HITL (Human-In-The-Loop), le middleware est très important car il permet de gérer l’intervention humaine sans casser le flux du programme.</text:p>
      <text:p text:style-name="P82">Un middleware est un composant logiciel intermédiaire qui s’insère entre deux étapes d’un système pour :<text:s/>intercepter, modifier, contrôler ou enrichir les données ou l’exécution avant qu’elles n’atteignent leur destination finale.</text:p>
      <text:h text:style-name="Titre1" text:outline-level="1"><text:bookmark-start text:name="_Toc227069540"/><text:span text:style-name="T83">PARTIE 2 :<text:s/></text:span>Création d’un agent HITL<text:bookmark-end text:name="_Toc227069540"/></text:h>
      <text:p text:style-name="P84">Ajouter l’agent</text:p>
      <text:p text:style-name="P85"/>
      <text:p text:style-name="P86"><text:span text:style-name="T87">from</text:span><text:span text:style-name="T88"><text:s/>langchain.agents<text:s/></text:span><text:span text:style-name="T89">import</text:span><text:span text:style-name="T90"><text:s/>create_agent, AgentState</text:span></text:p>
      <text:p text:style-name="P91"><text:span text:style-name="T92">from</text:span><text:span text:style-name="T93"><text:s/>langgraph.checkpoint.memory<text:s/></text:span><text:span text:style-name="T94">import</text:span><text:span text:style-name="T95"><text:s/>InMemorySaver</text:span></text:p>
      <text:p text:style-name="P96"><text:span text:style-name="T97">from</text:span><text:span text:style-name="T98"><text:s/>langchain.agents.middleware<text:s/></text:span><text:span text:style-name="T99">import</text:span><text:span text:style-name="T100"><text:s/>HumanInTheLoopMiddleware</text:span></text:p>
      <text:p text:style-name="P101"><text:span text:style-name="T102">from</text:span><text:span text:style-name="T103"><text:s/>langchain_ollama<text:s/></text:span><text:span text:style-name="T104">import</text:span><text:span text:style-name="T105"><text:s/>ChatOllama</text:span></text:p>
      <text:p text:style-name="P106"/>
      <text:p text:style-name="P107"><text:span text:style-name="T108">class</text:span><text:span text:style-name="T109"><text:s/>EmailState(AgentState):</text:span></text:p>
      <text:p text:style-name="P110">    email: str</text:p>
      <text:p text:style-name="P111"/>
      <text:p text:style-name="P112">agent = create_agent(</text:p>
      <text:p text:style-name="P113"><text:span text:style-name="T114">    model=</text:span><text:span text:style-name="T115">"gpt-5-nano"</text:span><text:span text:style-name="T116">,</text:span></text:p>
      <text:p text:style-name="P117">    tools=[read_email, send_email],</text:p>
      <text:p text:style-name="P118">    state_schema=EmailState,</text:p>
      <text:p text:style-name="P119">    checkpointer=InMemorySaver(),</text:p>
      <text:p text:style-name="P120">    middleware=[</text:p>
      <text:p text:style-name="P121">        HumanInTheLoopMiddleware(</text:p>
      <text:p text:style-name="P122">            interrupt_on={</text:p>
      <text:p text:style-name="P123"><text:span text:style-name="T124">               <text:s/></text:span><text:span text:style-name="T125">"read_email"</text:span><text:span text:style-name="T126">:<text:s/></text:span><text:span text:style-name="T127">False</text:span><text:span text:style-name="T128">,</text:span></text:p>
      <text:p text:style-name="P129"><text:span text:style-name="T130">               <text:s/></text:span><text:span text:style-name="T131">"send_email"</text:span><text:span text:style-name="T132">:<text:s/></text:span><text:span text:style-name="T133">True</text:span><text:span text:style-name="T134">,</text:span></text:p>
      <text:p text:style-name="P135">            },</text:p>
      <text:p text:style-name="P136"><text:span text:style-name="T137">            description_prefix=</text:span><text:span text:style-name="T138">"Tool execution requires approval"</text:span><text:span text:style-name="T139">,</text:span></text:p>
      <text:p text:style-name="P140"><text:span text:style-name="T141">       <text:s/></text:span><text:span text:style-name="T142">),</text:span></text:p>
      <text:p text:style-name="P143">    ],</text:p>
      <text:p text:style-name="P144">)</text:p>
      <text:p text:style-name="Normal"/>
      <text:p text:style-name="P145">Tester l’agent</text:p>
      <text:p text:style-name="P146"><text:span text:style-name="T147">from</text:span><text:span text:style-name="T148"><text:s/>langchain.messages<text:s/></text:span><text:span text:style-name="T149">import</text:span><text:span text:style-name="T150"><text:s/>HumanMessage</text:span></text:p>
      <text:p text:style-name="P151"/>
      <text:p text:style-name="P152"><text:span text:style-name="T153">config = {</text:span><text:span text:style-name="T154">"configurable"</text:span><text:span text:style-name="T155">: {</text:span><text:span text:style-name="T156">"thread_id"</text:span><text:span text:style-name="T157">:<text:s/></text:span><text:span text:style-name="T158">"1"</text:span><text:span text:style-name="T159">}}</text:span></text:p>
      <text:p text:style-name="P160"/>
      <text:p text:style-name="P161">response = agent.invoke(</text:p>
      <text:p text:style-name="P162">    {</text:p>
      <text:p text:style-name="P163"><text:span text:style-name="T164">       <text:s/></text:span><text:span text:style-name="T165">"messages"</text:span><text:span text:style-name="T166">: [HumanMessage(content=</text:span><text:span text:style-name="T167">"Veuillez lire mon e-mail et envoyer une réponse immédiatement. Envoyez la réponse maintenant dans le même fil de discussion."</text:span><text:span text:style-name="T168">)],</text:span></text:p>
      <text:soft-page-break/>
      <text:p text:style-name="P169"><text:span text:style-name="T170">       <text:s/></text:span><text:span text:style-name="T171">"email"</text:span><text:span text:style-name="T172">:<text:s/></text:span><text:span text:style-name="T173">"Bonjour Sara, je vais être en retard pour notre réunion de demain. Pouvons-nous la reprogrammer ? Cordialement, Sofia"</text:span></text:p>
      <text:p text:style-name="P174">    },</text:p>
      <text:p text:style-name="P175">    config=config</text:p>
      <text:p text:style-name="P176">)</text:p>
      <text:p text:style-name="P177">print(response)</text:p>
      <text:p text:style-name="P178"/>
      <text:p text:style-name="P179">Afficher le message interrompu<text:s/>avec metadata</text:p>
      <text:p text:style-name="P180"><text:span text:style-name="T181">print(response[</text:span><text:span text:style-name="T182">'__interrupt__'</text:span><text:span text:style-name="T183">])</text:span></text:p>
      <text:p text:style-name="P184"/>
      <text:p text:style-name="P185">Afficher<text:s/>seulement<text:s/>le message interrompu<text:s/></text:p>
      <text:p text:style-name="P186"><text:span text:style-name="T187">p</text:span><text:span text:style-name="T188">rint(response[</text:span><text:span text:style-name="T189">'__interrupt__'</text:span><text:span text:style-name="T190">][</text:span><text:span text:style-name="T191">0</text:span><text:span text:style-name="T192">].value[</text:span><text:span text:style-name="T193">'action_requests'</text:span><text:span text:style-name="T194">][</text:span><text:span text:style-name="T195">0</text:span><text:span text:style-name="T196">][</text:span><text:span text:style-name="T197">'args'</text:span><text:span text:style-name="T198">][</text:span><text:span text:style-name="T199">'body'</text:span><text:span text:style-name="T200">])</text:span></text:p>
      <text:p text:style-name="P201"/>
      <text:h text:style-name="Titre1" text:outline-level="1"><text:bookmark-start text:name="_Toc227069541"/><text:span text:style-name="T202">PARTIE 3 :<text:s/></text:span>Approuver le résultat<text:bookmark-end text:name="_Toc227069541"/></text:h>
      <text:p text:style-name="P203"><text:span text:style-name="T204">from</text:span><text:span text:style-name="T205"><text:s/>langgraph.types<text:s/></text:span><text:span text:style-name="T206">import</text:span><text:span text:style-name="T207"><text:s/>Command</text:span></text:p>
      <text:p text:style-name="P208"/>
      <text:p text:style-name="P209">response = agent.invoke(</text:p>
      <text:p text:style-name="P210">    Command(<text:s/></text:p>
      <text:p text:style-name="P211"><text:span text:style-name="T212">        resume={</text:span><text:span text:style-name="T213">"decisions"</text:span><text:span text:style-name="T214">: [{</text:span><text:span text:style-name="T215">"type"</text:span><text:span text:style-name="T216">:<text:s/></text:span><text:span text:style-name="T217">"approve"</text:span><text:span text:style-name="T218">}]}</text:span></text:p>
      <text:p text:style-name="P219">    ),<text:s/></text:p>
      <text:p text:style-name="P220"><text:span text:style-name="T221">    config=config<text:s/></text:span><text:span text:style-name="T222"># Le même thread ID pour reprendre la</text:span><text:span text:style-name="T223"><text:s/>conversation</text:span></text:p>
      <text:p text:style-name="P224">)</text:p>
      <text:p text:style-name="P225"><text:span text:style-name="T226">print(response[</text:span><text:span text:style-name="T227">'messages'</text:span><text:span text:style-name="T228">][-</text:span><text:span text:style-name="T229">1</text:span><text:span text:style-name="T230">].content)</text:span></text:p>
      <text:p text:style-name="Normal"/>
      <text:h text:style-name="Titre1" text:outline-level="1"><text:bookmark-start text:name="_Toc227069542"/><text:span text:style-name="T231">PARTIE<text:s/></text:span><text:span text:style-name="T232">4</text:span><text:span text:style-name="T233"> :<text:s/></text:span>Refuser le résultat<text:bookmark-end text:name="_Toc227069542"/></text:h>
      <text:p text:style-name="Normal"/>
      <text:p text:style-name="P234">response = agent.invoke(</text:p>
      <text:p text:style-name="P235">    Command(        </text:p>
      <text:p text:style-name="P236">        resume={</text:p>
      <text:p text:style-name="P237"><text:span text:style-name="T238">           <text:s/></text:span><text:span text:style-name="T239">"decisions"</text:span><text:span text:style-name="T240">: [</text:span></text:p>
      <text:p text:style-name="P241">                {</text:p>
      <text:p text:style-name="P242"><text:span text:style-name="T243">                   <text:s/></text:span><text:span text:style-name="T244">"type"</text:span><text:span text:style-name="T245">:<text:s/></text:span><text:span text:style-name="T246">"reject"</text:span><text:span text:style-name="T247">,</text:span></text:p>
      <text:p text:style-name="P248"><text:span text:style-name="T249">                   <text:s/></text:span><text:span text:style-name="T250"># Une explication sur les r</text:span><text:span text:style-name="T251">aisons du rejet</text:span></text:p>
      <text:p text:style-name="P252"><text:span text:style-name="T253">                   <text:s/></text:span><text:span text:style-name="T254">"message"</text:span><text:span text:style-name="T255">:<text:s/></text:span><text:span text:style-name="T256">"  J’annule notre rendez-vous."</text:span></text:p>
      <text:p text:style-name="P257"><text:span text:style-name="T258">               <text:s/></text:span><text:span text:style-name="T259">}</text:span></text:p>
      <text:p text:style-name="P260">            ]</text:p>
      <text:p text:style-name="P261">        }</text:p>
      <text:p text:style-name="P262">    ),<text:s/></text:p>
      <text:p text:style-name="P263"><text:span text:style-name="T264">    config=config<text:s/></text:span><text:span text:style-name="T265"># Le même thread ID pour reprendre la</text:span><text:span text:style-name="T266"><text:s/>conversation</text:span></text:p>
      <text:soft-page-break/>
      <text:p text:style-name="P267">    )  </text:p>
      <text:p text:style-name="P268">print(response)</text:p>
      <text:p text:style-name="P269"/>
      <text:p text:style-name="P270"/>
      <text:h text:style-name="Titre1" text:outline-level="1"><text:bookmark-start text:name="_Toc227069543"/><text:span text:style-name="T271">PARTIE<text:s/></text:span><text:span text:style-name="T272">5</text:span><text:span text:style-name="T273"> :Modifier</text:span><text:s/>le résultat<text:bookmark-end text:name="_Toc227069543"/></text:h>
      <text:p text:style-name="P274"/>
      <text:p text:style-name="P275"><text:span text:style-name="T276">from</text:span><text:span text:style-name="T277"><text:s/>langgraph.types<text:s/></text:span><text:span text:style-name="T278">import</text:span><text:span text:style-name="T279"><text:s/>Command</text:span></text:p>
      <text:p text:style-name="P280"/>
      <text:p text:style-name="P281">response = agent.invoke(</text:p>
      <text:p text:style-name="P282">    Command(        </text:p>
      <text:p text:style-name="P283">        resume={</text:p>
      <text:p text:style-name="P284"><text:span text:style-name="T285">           <text:s/></text:span><text:span text:style-name="T286">"decisions"</text:span><text:span text:style-name="T287">: [</text:span></text:p>
      <text:p text:style-name="P288">                {</text:p>
      <text:p text:style-name="P289"><text:span text:style-name="T290">                   <text:s/></text:span><text:span text:style-name="T291">"type"</text:span><text:span text:style-name="T292">:<text:s/></text:span><text:span text:style-name="T293">"edit"</text:span><text:span text:style-name="T294">,</text:span></text:p>
      <text:p text:style-name="P295">                   <text:s/></text:p>
      <text:p text:style-name="P296"><text:span text:style-name="T297">                   <text:s/></text:span><text:span text:style-name="T298">"edited_action"</text:span><text:span text:style-name="T299">: {</text:span></text:p>
      <text:p text:style-name="P300"><text:span text:style-name="T301">                       <text:s/></text:span><text:span text:style-name="T302"># Le nom du Tool.</text:span></text:p>
      <text:p text:style-name="P303"><text:span text:style-name="T304">                       <text:s/></text:span><text:span text:style-name="T305">"name"</text:span><text:span text:style-name="T306">:<text:s/></text:span><text:span text:style-name="T307">"send_email"</text:span><text:span text:style-name="T308">,</text:span></text:p>
      <text:p text:style-name="P309"><text:span text:style-name="T310">                       <text:s/></text:span><text:span text:style-name="T311"># Les arguments à passer au tool.</text:span></text:p>
      <text:p text:style-name="P312"><text:span text:style-name="T313">                       <text:s/></text:span><text:span text:style-name="T314">"args"</text:span><text:span text:style-name="T315">: {</text:span><text:span text:style-name="T316">"body"</text:span><text:span text:style-name="T317">:<text:s/></text:span><text:span text:style-name="T318">"Je suis désolée mais je dois annuler notre rendez-vous je ne serais pas libre.<text:s/></text:span><text:span text:style-name="T319">Sara"</text:span><text:span text:style-name="T320">},</text:span></text:p>
      <text:p text:style-name="P321">                    }</text:p>
      <text:p text:style-name="P322">                }</text:p>
      <text:p text:style-name="P323">            ]</text:p>
      <text:p text:style-name="P324">        }</text:p>
      <text:p text:style-name="P325">    ),<text:s/></text:p>
      <text:p text:style-name="P326"><text:span text:style-name="T327">    config=config<text:s/></text:span><text:span text:style-name="T328">#<text:s/></text:span><text:span text:style-name="T329"><text:s/>Le même thread ID pour reprendre la</text:span><text:span text:style-name="T330"><text:s/>conversation</text:span></text:p>
      <text:p text:style-name="P331">    )  <text:s/></text:p>
      <text:p text:style-name="P332">   <text:s/></text:p>
      <text:p text:style-name="P333"><text:span text:style-name="T334">print(response[</text:span><text:span text:style-name="T335">'messages'</text:span><text:span text:style-name="T336">][-</text:span><text:span text:style-name="T337">1</text:span><text:span text:style-name="T338">].content)</text:span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365F9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3%"/>
      <style:text-properties style:font-name="Calibri Light" fo:color="#2F5496" fo:font-size="16pt" style:font-size-asian="16pt" style:font-size-complex="16pt" fo:language="fr" fo:country="MA" style:language-asian="fr" style:country-asian="MA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SMA et IAD</text:span><text:span text:style-name="T4"><text:tab/>Master SDIA Prof. RETAL S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Ob</meta:initial-creator>
    <dc:creator>user</dc:creator>
    <meta:creation-date>2025-03-18T10:48:00Z</meta:creation-date>
    <dc:date>2026-04-14T13:35:00Z</dc:date>
    <meta:print-date>2026-04-03T14:32:00Z</meta:print-date>
    <meta:template xlink:href="Normal" xlink:type="simple"/>
    <meta:editing-cycles>49</meta:editing-cycles>
    <meta:editing-duration>PT45840S</meta:editing-duration>
    <meta:document-statistic meta:page-count="5" meta:paragraph-count="9" meta:word-count="717" meta:character-count="4656" meta:row-count="32" meta:non-whitespace-character-count="3948"/>
  </office:meta>
</office:document-meta>
</file>