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5" style:parent-style-name="Policepardéfaut" style:family="text">
      <style:text-properties fo:font-weight="bold" style:font-weight-asian="bold" style:font-weight-complex="bold" fo:font-size="14pt" style:font-size-asian="14pt" style:font-size-complex="14pt" fo:language="fr" fo:country="MA"/>
    </style:style>
    <style:style style:name="T6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MA"/>
    </style:style>
    <style:style style:name="T7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MA"/>
    </style:style>
    <style:style style:name="T8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MA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fr" fo:country="MA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fr" fo:country="MA"/>
    </style:style>
    <style:style style:name="T11" style:parent-style-name="Policepardéfaut" style:family="text">
      <style:text-properties fo:language="fr" fo:country="FR"/>
    </style:style>
    <style:style style:name="P12" style:parent-style-name="Normal" style:family="paragraph">
      <style:text-properties style:language-asian="fr" style:country-asian="MA"/>
    </style:style>
    <style:style style:name="P13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4" style:parent-style-name="Lienhypertexte" style:family="text">
      <style:text-properties fo:language="fr" fo:country="MA"/>
    </style:style>
    <style:style style:name="P15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6" style:parent-style-name="Lienhypertexte" style:family="text">
      <style:text-properties fo:language="fr" fo:country="MA"/>
    </style:style>
    <style:style style:name="P17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8" style:parent-style-name="Lienhypertexte" style:family="text">
      <style:text-properties fo:language="en" fo:country="US"/>
    </style:style>
    <style:style style:name="P19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0" style:parent-style-name="Lienhypertexte" style:family="text">
      <style:text-properties fo:language="fr" fo:country="MA"/>
    </style:style>
    <style:style style:name="P21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fr" fo:country="MA"/>
    </style:style>
    <style:style style:name="P22" style:parent-style-name="Titre2" style:family="paragraph">
      <style:text-properties fo:font-size="20pt" style:font-size-asian="20pt" style:font-size-complex="20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T25" style:parent-style-name="Policepardéfaut" style:family="text">
      <style:text-properties fo:language="fr" fo:country="MA"/>
    </style:style>
    <style:style style:name="P26" style:parent-style-name="Normal" style:family="paragraph">
      <style:text-properties fo:language="fr" fo:country="MA"/>
    </style:style>
    <style:style style:name="P2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8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3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3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5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3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3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9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P4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2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4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4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en" fo:country="US" style:language-asian="fr" style:country-asian="MA"/>
    </style:style>
    <style:style style:name="P4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4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4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8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4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5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52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P5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55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5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57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fr" fo:country="MA" style:language-asian="fr" style:country-asian="MA"/>
    </style:style>
    <style:style style:name="P58" style:parent-style-name="Normal" style:family="paragraph">
      <style:text-properties fo:language="fr" fo:country="MA"/>
    </style:style>
    <style:style style:name="T59" style:parent-style-name="Policepardéfaut" style:family="text">
      <style:text-properties fo:language="fr" fo:country="MA"/>
    </style:style>
    <style:style style:name="P6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1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6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3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6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6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6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6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68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6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7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7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7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74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7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7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7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7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7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8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8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8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8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8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8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8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8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9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9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9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9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9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97" style:parent-style-name="Titre1" style:family="paragraph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Titre1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0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3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0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0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0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P10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10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1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12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1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1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1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1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1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1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2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2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2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23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en" fo:country="US" style:language-asian="fr" style:country-asian="MA"/>
    </style:style>
    <style:style style:name="T12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2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2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2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8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2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3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3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32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P13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3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3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3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3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38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3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40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4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4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4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4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46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4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48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en" fo:country="US" style:language-asian="fr" style:country-asian="MA"/>
    </style:style>
    <style:style style:name="T14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5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5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5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5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5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5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5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5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5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5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60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6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6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6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T164" style:parent-style-name="Policepardéfaut" style:family="text">
      <style:text-properties fo:language="fr" fo:country="MA"/>
    </style:style>
    <style:style style:name="T165" style:parent-style-name="Policepardéfaut" style:family="text">
      <style:text-properties fo:language="fr" fo:country="MA"/>
    </style:style>
    <style:style style:name="T166" style:parent-style-name="Policepardéfaut" style:family="text">
      <style:text-properties fo:language="fr" fo:country="MA"/>
    </style:style>
    <style:style style:name="T167" style:parent-style-name="Policepardéfaut" style:family="text">
      <style:text-properties fo:language="fr" fo:country="MA"/>
    </style:style>
    <style:style style:name="P16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 fo:hyphenate="true"/>
    </style:style>
    <style:style style:name="P16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7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7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P17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7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7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7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17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17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7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79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18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81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fr" fo:country="MA" style:language-asian="fr" style:country-asian="MA"/>
    </style:style>
    <style:style style:name="T18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183" style:parent-style-name="Normal" style:family="paragraph">
      <style:text-properties fo:language="fr" fo:country="MA"/>
    </style:style>
  </office:automatic-styles>
  <office:body>
    <office:text text:use-soft-page-breaks="true">
      <text:p text:style-name="P1"><text:span text:style-name="T5">LAB :</text:span><text:span text:style-name="T6"><text:s/></text:span><text:span text:style-name="T7">Mul</text:span><text:span text:style-name="T8">ti-Agents en Langchain</text:span></text:p>
      <text:p text:style-name="P9"/>
      <text:p text:style-name="P10"/>
      <text:p text:style-name="En-têtedetabledesmatières"><text:span text:style-name="T11">Table des matières</text:span></text:p>
      <text:p text:style-name="P12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"><text:a xlink:href="#_Toc227070420" office:target-frame-name="_top" xlink:show="replace"><text:span text:style-name="T14">PARTIE 1 :<text:s/></text:span><text:span text:style-name="Lienhypertexte">Définition des outils</text:span><text:tab/>2</text:a></text:p>
          <text:p text:style-name="P15"><text:a xlink:href="#_Toc227070421" office:target-frame-name="_top" xlink:show="replace"><text:span text:style-name="T16">PARTIE 2 :<text:s/></text:span><text:span text:style-name="Lienhypertexte">Création des sous agents</text:span><text:tab/>2</text:a></text:p>
          <text:p text:style-name="P17"><text:a xlink:href="#_Toc227070422" office:target-frame-name="_top" xlink:show="replace"><text:span text:style-name="T18">PARTIE 3 : Créer l’agent principal</text:span><text:tab/>3</text:a></text:p>
          <text:p text:style-name="P19"><text:a xlink:href="#_Toc227070423" office:target-frame-name="_top" xlink:show="replace"><text:span text:style-name="T20">PARTIE 4 : Appeler les agents et afficher<text:s/></text:span><text:span text:style-name="Lienhypertexte">le résultat</text:span><text:tab/>3</text:a></text:p>
        </text:index-body>
      </text:table-of-content>
      <text:p text:style-name="Normal"/>
      <text:p text:style-name="P21"/>
      <text:h text:style-name="Titre2" text:outline-level="2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1" text:outline-level="1"><text:bookmark-start text:name="_Toc226121170"/></text:h>
      <text:p text:style-name="Normal"/>
      <text:p text:style-name="Normal"/>
      <text:p text:style-name="Normal"/>
      <text:h text:style-name="P22" text:outline-level="2"><text:bookmark-start text:name="_Toc226121171"/><text:bookmark-end text:name="_Toc226121170"/></text:h>
      <text:p text:style-name="Normal"/>
      <text:p text:style-name="P23"/>
      <text:p text:style-name="P24"/>
      <text:h text:style-name="Titre1" text:outline-level="1"><text:bookmark-start text:name="_Toc226122703"/><text:bookmark-start text:name="_Toc227065606"/><text:bookmark-start text:name="_Toc227067572"/><text:bookmark-start text:name="_Toc227069539"/><text:bookmark-start text:name="_Toc227070420"/><text:soft-page-break/><text:span text:style-name="T25">PARTIE 1 :<text:s/></text:span><text:bookmark-end text:name="_Toc226122703"/><text:bookmark-end text:name="_Toc227065606"/><text:bookmark-end text:name="_Toc227067572"/>Définition des outils<text:bookmark-end text:name="_Toc227069539"/><text:bookmark-end text:name="_Toc227070420"/></text:h>
      <text:p text:style-name="P26"><text:bookmark-end text:name="_Toc226121171"/></text:p>
      <text:p text:style-name="P27"><text:span text:style-name="T28">from</text:span><text:span text:style-name="T29"><text:s/>langchain.tools<text:s/></text:span><text:span text:style-name="T30">import</text:span><text:span text:style-name="T31"><text:s/>tool</text:span></text:p>
      <text:p text:style-name="P32"/>
      <text:p text:style-name="P33">@tool</text:p>
      <text:p text:style-name="P34"><text:span text:style-name="T35">def</text:span><text:span text:style-name="T36"><text:s/>square_root(x: float) -&gt; float:</text:span></text:p>
      <text:p text:style-name="P37"><text:span text:style-name="T38">   <text:s/></text:span><text:span text:style-name="T39">"""Calculate the square root of a number"""</text:span></text:p>
      <text:p text:style-name="P40"><text:span text:style-name="T41">   <text:s/></text:span><text:span text:style-name="T42">return</text:span><text:span text:style-name="T43"><text:s/>x **<text:s/></text:span><text:span text:style-name="T44">0.5</text:span></text:p>
      <text:p text:style-name="P45"/>
      <text:p text:style-name="P46">@tool</text:p>
      <text:p text:style-name="P47"><text:span text:style-name="T48">def</text:span><text:span text:style-name="T49"><text:s/>square(x: float) -&gt; float:</text:span></text:p>
      <text:p text:style-name="P50"><text:span text:style-name="T51">   <text:s/></text:span><text:span text:style-name="T52">"""Calculate the square of a number"""</text:span></text:p>
      <text:p text:style-name="P53"><text:span text:style-name="T54">   <text:s/></text:span><text:span text:style-name="T55">return</text:span><text:span text:style-name="T56"><text:s/>x **<text:s/></text:span><text:span text:style-name="T57">2</text:span></text:p>
      <text:p text:style-name="P58"/>
      <text:h text:style-name="Titre1" text:outline-level="1"><text:bookmark-start text:name="_Toc227069540"/><text:bookmark-start text:name="_Toc227070421"/><text:span text:style-name="T59">PARTIE 2 :<text:s/></text:span>Création d<text:bookmark-end text:name="_Toc227069540"/>es sous agents<text:bookmark-end text:name="_Toc227070421"/><text:s/></text:h>
      <text:p text:style-name="P60"><text:span text:style-name="T61">from</text:span><text:span text:style-name="T62"><text:s/>langchain.agents<text:s/></text:span><text:span text:style-name="T63">import</text:span><text:span text:style-name="T64"><text:s/>create_agent</text:span></text:p>
      <text:p text:style-name="P65"><text:span text:style-name="T66">from</text:span><text:span text:style-name="T67"><text:s/>langchain_ollama<text:s/></text:span><text:span text:style-name="T68">import</text:span><text:span text:style-name="T69"><text:s/>ChatOllama</text:span></text:p>
      <text:p text:style-name="P70"/>
      <text:p text:style-name="P71">model = ChatOllama(</text:p>
      <text:p text:style-name="P72"><text:span text:style-name="T73">    model=</text:span><text:span text:style-name="T74">"llama3.2:3b"</text:span><text:span text:style-name="T75">,  <text:s/></text:span></text:p>
      <text:p text:style-name="P76">   <text:s/></text:p>
      <text:p text:style-name="P77">)</text:p>
      <text:p text:style-name="P78"/>
      <text:p text:style-name="P79"/>
      <text:p text:style-name="P80">subagent_1 = create_agent(</text:p>
      <text:p text:style-name="P81"><text:span text:style-name="T82">    model=</text:span><text:span text:style-name="T83">'gpt-5-nano'</text:span><text:span text:style-name="T84">,</text:span></text:p>
      <text:p text:style-name="P85">    tools=[square_root]</text:p>
      <text:p text:style-name="P86">)</text:p>
      <text:p text:style-name="P87"/>
      <text:p text:style-name="P88">subagent_2 = create_agent(</text:p>
      <text:p text:style-name="P89"><text:span text:style-name="T90">    model=</text:span><text:span text:style-name="T91">'gpt-5-nano'</text:span><text:span text:style-name="T92">,</text:span></text:p>
      <text:p text:style-name="P93"><text:span text:style-name="T94">   <text:s/></text:span><text:span text:style-name="T95">tools=[square]</text:span></text:p>
      <text:p text:style-name="P96">)</text:p>
      <text:p text:style-name="Normal"/>
      <text:p text:style-name="Normal"/>
      <text:h text:style-name="P97" text:outline-level="1"><text:bookmark-start text:name="_Toc227069542"/></text:h>
      <text:p text:style-name="P98"/>
      <text:h text:style-name="P99" text:outline-level="1"><text:bookmark-start text:name="_Toc227070422"/><text:soft-page-break/>PARTIE<text:s/>3 :<text:s/><text:bookmark-end text:name="_Toc227069542"/>Créer l’agent principal<text:bookmark-end text:name="_Toc227070422"/></text:h>
      <text:p text:style-name="P100"/>
      <text:p text:style-name="P101">@tool</text:p>
      <text:p text:style-name="P102"><text:span text:style-name="T103">def</text:span><text:span text:style-name="T104"><text:s/>call_subagent_1(x: float) -&gt; float:</text:span></text:p>
      <text:p text:style-name="P105"><text:span text:style-name="T106">   <text:s/></text:span><text:span text:style-name="T107">"""Call subagent 1 in order to calculate the square root of a number"""</text:span></text:p>
      <text:p text:style-name="P108"><text:span text:style-name="T109">    response = subagent_1.invoke({</text:span><text:span text:style-name="T110">"messages"</text:span><text:span text:style-name="T111">: [HumanMessage(content=</text:span><text:span text:style-name="T112">f</text:span><text:span text:style-name="T113">"Calculate the square root of<text:s/></text:span><text:span text:style-name="T114">{x}</text:span><text:span text:style-name="T115">"</text:span><text:span text:style-name="T116">)]})</text:span></text:p>
      <text:p text:style-name="P117"><text:span text:style-name="T118">   <text:s/></text:span><text:span text:style-name="T119">return</text:span><text:span text:style-name="T120"><text:s/>response[</text:span><text:span text:style-name="T121">"messages"</text:span><text:span text:style-name="T122">][-</text:span><text:span text:style-name="T123">1</text:span><text:span text:style-name="T124">].content</text:span></text:p>
      <text:p text:style-name="P125"/>
      <text:p text:style-name="P126">@tool</text:p>
      <text:p text:style-name="P127"><text:span text:style-name="T128">def</text:span><text:span text:style-name="T129"><text:s/>call_subagent_2(x: float) -&gt; float:</text:span></text:p>
      <text:p text:style-name="P130"><text:span text:style-name="T131">   <text:s/></text:span><text:span text:style-name="T132">"""Call subagent 2 in order to calculate the square of a number"""</text:span></text:p>
      <text:p text:style-name="P133"><text:span text:style-name="T134">    response = subagent_2.invoke({</text:span><text:span text:style-name="T135">"messages"</text:span><text:span text:style-name="T136">: [HumanMessage(content=</text:span><text:span text:style-name="T137">f</text:span><text:span text:style-name="T138">"Calculate the square of<text:s/></text:span><text:span text:style-name="T139">{x}</text:span><text:span text:style-name="T140">"</text:span><text:span text:style-name="T141">)]})</text:span></text:p>
      <text:p text:style-name="P142"><text:span text:style-name="T143">   <text:s/></text:span><text:span text:style-name="T144">return</text:span><text:span text:style-name="T145"><text:s/>response[</text:span><text:span text:style-name="T146">"messages"</text:span><text:span text:style-name="T147">][-</text:span><text:span text:style-name="T148">1</text:span><text:span text:style-name="T149">].content</text:span></text:p>
      <text:p text:style-name="P150"/>
      <text:p text:style-name="P151"/>
      <text:p text:style-name="P152">main_agent = create_agent(</text:p>
      <text:p text:style-name="P153"><text:span text:style-name="T154">    model=</text:span><text:span text:style-name="T155">'gpt-5-nano'</text:span><text:span text:style-name="T156">,</text:span></text:p>
      <text:p text:style-name="P157">    tools=[call_subagent_1, call_subagent_2],</text:p>
      <text:p text:style-name="P158"><text:span text:style-name="T159">    system_prompt=</text:span><text:span text:style-name="T160">"You are a helpful assistant who can call subagents to calculate the square root or square of a number."</text:span><text:span text:style-name="T161">)</text:span></text:p>
      <text:p text:style-name="P162"/>
      <text:p text:style-name="P163"/>
      <text:h text:style-name="Titre1" text:outline-level="1"><text:bookmark-start text:name="_Toc227069543"/><text:bookmark-start text:name="_Toc227070423"/><text:span text:style-name="T164">PARTIE<text:s/></text:span><text:span text:style-name="T165">4</text:span><text:span text:style-name="T166"> :</text:span><text:span text:style-name="T167"><text:s/>Appeler les agents et afficher<text:s/></text:span>le résultat<text:bookmark-end text:name="_Toc227069543"/><text:bookmark-end text:name="_Toc227070423"/></text:h>
      <text:p text:style-name="P168"/>
      <text:p text:style-name="P169"><text:span text:style-name="T170">question =<text:s/></text:span><text:span text:style-name="T171">"What is the square root of 456?"</text:span></text:p>
      <text:p text:style-name="P172"/>
      <text:p text:style-name="P173"><text:span text:style-name="T174">response = main_agent.invoke({</text:span><text:span text:style-name="T175">"messages"</text:span><text:span text:style-name="T176">: [HumanMessage(content=question)]})</text:span></text:p>
      <text:p text:style-name="P177"><text:span text:style-name="T178">print(response[</text:span><text:span text:style-name="T179">'messages'</text:span><text:span text:style-name="T180">][-</text:span><text:span text:style-name="T181">1</text:span><text:span text:style-name="T182">].content)</text:span></text:p>
      <text:p text:style-name="P1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365F9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365F9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365F9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mbria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365F91"/>
    </style:style>
    <style:style style:name="Citationintense" style:display-name="Citation intens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365F9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365F9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fo:hyphenate="false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style:vertical-align="auto" fo:margin-top="0.1666in" fo:margin-bottom="0in" fo:line-height="102%"/>
      <style:text-properties style:font-name="Calibri Light" fo:color="#2F5496" fo:font-size="16pt" style:font-size-asian="16pt" style:font-size-complex="16pt" fo:language="fr" fo:country="MA" style:language-asian="fr" style:country-asian="MA" fo:hyphenate="tru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En-tête" style:family="paragraph">
      <style:paragraph-properties>
        <style:tab-stops>
          <style:tab-stop style:type="center" style:position="3.15in"/>
        </style:tab-stops>
      </style:paragraph-properties>
    </style:style>
    <style:style style:name="T3" style:parent-style-name="Policepardéfaut" style:family="text">
      <style:text-properties fo:language="en" fo:country="US"/>
    </style:style>
    <style:style style:name="T4" style:parent-style-name="Policepardéfaut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P2"><text:span text:style-name="T3">SMA et IAD</text:span><text:span text:style-name="T4"><text:tab/>Master SDIA Prof. RETAL SAR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 Ob</meta:initial-creator>
    <dc:creator>user</dc:creator>
    <meta:creation-date>2025-03-18T10:48:00Z</meta:creation-date>
    <dc:date>2026-04-14T13:48:00Z</dc:date>
    <meta:print-date>2026-04-03T14:32:00Z</meta:print-date>
    <meta:template xlink:href="Normal" xlink:type="simple"/>
    <meta:editing-cycles>52</meta:editing-cycles>
    <meta:editing-duration>PT46440S</meta:editing-duration>
    <meta:document-statistic meta:page-count="3" meta:paragraph-count="4" meta:word-count="329" meta:character-count="2140" meta:row-count="15" meta:non-whitespace-character-count="1815"/>
  </office:meta>
</office:document-meta>
</file>