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13" style:parent-style-name="Policepardéfaut" style:family="text">
      <style:text-properties fo:language="fr" fo:country="FR"/>
    </style:style>
    <style:style style:name="P14" style:parent-style-name="Normal" style:family="paragraph">
      <style:text-properties style:language-asian="fr" style:country-asian="MA"/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6" style:parent-style-name="Lienhypertexte" style:family="text">
      <style:text-properties fo:language="fr" fo:country="MA"/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8" style:parent-style-name="Lienhypertexte" style:family="text">
      <style:text-properties fo:language="fr" fo:country="MA"/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0" style:parent-style-name="Lienhypertexte" style:family="text">
      <style:text-properties fo:language="fr" fo:country="MA"/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2" style:parent-style-name="Lienhypertexte" style:family="text">
      <style:text-properties fo:language="fr" fo:country="MA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P24" style:parent-style-name="Titre2" style:family="paragraph">
      <style:text-properties fo:font-size="20pt" style:font-size-asian="20pt" style:font-size-complex="20pt"/>
    </style:style>
    <style:style style:name="P25" style:parent-style-name="Titre2" style:family="paragraph">
      <style:text-properties fo:font-size="20pt" style:font-size-asian="20pt" style:font-size-complex="20pt"/>
    </style:style>
    <style:style style:name="T26" style:parent-style-name="Policepardéfaut" style:family="text">
      <style:text-properties fo:language="fr" fo:country="MA"/>
    </style:style>
    <style:style style:name="P27" style:parent-style-name="Normal" style:family="paragraph">
      <style:text-properties fo:language="fr" fo:country="MA"/>
    </style:style>
    <style:style style:name="P28" style:parent-style-name="Normal" style:family="paragraph">
      <style:text-properties fo:language="fr" fo:country="MA"/>
    </style:style>
    <style:style style:name="P29" style:parent-style-name="Normal" style:list-style-name="LFO1" style:family="paragraph">
      <style:text-properties fo:language="fr" fo:country="MA"/>
    </style:style>
    <style:style style:name="P30" style:parent-style-name="Normal" style:list-style-name="LFO1" style:family="paragraph">
      <style:text-properties fo:language="fr" fo:country="MA"/>
    </style:style>
    <style:style style:name="P31" style:parent-style-name="Normal" style:list-style-name="LFO1" style:family="paragraph">
      <style:text-properties fo:language="fr" fo:country="MA"/>
    </style:style>
    <style:style style:name="P32" style:parent-style-name="Normal" style:list-style-name="LFO1" style:family="paragraph">
      <style:text-properties fo:language="fr" fo:country="MA"/>
    </style:style>
    <style:style style:name="P33" style:parent-style-name="Normal" style:list-style-name="LFO1" style:family="paragraph">
      <style:text-properties fo:language="fr" fo:country="MA"/>
    </style:style>
    <style:style style:name="P34" style:parent-style-name="Normal" style:family="paragraph">
      <style:text-properties fo:language="fr" fo:country="MA"/>
    </style:style>
    <style:style style:name="P35" style:parent-style-name="Normal" style:family="paragraph">
      <style:text-properties fo:language="fr" fo:country="MA"/>
    </style:style>
    <style:style style:name="P36" style:parent-style-name="Normal" style:family="paragraph">
      <style:text-properties fo:language="fr" fo:country="MA"/>
    </style:style>
    <style:style style:name="P37" style:parent-style-name="Normal" style:family="paragraph">
      <style:text-properties fo:language="fr" fo:country="MA"/>
    </style:style>
    <style:style style:name="P38" style:parent-style-name="Normal" style:family="paragraph">
      <style:text-properties fo:language="fr" fo:country="MA"/>
    </style:style>
    <style:style style:name="P39" style:parent-style-name="Normal" style:family="paragraph">
      <style:text-properties fo:language="fr" fo:country="MA"/>
    </style:style>
    <style:style style:name="P40" style:parent-style-name="Normal" style:family="paragraph">
      <style:text-properties fo:language="fr" fo:country="MA"/>
    </style:style>
    <style:style style:name="P41" style:parent-style-name="Normal" style:family="paragraph">
      <style:text-properties fo:language="fr" fo:country="MA"/>
    </style:style>
    <style:style style:name="P42" style:parent-style-name="Normal" style:family="paragraph">
      <style:text-properties fo:language="fr" fo:country="MA"/>
    </style:style>
    <style:style style:name="P43" style:parent-style-name="Normal" style:family="paragraph">
      <style:text-properties fo:language="fr" fo:country="MA"/>
    </style:style>
    <style:style style:name="P44" style:parent-style-name="Normal" style:family="paragraph">
      <style:text-properties fo:language="fr" fo:country="MA"/>
    </style:style>
    <style:style style:name="P45" style:parent-style-name="Normal" style:family="paragraph">
      <style:text-properties fo:language="fr" fo:country="MA"/>
    </style:style>
    <style:style style:name="P46" style:parent-style-name="Normal" style:family="paragraph">
      <style:text-properties fo:language="fr" fo:country="MA"/>
    </style:style>
    <style:style style:name="P47" style:parent-style-name="Normal" style:family="paragraph">
      <style:text-properties fo:language="fr" fo:country="MA"/>
    </style:style>
    <style:style style:name="P48" style:parent-style-name="Normal" style:family="paragraph">
      <style:text-properties fo:language="fr" fo:country="MA"/>
    </style:style>
    <style:style style:name="P49" style:parent-style-name="Normal" style:family="paragraph">
      <style:text-properties fo:language="fr" fo:country="MA"/>
    </style:style>
    <style:style style:name="P50" style:parent-style-name="Normal" style:family="paragraph">
      <style:text-properties fo:language="fr" fo:country="MA"/>
    </style:style>
    <style:style style:name="P51" style:parent-style-name="Normal" style:family="paragraph">
      <style:text-properties fo:language="fr" fo:country="MA"/>
    </style:style>
    <style:style style:name="T52" style:parent-style-name="Policepardéfaut" style:family="text">
      <style:text-properties fo:language="fr" fo:country="MA"/>
    </style:style>
    <style:style style:name="T53" style:parent-style-name="Policepardéfaut" style:family="text">
      <style:text-properties fo:language="fr" fo:country="MA"/>
    </style:style>
    <style:style style:name="P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5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5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6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6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6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6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4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8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8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8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3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01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P10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03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0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0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0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0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1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1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P1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1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P11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1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P11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2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2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T122" style:parent-style-name="Policepardéfaut" style:family="text">
      <style:text-properties fo:language="fr" fo:country="MA"/>
    </style:style>
    <style:style style:name="P123" style:parent-style-name="Normal" style:family="paragraph">
      <style:text-properties fo:language="fr" fo:country="MA"/>
    </style:style>
    <style:style style:name="P124" style:parent-style-name="Normal" style:family="paragraph">
      <style:text-properties fo:language="fr" fo:country="MA"/>
    </style:style>
    <style:style style:name="P125" style:parent-style-name="Normal" style:list-style-name="LFO2" style:family="paragraph">
      <style:text-properties fo:language="fr" fo:country="MA"/>
    </style:style>
    <style:style style:name="P126" style:parent-style-name="Normal" style:list-style-name="LFO2" style:family="paragraph">
      <style:text-properties fo:language="fr" fo:country="MA"/>
    </style:style>
    <style:style style:name="P127" style:parent-style-name="Normal" style:list-style-name="LFO2" style:family="paragraph">
      <style:text-properties fo:language="fr" fo:country="MA"/>
    </style:style>
    <style:style style:name="P128" style:parent-style-name="Normal" style:list-style-name="LFO2" style:family="paragraph">
      <style:text-properties fo:language="fr" fo:country="MA"/>
    </style:style>
    <style:style style:name="P12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3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3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33" style:parent-style-name="Policepardéfaut" style:family="text">
      <style:text-properties style:font-name="Consolas" style:font-name-asian="Times New Roman" fo:color="#0451A5" fo:font-size="10.5pt" style:font-size-asian="10.5pt" style:font-size-complex="10.5pt" fo:language="fr" fo:country="MA" style:language-asian="fr" style:country-asian="MA"/>
    </style:style>
    <style:style style:name="T1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3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37" style:parent-style-name="Policepardéfaut" style:family="text">
      <style:text-properties style:font-name="Consolas" style:font-name-asian="Times New Roman" fo:color="#0451A5" fo:font-size="10.5pt" style:font-size-asian="10.5pt" style:font-size-complex="10.5pt" fo:language="fr" fo:country="MA" style:language-asian="fr" style:country-asian="MA"/>
    </style:style>
    <style:style style:name="T1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3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P14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4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4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45" style:parent-style-name="Policepardéfaut" style:family="text">
      <style:text-properties style:font-name="Consolas" style:font-name-asian="Times New Roman" fo:color="#0451A5" fo:font-size="10.5pt" style:font-size-asian="10.5pt" style:font-size-complex="10.5pt" fo:language="fr" fo:country="MA" style:language-asian="fr" style:country-asian="MA"/>
    </style:style>
    <style:style style:name="T14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4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4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51" style:parent-style-name="Policepardéfaut" style:family="text">
      <style:text-properties style:font-name="Consolas" style:font-name-asian="Times New Roman" fo:color="#0451A5" fo:font-size="10.5pt" style:font-size-asian="10.5pt" style:font-size-complex="10.5pt" fo:language="fr" fo:country="MA" style:language-asian="fr" style:country-asian="MA"/>
    </style:style>
    <style:style style:name="T15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5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55" style:parent-style-name="Policepardéfaut" style:family="text">
      <style:text-properties style:font-name="Consolas" style:font-name-asian="Times New Roman" fo:color="#0451A5" fo:font-size="10.5pt" style:font-size-asian="10.5pt" style:font-size-complex="10.5pt" fo:language="fr" fo:country="MA" style:language-asian="fr" style:country-asian="MA"/>
    </style:style>
    <style:style style:name="T1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5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5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61" style:parent-style-name="Policepardéfaut" style:family="text">
      <style:text-properties style:font-name="Consolas" style:font-name-asian="Times New Roman" fo:color="#0451A5" fo:font-size="10.5pt" style:font-size-asian="10.5pt" style:font-size-complex="10.5pt" fo:language="fr" fo:country="MA" style:language-asian="fr" style:country-asian="MA"/>
    </style:style>
    <style:style style:name="T16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6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P16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6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66" style:parent-style-name="Normal" style:family="paragraph">
      <style:text-properties fo:language="fr" fo:country="MA"/>
    </style:style>
    <style:style style:name="P167" style:parent-style-name="Titre1" style:family="paragraph">
      <style:text-properties fo:language="fr" fo:country="MA"/>
    </style:style>
    <style:style style:name="P168" style:parent-style-name="Normal" style:family="paragraph">
      <style:text-properties fo:language="fr" fo:country="MA"/>
    </style:style>
    <style:style style:name="P169" style:parent-style-name="Normal" style:family="paragraph">
      <style:text-properties fo:language="fr" fo:country="MA"/>
    </style:style>
    <style:style style:name="P170" style:parent-style-name="Normal" style:family="paragraph">
      <style:text-properties fo:language="fr" fo:country="MA"/>
    </style:style>
    <style:style style:name="T171" style:parent-style-name="Policepardéfaut" style:family="text">
      <style:text-properties fo:language="fr" fo:country="M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LAB :</text:span><text:span text:style-name="T6"><text:s/>Visualiser, tester et déboguer des agents avec L</text:span><text:span text:style-name="T7">ang</text:span><text:span text:style-name="T8">G</text:span><text:span text:style-name="T9">raph</text:span><text:span text:style-name="T10"><text:s/>Studio</text:span></text:p>
      <text:p text:style-name="P11"/>
      <text:p text:style-name="P12"/>
      <text:p text:style-name="En-têtedetabledesmatières"><text:span text:style-name="T13">Table des matières</text:span></text:p>
      <text:p text:style-name="P14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227067572" office:target-frame-name="_top" xlink:show="replace"><text:span text:style-name="T16">PARTIE 1 :<text:s/></text:span><text:span text:style-name="Lienhypertexte">Créer un compte est importer une clé</text:span><text:tab/>2</text:a></text:p>
          <text:p text:style-name="P17"><text:a xlink:href="#_Toc227067573" office:target-frame-name="_top" xlink:show="replace"><text:span text:style-name="T18">PARTIE 2 :<text:s/></text:span><text:span text:style-name="Lienhypertexte">Créer un agent</text:span><text:tab/>3</text:a></text:p>
          <text:p text:style-name="P19"><text:a xlink:href="#_Toc227067574" office:target-frame-name="_top" xlink:show="replace"><text:span text:style-name="T20">PARTIE 2 : Fichier de configuration du graphe LangGraph</text:span><text:tab/>4</text:a></text:p>
          <text:p text:style-name="P21"><text:a xlink:href="#_Toc227067575" office:target-frame-name="_top" xlink:show="replace"><text:span text:style-name="T22">PARTIE 2 : Installer et lancer LangGraph Studio</text:span><text:tab/>4</text:a></text:p>
        </text:index-body>
      </text:table-of-content>
      <text:p text:style-name="Normal"/>
      <text:p text:style-name="P23"/>
      <text:h text:style-name="Titre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226121170"/></text:h>
      <text:p text:style-name="Normal"/>
      <text:p text:style-name="Normal"/>
      <text:p text:style-name="Normal"/>
      <text:h text:style-name="P24" text:outline-level="2"><text:bookmark-start text:name="_Toc226121171"/><text:bookmark-end text:name="_Toc226121170"/></text:h>
      <text:p text:style-name="Normal"/>
      <text:h text:style-name="P25" text:outline-level="2"/>
      <text:h text:style-name="Titre1" text:outline-level="1"><text:bookmark-start text:name="_Toc226122703"/><text:bookmark-start text:name="_Toc227065606"/><text:bookmark-start text:name="_Toc227067572"/><text:span text:style-name="T26">PARTIE 1 :<text:s/></text:span><text:bookmark-end text:name="_Toc226122703"/>Créer un compte est importer une clé<text:bookmark-end text:name="_Toc227065606"/><text:bookmark-end text:name="_Toc227067572"/></text:h>
      <text:p text:style-name="P27"><text:bookmark-end text:name="_Toc226121171"/></text:p>
      <text:p text:style-name="P28">LangGraph<text:s/>Studio est un environnement graphique interactif où tu peux :</text:p>
      <text:list text:style-name="LFO1" text:continue-numbering="true">
        <text:list-item>
          <text:p text:style-name="P29">exécuter ton agent étape par étape<text:s/></text:p>
        </text:list-item>
        <text:list-item>
          <text:p text:style-name="P30">voir le flux du graphe (nodes, edges)<text:s/></text:p>
        </text:list-item>
        <text:list-item>
          <text:p text:style-name="P31">envoyer des messages (HumanMessage)<text:s/></text:p>
        </text:list-item>
        <text:list-item>
          <text:p text:style-name="P32">inspecter les inputs/outputs de chaque node<text:s/></text:p>
        </text:list-item>
        <text:list-item>
          <text:p text:style-name="P33">déboguer les outils et le RAG</text:p>
        </text:list-item>
      </text:list>
      <text:p text:style-name="P34">1. Aller sur le site officiel</text:p>
      <text:p text:style-name="P35"><text:s/>https://smith.langchain.com/</text:p>
      <text:p text:style-name="P36">2. Se connecter / créer un compte</text:p>
      <text:p text:style-name="P37">Clique sur Sign up si tu n’as pas de compte</text:p>
      <text:p text:style-name="P38">Ou Log in si tu en as déjà un</text:p>
      <text:p text:style-name="P39"><text:s/>Tu peux te connecter avec :Google, GitHub ou Email</text:p>
      <text:p text:style-name="P40">3. Accéder aux paramètres</text:p>
      <text:p text:style-name="P41">Une fois connecté :</text:p>
      <text:p text:style-name="P42">Clique sur ton profil (en bas à gauche ou en haut)</text:p>
      <text:p text:style-name="P43">Va dans Settings</text:p>
      <text:p text:style-name="P44">4. Ouvrir la section API Keys</text:p>
      <text:p text:style-name="P45">Dans le menu :</text:p>
      <text:p text:style-name="P46"><text:s/>Clique sur : API Keys</text:p>
      <text:p text:style-name="P47">5. Générer une nouvelle clé</text:p>
      <text:p text:style-name="P48">Clique sur Create API Key</text:p>
      <text:p text:style-name="P49">Donne un nom (ex : langgraph-project)</text:p>
      <text:p text:style-name="P50">Valide</text:p>
      <text:p text:style-name="P51">6. Ajoute la clé dans le projet :<text:s/></text:p>
      <text:soft-page-break/>
      <text:p text:style-name="Normal"><text:span text:style-name="T52"><draw:frame draw:style-name="a0" draw:name="Image 1" text:anchor-type="as-char" svg:x="0in" svg:y="0in" svg:width="6.3in" svg:height="1.42917in" style:rel-width="scale" style:rel-height="scale"><draw:image xlink:href="media/image1.png" xlink:type="simple" xlink:show="embed" xlink:actuate="onLoad"/><svg:title/><svg:desc/></draw:frame></text:span></text:p>
      <text:h text:style-name="Titre1" text:outline-level="1"><text:bookmark-start text:name="_Toc227065607"/><text:bookmark-start text:name="_Toc227067573"/><text:span text:style-name="T53">PARTIE 2 :<text:s/></text:span>Créer un agent<text:bookmark-end text:name="_Toc227065607"/><text:bookmark-end text:name="_Toc227067573"/><text:s/></text:h>
      <text:p text:style-name="Normal">Dans un fichier agent_simple.py ajoute le code suivant :<text:s/></text:p>
      <text:p text:style-name="P54"><text:span text:style-name="T55">from</text:span><text:span text:style-name="T56"><text:s/>langchain_ollama<text:s/></text:span><text:span text:style-name="T57">import</text:span><text:span text:style-name="T58"><text:s/>ChatOllama</text:span></text:p>
      <text:p text:style-name="P59"><text:span text:style-name="T60">from</text:span><text:span text:style-name="T61"><text:s/>langchain.messages<text:s/></text:span><text:span text:style-name="T62">import</text:span><text:span text:style-name="T63"><text:s/>HumanMessage</text:span></text:p>
      <text:p text:style-name="P64"><text:span text:style-name="T65">from</text:span><text:span text:style-name="T66"><text:s/>langchain.tools<text:s/></text:span><text:span text:style-name="T67">import</text:span><text:span text:style-name="T68"><text:s/>tool</text:span></text:p>
      <text:p text:style-name="P69"><text:span text:style-name="T70">from</text:span><text:span text:style-name="T71"><text:s/>langchain.agents<text:s/></text:span><text:span text:style-name="T72">import</text:span><text:span text:style-name="T73"><text:s/>create_agent</text:span></text:p>
      <text:p text:style-name="P74"/>
      <text:p text:style-name="P75">@tool</text:p>
      <text:p text:style-name="P76"><text:span text:style-name="T77">def</text:span><text:span text:style-name="T78"><text:s/>rag_search_opt(query: str) -&gt; str:</text:span></text:p>
      <text:p text:style-name="P79"><text:span text:style-name="T80">   <text:s/></text:span><text:span text:style-name="T81">"""Recherche des informations dans le texte."""</text:span><text:span text:style-name="T82"><text:s/> </text:span></text:p>
      <text:p text:style-name="P83"><text:span text:style-name="T84">    results =<text:s/></text:span><text:span text:style-name="T85">"Le personnage principale est un jeune homme nommé Jack, qui découvre un ancien artefact magique.<text:s/></text:span><text:span text:style-name="T86">"</text:span><text:span text:style-name="T87"><text:s/>\</text:span></text:p>
      <text:p text:style-name="P88"> </text:p>
      <text:p text:style-name="P89"><text:span text:style-name="T90">   <text:s/></text:span><text:span text:style-name="T91">return</text:span><text:span text:style-name="T92"><text:s/>results</text:span></text:p>
      <text:p text:style-name="P93"/>
      <text:p text:style-name="P94">llm = ChatOllama(</text:p>
      <text:p text:style-name="P95"><text:span text:style-name="T96">    model=</text:span><text:span text:style-name="T97">"llama3.2:latest"</text:span><text:span text:style-name="T98">,</text:span></text:p>
      <text:p text:style-name="P99"><text:span text:style-name="T100">    temperature=</text:span><text:span text:style-name="T101">0</text:span></text:p>
      <text:p text:style-name="P102">)</text:p>
      <text:p text:style-name="P103"/>
      <text:p text:style-name="P104">agent = create_agent(</text:p>
      <text:p text:style-name="P105">    model=llm,</text:p>
      <text:p text:style-name="P106">    tools=[rag_search_opt],</text:p>
      <text:p text:style-name="P107"><text:span text:style-name="T108">   <text:s/></text:span><text:span text:style-name="T109">system_prompt=(</text:span></text:p>
      <text:p text:style-name="P110"><text:span text:style-name="T111">       <text:s/></text:span><text:span text:style-name="T112">"Tu es un assistant spécialisé dans l'analyse de texte. "</text:span></text:p>
      <text:p text:style-name="P113"><text:span text:style-name="T114">       <text:s/></text:span><text:span text:style-name="T115">"Utilise l'outil rag_search_opt pour répondre aux questions en te basant sur le texte. "</text:span></text:p>
      <text:p text:style-name="P116"><text:span text:style-name="T117">       <text:s/></text:span><text:span text:style-name="T118">"Réponds de manière précise et cite les informations du contexte."</text:span></text:p>
      <text:p text:style-name="P119">    )</text:p>
      <text:p text:style-name="P120">)</text:p>
      <text:p text:style-name="P121"/>
      <text:p text:style-name="Normal"/>
      <text:h text:style-name="Titre1" text:outline-level="1"><text:bookmark-start text:name="_Toc227065608"/><text:bookmark-start text:name="_Toc227067574"/><text:soft-page-break/><text:span text:style-name="T122">PARTIE 2 : Fichier de configuration du graphe LangGraph</text:span><text:bookmark-end text:name="_Toc227065608"/><text:bookmark-end text:name="_Toc227067574"/></text:h>
      <text:p text:style-name="P123">Créer un fichier langgraph.json </text:p>
      <text:p text:style-name="P124">Il dit au système :</text:p>
      <text:list text:style-name="LFO2" text:continue-numbering="true">
        <text:list-item>
          <text:p text:style-name="P125">où se trouve ton agent<text:s/></text:p>
        </text:list-item>
        <text:list-item>
          <text:p text:style-name="P126">comment le charger<text:s/></text:p>
        </text:list-item>
        <text:list-item>
          <text:p text:style-name="P127">quel environnement utiliser<text:s/></text:p>
        </text:list-item>
        <text:list-item>
          <text:p text:style-name="P128">comment lancer le projet</text:p>
        </text:list-item>
      </text:list>
      <text:p text:style-name="Normal">Il sert de pont entre ton code Python et le runtime LangGraph Studio / CLI.</text:p>
      <text:p text:style-name="P129">{</text:p>
      <text:p text:style-name="P130"/>
      <text:p text:style-name="P131"><text:span text:style-name="T132">   <text:s/></text:span><text:span text:style-name="T133">"graphs"</text:span><text:span text:style-name="T134">: {</text:span></text:p>
      <text:p text:style-name="P135"><text:span text:style-name="T136">       <text:s/></text:span><text:span text:style-name="T137">"agent_simple"</text:span><text:span text:style-name="T138">:</text:span><text:span text:style-name="T139">"./agent_simple.py:agent"</text:span></text:p>
      <text:p text:style-name="P140"><text:span text:style-name="T141">   <text:s/></text:span><text:span text:style-name="T142">},</text:span></text:p>
      <text:p text:style-name="P143"><text:span text:style-name="T144">   <text:s/></text:span><text:span text:style-name="T145">"env"</text:span><text:span text:style-name="T146">:<text:s/></text:span><text:span text:style-name="T147">"./.env"</text:span><text:span text:style-name="T148">,</text:span></text:p>
      <text:p text:style-name="P149"><text:span text:style-name="T150">   <text:s/></text:span><text:span text:style-name="T151">"source"</text:span><text:span text:style-name="T152">: {</text:span></text:p>
      <text:p text:style-name="P153"><text:span text:style-name="T154">   <text:s/></text:span><text:span text:style-name="T155">"kind"</text:span><text:span text:style-name="T156">:<text:s/></text:span><text:span text:style-name="T157">"uv"</text:span><text:span text:style-name="T158">,</text:span></text:p>
      <text:p text:style-name="P159"><text:span text:style-name="T160">   <text:s/></text:span><text:span text:style-name="T161">"root"</text:span><text:span text:style-name="T162">:<text:s/></text:span><text:span text:style-name="T163">"."</text:span></text:p>
      <text:p text:style-name="P164">  }</text:p>
      <text:p text:style-name="P165">}</text:p>
      <text:p text:style-name="P166"/>
      <text:h text:style-name="P167" text:outline-level="1"><text:bookmark-start text:name="_Toc227065609"/><text:bookmark-start text:name="_Toc227067575"/>PARTIE 2 : Installer et lancer LangGraph<text:s/>Studio<text:bookmark-end text:name="_Toc227065609"/><text:bookmark-end text:name="_Toc227067575"/><text:s/></text:h>
      <text:p text:style-name="P168"/>
      <text:p text:style-name="P169">Au terminal, lancer uv add "langgraph-cli[inmem]" pour installer Langgraph CLI.<text:s/></text:p>
      <text:p text:style-name="P170">Puis lancer la commande langgraph dev pour lancer le serveur local.<text:s/></text:p>
      <text:soft-page-break/>
      <text:p text:style-name="Normal"><text:span text:style-name="T171"><draw:frame draw:style-name="a1" draw:name="Image 1" text:anchor-type="as-char" svg:x="0in" svg:y="0in" svg:width="6.3in" svg:height="5.23542in" style:rel-width="scale" style:rel-height="scale"><draw:image xlink:href="media/image2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365F9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365F9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365F91"/>
    </style:style>
    <style:style style:name="Citationintense" style:display-name="Citation intens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365F9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365F9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4%"/>
      <style:text-properties style:font-name="Calibri Light" fo:color="#2F5496" fo:font-size="16pt" style:font-size-asian="16pt" style:font-size-complex="16pt" fo:language="fr" fo:country="MA" style:language-asian="fr" style:country-asian="MA"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SMA et IAD</text:span><text:span text:style-name="T4"><text:tab/>Master SDIA Prof. RETAL SAR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 Ob</meta:initial-creator>
    <dc:creator>user</dc:creator>
    <meta:creation-date>2025-03-18T10:48:00Z</meta:creation-date>
    <dc:date>2026-04-14T12:59:00Z</dc:date>
    <meta:print-date>2026-04-03T14:32:00Z</meta:print-date>
    <meta:template xlink:href="Normal" xlink:type="simple"/>
    <meta:editing-cycles>45</meta:editing-cycles>
    <meta:editing-duration>PT43860S</meta:editing-duration>
    <meta:document-statistic meta:page-count="5" meta:paragraph-count="5" meta:word-count="452" meta:character-count="2936" meta:row-count="20" meta:non-whitespace-character-count="2489"/>
  </office:meta>
</office:document-meta>
</file>