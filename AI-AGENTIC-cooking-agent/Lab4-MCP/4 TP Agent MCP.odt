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9" style:parent-style-name="Policepardéfaut" style:family="text">
      <style:text-properties fo:language="fr" fo:country="FR"/>
    </style:style>
    <style:style style:name="P10" style:parent-style-name="Normal" style:family="paragraph">
      <style:text-properties style:language-asian="fr" style:country-asian="MA"/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2" style:parent-style-name="Lienhypertexte" style:family="text">
      <style:text-properties fo:language="fr" fo:country="MA"/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4" style:parent-style-name="Lienhypertexte" style:family="text">
      <style:text-properties fo:language="en" fo:country="US"/>
    </style:style>
    <style:style style:name="P1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6" style:parent-style-name="Lienhypertexte" style:family="text">
      <style:text-properties style:language-asian="fr" style:country-asian="MA"/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8" style:parent-style-name="Lienhypertexte" style:family="text">
      <style:text-properties fo:language="fr" fo:country="MA"/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2" style:parent-style-name="Lienhypertexte" style:family="text">
      <style:text-properties fo:language="fr" fo:country="MA"/>
    </style:style>
    <style:style style:name="P23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4" style:parent-style-name="Lienhypertexte" style:family="text">
      <style:text-properties style:language-asian="fr" style:country-asian="MA"/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6" style:parent-style-name="Lienhypertexte" style:family="text">
      <style:text-properties style:language-asian="fr" style:country-asian="MA"/>
    </style:style>
    <style:style style:name="P2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fr" fo:country="MA"/>
    </style:style>
    <style:style style:name="T30" style:parent-style-name="Policepardéfaut" style:family="text">
      <style:text-properties fo:language="fr" fo:country="MA"/>
    </style:style>
    <style:style style:name="P31" style:parent-style-name="Titre2" style:family="paragraph">
      <style:text-properties fo:language="en" fo:country="US"/>
    </style:style>
    <style:style style:name="P32" style:parent-style-name="Normal" style:family="paragraph">
      <style:paragraph-properties style:vertical-align="auto" fo:margin-bottom="0in" style:line-height-at-least="0.1979in" fo:background-color="#FFFFFF"/>
      <style:text-properties style:font-name="Cambria" style:font-name-asian="Times New Roman" fo:color="#365F91" fo:font-size="16pt" style:font-size-asian="16pt" style:font-size-complex="16pt" fo:language="en" fo:country="US" fo:hyphenate="true"/>
    </style:style>
    <style:style style:name="P3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4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4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4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4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2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5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5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5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6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6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7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7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7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8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8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9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9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9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9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96" style:parent-style-name="Normal" style:family="paragraph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color="#4472C4" fo:font-size="14pt" style:font-size-asian="14pt" style:font-size-complex="14pt" style:text-underline-type="single" style:text-underline-style="solid" style:text-underline-width="auto" style:text-underline-mode="continuous" fo:language="fr" fo:country="MA"/>
    </style:style>
    <style:style style:name="P97" style:parent-style-name="Titre2" style:family="paragraph">
      <style:text-properties style:language-asian="fr" style:country-asian="MA"/>
    </style:style>
    <style:style style:name="P98" style:parent-style-name="Normal" style:family="paragraph">
      <style:paragraph-properties style:vertical-align="auto" fo:margin-bottom="0in" style:line-height-at-least="0.1979in" fo:background-color="#FFFFFF"/>
      <style:text-properties style:font-name="Cambria" style:font-name-asian="Times New Roman" fo:color="#365F91" fo:font-size="16pt" style:font-size-asian="16pt" style:font-size-complex="16pt" style:language-asian="fr" style:country-asian="MA" fo:hyphenate="true"/>
    </style:style>
    <style:style style:name="P9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0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1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0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0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0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06" style:parent-style-name="Normal" style:family="paragraph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color="#4472C4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7" style:parent-style-name="Policepardéfaut" style:family="text">
      <style:text-properties fo:language="fr" fo:country="MA"/>
    </style:style>
    <style:style style:name="P10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10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111" style:parent-style-name="Normal" style:family="paragraph">
      <style:paragraph-properties style:line-height-at-least="0.1979in" fo:background-color="#FFFFFF"/>
      <style:text-properties fo:hyphenate="true"/>
    </style:style>
    <style:style style:name="T11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1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1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11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1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1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18" style:parent-style-name="Normal" style:family="paragraph">
      <style:paragraph-properties style:vertical-align="auto" fo:margin-bottom="0in" style:line-height-at-least="0.1979in" fo:background-color="#FFFFFF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color="#4472C4" fo:font-size="14pt" style:font-size-asian="14pt" style:font-size-complex="14pt" style:text-underline-type="single" style:text-underline-style="solid" style:text-underline-width="auto" style:text-underline-mode="continuous" fo:language="fr" fo:country="MA" fo:hyphenate="true"/>
    </style:style>
    <style:style style:name="P119" style:parent-style-name="Normal" style:family="paragraph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color="#4472C4" fo:font-size="14pt" style:font-size-asian="14pt" style:font-size-complex="14pt" style:text-underline-type="single" style:text-underline-style="solid" style:text-underline-width="auto" style:text-underline-mode="continuous" fo:language="fr" fo:country="MA"/>
    </style:style>
    <style:style style:name="P120" style:parent-style-name="Normal" style:family="paragraph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color="#4472C4" fo:font-size="14pt" style:font-size-asian="14pt" style:font-size-complex="14pt" style:text-underline-type="single" style:text-underline-style="solid" style:text-underline-width="auto" style:text-underline-mode="continuous" fo:language="fr" fo:country="MA"/>
    </style:style>
    <style:style style:name="P121" style:parent-style-name="Normal" style:family="paragraph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color="#4472C4" fo:font-size="14pt" style:font-size-asian="14pt" style:font-size-complex="14pt" style:text-underline-type="single" style:text-underline-style="solid" style:text-underline-width="auto" style:text-underline-mode="continuous" fo:language="fr" fo:country="MA"/>
    </style:style>
    <style:style style:name="P122" style:parent-style-name="Normal" style:family="paragraph">
      <style:paragraph-properties style:vertical-align="auto" fo:margin-bottom="0in" style:line-height-at-least="0.1979in" fo:background-color="#FFFFFF"/>
      <style:text-properties style:font-name="Cambria" style:font-name-asian="Times New Roman" fo:color="#365F91" fo:font-size="16pt" style:font-size-asian="16pt" style:font-size-complex="16pt" fo:hyphenate="true"/>
    </style:style>
    <style:style style:name="P12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25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12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2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12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3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3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3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3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3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36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13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38" style:parent-style-name="Normal" style:family="paragraph">
      <style:paragraph-properties style:vertical-align="auto" fo:margin-bottom="0in" style:line-height-at-least="0.1979in" fo:background-color="#FFFFFF"/>
      <style:text-properties style:font-name="Cambria" style:font-name-asian="Times New Roman" fo:color="#365F91" fo:font-size="16pt" style:font-size-asian="16pt" style:font-size-complex="16pt" fo:hyphenate="true"/>
    </style:style>
    <style:style style:name="P139" style:parent-style-name="Normal" style:family="paragraph">
      <style:paragraph-properties style:vertical-align="auto" fo:margin-bottom="0in" style:line-height-at-least="0.1979in" fo:background-color="#FFFFFF"/>
      <style:text-properties style:font-name="Cambria" style:font-name-asian="Times New Roman" fo:color="#365F91" fo:font-size="16pt" style:font-size-asian="16pt" style:font-size-complex="16pt" fo:hyphenate="true"/>
    </style:style>
    <style:style style:name="P14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1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14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4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4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14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47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14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5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51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en" fo:country="US" style:language-asian="fr" style:country-asian="MA"/>
    </style:style>
    <style:style style:name="P15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5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6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6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6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6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6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16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7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17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7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74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7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76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17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17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1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8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8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8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8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185" style:parent-style-name="Normal" style:family="paragraph">
      <style:text-properties fo:language="fr" fo:country="MA"/>
    </style:style>
    <style:style style:name="P186" style:parent-style-name="Normal" style:family="paragraph">
      <style:text-properties fo:font-weight="bold" style:font-weight-asian="bold" style:font-weight-complex="bold" fo:font-style="italic" style:font-style-asian="italic" style:font-style-complex="italic" fo:language="fr" fo:country="MA"/>
    </style:style>
    <style:style style:name="T187" style:parent-style-name="Policepardéfaut" style:family="text">
      <style:text-properties fo:language="fr" fo:country="MA"/>
    </style:style>
    <style:style style:name="T188" style:parent-style-name="Policepardéfaut" style:family="text">
      <style:text-properties style:language-asian="fr" style:country-asian="MA"/>
    </style:style>
    <style:style style:name="P18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19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9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19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19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19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19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19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0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0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0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0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0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0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0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0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1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1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1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1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1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1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1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1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21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22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2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2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2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2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2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2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3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3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3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3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3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3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3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3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3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4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4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4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4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4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4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4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4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5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25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5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5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5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5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58" style:parent-style-name="Normal" style:family="paragraph">
      <style:paragraph-properties style:vertical-align="auto" fo:margin-bottom="0in" style:line-height-at-least="0.1979in" fo:background-color="#FFFFFF"/>
      <style:text-properties style:font-name="Cambria" style:font-name-asian="Times New Roman" fo:color="#365F91" fo:font-size="16pt" style:font-size-asian="16pt" style:font-size-complex="16pt" style:language-asian="fr" style:country-asian="MA" fo:hyphenate="true"/>
    </style:style>
    <style:style style:name="P259" style:parent-style-name="Titre2" style:family="paragraph">
      <style:text-properties style:language-asian="fr" style:country-asian="MA"/>
    </style:style>
    <style:style style:name="P26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6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6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63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26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6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6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26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7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71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27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7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7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7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27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77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fr" fo:country="MA" style:language-asian="fr" style:country-asian="MA"/>
    </style:style>
    <style:style style:name="P27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7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8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8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8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8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8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28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28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9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9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9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29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29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29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2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299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0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03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0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0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06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0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0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1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11" style:parent-style-name="Policepardéfaut" style:family="text">
      <style:text-properties style:font-name="Consolas" style:font-name-asian="Times New Roman" fo:color="#098658" fo:font-size="10.5pt" style:font-size-asian="10.5pt" style:font-size-complex="10.5pt" fo:language="fr" fo:country="MA" style:language-asian="fr" style:country-asian="MA"/>
    </style:style>
    <style:style style:name="T31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1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1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15" style:parent-style-name="Normal" style:family="paragraph">
      <style:text-properties fo:font-weight="bold" style:font-weight-asian="bold" style:font-weight-complex="bold" fo:font-style="italic" style:font-style-asian="italic" style:font-style-complex="italic" fo:language="fr" fo:country="MA"/>
    </style:style>
    <style:style style:name="P316" style:parent-style-name="Normal" style:family="paragraph">
      <style:text-properties fo:language="fr" fo:country="MA"/>
    </style:style>
    <style:style style:name="P317" style:parent-style-name="Normal" style:family="paragraph">
      <style:text-properties fo:language="fr" fo:country="MA"/>
    </style:style>
    <style:style style:name="P318" style:parent-style-name="Normal" style:family="paragraph">
      <style:text-properties fo:language="fr" fo:country="MA"/>
    </style:style>
    <style:style style:name="P319" style:parent-style-name="Normal" style:family="paragraph">
      <style:text-properties fo:language="fr" fo:country="MA"/>
    </style:style>
    <style:style style:name="P320" style:parent-style-name="Normal" style:family="paragraph">
      <style:text-properties fo:language="fr" fo:country="MA"/>
    </style:style>
    <style:style style:name="P321" style:parent-style-name="Normal" style:family="paragraph">
      <style:text-properties fo:language="fr" fo:country="MA"/>
    </style:style>
    <style:style style:name="P322" style:parent-style-name="Normal" style:family="paragraph">
      <style:text-properties fo:language="fr" fo:country="MA"/>
    </style:style>
    <style:style style:name="P323" style:parent-style-name="Normal" style:family="paragraph">
      <style:text-properties fo:language="fr" fo:country="MA"/>
    </style:style>
    <style:style style:name="P324" style:parent-style-name="Normal" style:family="paragraph">
      <style:text-properties fo:language="fr" fo:country="MA"/>
    </style:style>
    <style:style style:name="P325" style:parent-style-name="Normal" style:family="paragraph">
      <style:text-properties fo:language="fr" fo:country="MA"/>
    </style:style>
    <style:style style:name="P326" style:parent-style-name="Normal" style:family="paragraph">
      <style:text-properties fo:language="fr" fo:country="MA"/>
    </style:style>
    <style:style style:name="P327" style:parent-style-name="Normal" style:family="paragraph">
      <style:text-properties fo:language="fr" fo:country="MA"/>
    </style:style>
    <style:style style:name="P328" style:parent-style-name="Normal" style:family="paragraph">
      <style:text-properties fo:language="fr" fo:country="MA"/>
    </style:style>
    <style:style style:name="P3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3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3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3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3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3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3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4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4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4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4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4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fr" fo:country="MA" style:language-asian="fr" style:country-asian="MA"/>
    </style:style>
    <style:style style:name="T34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4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4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5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5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5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53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5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5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5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5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58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5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60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6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62" style:parent-style-name="Normal" style:family="paragraph">
      <style:paragraph-properties style:vertical-align="auto" fo:margin-bottom="0.1666in" style:line-height-at-least="0.1979in" fo:background-color="#FFFFFF"/>
      <style:text-properties fo:hyphenate="true"/>
    </style:style>
    <style:style style:name="T36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6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65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6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6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6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7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71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7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37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7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7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7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7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7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7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8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8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fr" fo:country="MA" style:language-asian="fr" style:country-asian="MA"/>
    </style:style>
    <style:style style:name="T38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38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8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T38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38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8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38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8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9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9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39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9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94" style:parent-style-name="Policepardéfaut" style:family="text">
      <style:text-properties style:font-name="Consolas" style:font-name-asian="Times New Roman" fo:color="#008000" fo:font-size="10.5pt" style:font-size-asian="10.5pt" style:font-size-complex="10.5pt" fo:language="en" fo:country="US" style:language-asian="fr" style:country-asian="MA"/>
    </style:style>
    <style:style style:name="P39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9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397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39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39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0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01" style:parent-style-name="Normal" style:family="paragraph">
      <style:paragraph-properties style:vertical-align="auto" fo:margin-bottom="0.1666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0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0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0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0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0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0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0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1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P41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4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15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1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17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18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19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20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2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 fo:hyphenate="true"/>
    </style:style>
    <style:style style:name="P42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2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24" style:parent-style-name="Policepardéfau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fr" style:country-asian="MA"/>
    </style:style>
    <style:style style:name="T42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2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27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28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29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30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31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32" style:parent-style-name="Policepardéfaut" style:family="text">
      <style:text-properties style:font-name="Consolas" style:font-name-asian="Times New Roman" fo:color="#A31515" fo:font-size="10.5pt" style:font-size-asian="10.5pt" style:font-size-complex="10.5pt" fo:language="en" fo:country="US" style:language-asian="fr" style:country-asian="MA"/>
    </style:style>
    <style:style style:name="T433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P43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35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fr" style:country-asian="MA"/>
    </style:style>
    <style:style style:name="T436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  <style:style style:name="P43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43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43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44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 fo:hyphenate="true"/>
    </style:style>
    <style:style style:name="P44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42" style:parent-style-name="Policepardéfaut" style:family="text">
      <style:text-properties style:font-name="Consolas" style:font-name-asian="Times New Roman" fo:color="#000000" fo:font-size="10.5pt" style:font-size-asian="10.5pt" style:font-size-complex="10.5pt" fo:language="fr" fo:country="MA" style:language-asian="fr" style:country-asian="MA"/>
    </style:style>
  </office:automatic-styles>
  <office:body>
    <office:text text:use-soft-page-breaks="true">
      <text:p text:style-name="P1"><text:span text:style-name="T5">LAB :<text:s/></text:span><text:span text:style-name="T6">Le Model Context Protocol (MCP)</text:span></text:p>
      <text:p text:style-name="P7"/>
      <text:p text:style-name="P8"/>
      <text:p text:style-name="En-têtedetabledesmatières"><text:span text:style-name="T9">Table des matières</text:span></text:p>
      <text:p text:style-name="P1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230343521" office:target-frame-name="_top" xlink:show="replace"><text:span text:style-name="T12">PARTIE 1 :<text:s/></text:span><text:span text:style-name="Lienhypertexte">Intégration d’un serveur MCP local avec chargement dynamique de tools, resources et prompts</text:span><text:tab/>2</text:a></text:p>
          <text:p text:style-name="P13"><text:a xlink:href="#_Toc230343522" office:target-frame-name="_top" xlink:show="replace"><text:span text:style-name="T14">MCP local server via stdio</text:span><text:tab/>2</text:a></text:p>
          <text:p text:style-name="P15"><text:a xlink:href="#_Toc230343523" office:target-frame-name="_top" xlink:show="replace"><text:span text:style-name="T16">Récupération dynamique des tools</text:span><text:tab/>2</text:a></text:p>
          <text:p text:style-name="P17"><text:a xlink:href="#_Toc230343524" office:target-frame-name="_top" xlink:show="replace"><text:span text:style-name="T18">Resources MCP</text:span><text:tab/>2</text:a></text:p>
          <text:p text:style-name="P19"><text:a xlink:href="#_Toc230343525" office:target-frame-name="_top" xlink:show="replace"><text:span text:style-name="Lienhypertexte">Prompt dynamique côté serveur MCP</text:span><text:tab/>3</text:a></text:p>
          <text:p text:style-name="P20"><text:a xlink:href="#_Toc230343526" office:target-frame-name="_top" xlink:show="replace"><text:span text:style-name="Lienhypertexte">Agent LLM modulaire avec serveur MCP local (tools, resources et prompts dynamiques)</text:span><text:tab/>3</text:a></text:p>
          <text:p text:style-name="P21"><text:a xlink:href="#_Toc230343527" office:target-frame-name="_top" xlink:show="replace"><text:span text:style-name="T22">PARTIE 2 :<text:s/></text:span><text:span text:style-name="Lienhypertexte">Agent LLM avec outil MCP de temps (time server) pour interrogation de l’heure en zone spécifique</text:span><text:tab/>4</text:a></text:p>
          <text:p text:style-name="P23"><text:a xlink:href="#_Toc230343528" office:target-frame-name="_top" xlink:show="replace"><text:span text:style-name="T24">Configuration et initialisation d’un client MCP pour un serveur de temps avec gestion de timezone</text:span><text:tab/>4</text:a></text:p>
          <text:p text:style-name="P25"><text:a xlink:href="#_Toc230343529" office:target-frame-name="_top" xlink:show="replace"><text:span text:style-name="T26">Récupération dynamique des tools</text:span><text:tab/>4</text:a></text:p>
          <text:p text:style-name="P27"><text:a xlink:href="#_Toc230343530" office:target-frame-name="_top" xlink:show="replace"><text:span text:style-name="Lienhypertexte">Création et exécution d’un agent LLM avec outils MCP pour la consultation du temps local</text:span><text:tab/>5</text:a></text:p>
          <text:p text:style-name="P28"><text:a xlink:href="#_Toc230343531" office:target-frame-name="_top" xlink:show="replace"><text:span text:style-name="Lienhypertexte">PARTIE 3 : Agent pour se connecter à un serveur MCP distant via HTTP streaming</text:span><text:tab/>6</text:a></text:p>
        </text:index-body>
      </text:table-of-content>
      <text:p text:style-name="Normal"/>
      <text:p text:style-name="P29"/>
      <text:h text:style-name="Titre2" text:outline-level="2"/>
      <text:h text:style-name="Titre1" text:outline-level="1"><text:bookmark-start text:name="_Toc226121170"/></text:h>
      <text:p text:style-name="Normal"/>
      <text:p text:style-name="Normal"/>
      <text:h text:style-name="Titre1" text:outline-level="1"><text:bookmark-start text:name="_Toc226121171"/><text:bookmark-start text:name="_Toc226122703"/><text:bookmark-start text:name="_Toc230343521"/><text:bookmark-end text:name="_Toc226121170"/><text:soft-page-break/><text:span text:style-name="T30">PARTIE 1 :<text:s/></text:span>Intégration d’un serveur MCP local avec chargement dynamique de tools, resources et prompts<text:bookmark-end text:name="_Toc226122703"/><text:bookmark-end text:name="_Toc230343521"/></text:h>
      <text:h text:style-name="P31" text:outline-level="2"><text:bookmark-start text:name="_Toc226122704"/><text:bookmark-start text:name="_Toc230343522"/><text:bookmark-end text:name="_Toc226121171"/>MCP local server via stdio<text:bookmark-end text:name="_Toc226122704"/><text:bookmark-end text:name="_Toc230343522"/></text:h>
      <text:p text:style-name="P32"/>
      <text:p text:style-name="P33"><text:span text:style-name="T34">import</text:span><text:span text:style-name="T35"><text:s/>asyncio</text:span></text:p>
      <text:p text:style-name="P36"><text:span text:style-name="T37">from</text:span><text:span text:style-name="T38"><text:s/>langchain.agents<text:s/></text:span><text:span text:style-name="T39">import</text:span><text:span text:style-name="T40"><text:s/>create_agent</text:span></text:p>
      <text:p text:style-name="P41"><text:span text:style-name="T42">from</text:span><text:span text:style-name="T43"><text:s/>langchain_mcp_adapters.client<text:s/></text:span><text:span text:style-name="T44">import</text:span><text:span text:style-name="T45"><text:s/>MultiServerMCPClient</text:span></text:p>
      <text:p text:style-name="P46"><text:span text:style-name="T47">from</text:span><text:span text:style-name="T48"><text:s/>langchain.agents<text:s/></text:span><text:span text:style-name="T49">import</text:span><text:span text:style-name="T50"><text:s/>create_agent</text:span></text:p>
      <text:p text:style-name="P51"><text:span text:style-name="T52">from</text:span><text:span text:style-name="T53"><text:s/>langchain.messages<text:s/></text:span><text:span text:style-name="T54">import</text:span><text:span text:style-name="T55"><text:s/>HumanMessage</text:span></text:p>
      <text:p text:style-name="P56"><text:span text:style-name="T57">from</text:span><text:span text:style-name="T58"><text:s/>langchain_ollama<text:s/></text:span><text:span text:style-name="T59">import</text:span><text:span text:style-name="T60"><text:s/>ChatOllama</text:span></text:p>
      <text:p text:style-name="P61"/>
      <text:p text:style-name="P62"><text:span text:style-name="T63">async</text:span><text:span text:style-name="T64"><text:s/></text:span><text:span text:style-name="T65">def</text:span><text:span text:style-name="T66"><text:s/>main():</text:span></text:p>
      <text:p text:style-name="P67">    client = MultiServerMCPClient(</text:p>
      <text:p text:style-name="P68">        {</text:p>
      <text:p text:style-name="P69"><text:span text:style-name="T70">           <text:s/></text:span><text:span text:style-name="T71">"local_server"</text:span><text:span text:style-name="T72">: {</text:span></text:p>
      <text:p text:style-name="P73"><text:span text:style-name="T74">                   <text:s/></text:span><text:span text:style-name="T75">"transport"</text:span><text:span text:style-name="T76">:<text:s/></text:span><text:span text:style-name="T77">"stdio"</text:span><text:span text:style-name="T78">,</text:span></text:p>
      <text:p text:style-name="P79"><text:span text:style-name="T80">                   <text:s/></text:span><text:span text:style-name="T81">"command"</text:span><text:span text:style-name="T82">:<text:s/></text:span><text:span text:style-name="T83">"python"</text:span><text:span text:style-name="T84">,</text:span></text:p>
      <text:p text:style-name="P85"><text:span text:style-name="T86">                   <text:s/></text:span><text:span text:style-name="T87">"args"</text:span><text:span text:style-name="T88">: [</text:span><text:span text:style-name="T89">"resources/mcp_local_server.py"</text:span><text:span text:style-name="T90">],</text:span></text:p>
      <text:p text:style-name="P91"><text:span text:style-name="T92">               <text:s/></text:span><text:span text:style-name="T93">}</text:span></text:p>
      <text:p text:style-name="P94">        }</text:p>
      <text:p text:style-name="P95">    )</text:p>
      <text:p text:style-name="P96"/>
      <text:h text:style-name="P97" text:outline-level="2"><text:bookmark-start text:name="_Toc226122705"/><text:bookmark-start text:name="_Toc230343523"/>Récupération dynamique des tools<text:bookmark-end text:name="_Toc226122705"/><text:bookmark-end text:name="_Toc230343523"/></text:h>
      <text:p text:style-name="P98"/>
      <text:p text:style-name="P99"><text:span text:style-name="T100"><text:s text:c="4"/># get tools</text:span></text:p>
      <text:p text:style-name="P101"><text:span text:style-name="T102">   <text:s/></text:span><text:span text:style-name="T103">tools =<text:s/></text:span><text:span text:style-name="T104">await</text:span><text:span text:style-name="T105"><text:s/>client.get_tools()</text:span></text:p>
      <text:p text:style-name="P106"/>
      <text:h text:style-name="Titre2" text:outline-level="2"><text:bookmark-start text:name="_Toc226122706"/><text:bookmark-start text:name="_Toc230343524"/><text:span text:style-name="T107">Resources MCP</text:span><text:bookmark-end text:name="_Toc226122706"/><text:bookmark-end text:name="_Toc230343524"/></text:h>
      <text:p text:style-name="P108"><text:span text:style-name="T109">   <text:s/></text:span><text:span text:style-name="T110"># get resources</text:span></text:p>
      <text:p text:style-name="P111"><text:span text:style-name="T112">   <text:s/></text:span><text:span text:style-name="T113">resources =<text:s/></text:span><text:span text:style-name="T114">await</text:span><text:span text:style-name="T115"><text:s/>client.get_resources(</text:span><text:span text:style-name="T116">"local_server"</text:span><text:span text:style-name="T117">)</text:span></text:p>
      <text:p text:style-name="P118"/>
      <text:p text:style-name="P119"/>
      <text:p text:style-name="P120"/>
      <text:p text:style-name="P121"/>
      <text:h text:style-name="Titre2" text:outline-level="2"><text:bookmark-start text:name="_Toc226122707"/><text:bookmark-start text:name="_Toc230343525"/><text:soft-page-break/>Prompt dynamique côté serveur MCP<text:bookmark-end text:name="_Toc226122707"/><text:bookmark-end text:name="_Toc230343525"/></text:h>
      <text:p text:style-name="P122"/>
      <text:p text:style-name="P123"><text:span text:style-name="T124">  <text:s text:c="2"/></text:span><text:span text:style-name="T125"># get prompts</text:span></text:p>
      <text:p text:style-name="P126"><text:span text:style-name="T127">    prompt =<text:s/></text:span><text:span text:style-name="T128">await</text:span><text:span text:style-name="T129"><text:s/>client.get_prompt(</text:span><text:span text:style-name="T130">"local_server"</text:span><text:span text:style-name="T131">,<text:s/></text:span><text:span text:style-name="T132">"prompt"</text:span><text:span text:style-name="T133">)</text:span></text:p>
      <text:p text:style-name="P134"><text:span text:style-name="T135">    prompt = prompt[</text:span><text:span text:style-name="T136">0</text:span><text:span text:style-name="T137">].content</text:span></text:p>
      <text:p text:style-name="Normal"/>
      <text:p text:style-name="P138"/>
      <text:h text:style-name="Titre2" text:outline-level="2"><text:bookmark-start text:name="_Toc226122708"/><text:bookmark-start text:name="_Toc230343526"/>Agent LLM modulaire avec serveur MCP local (tools, resources et prompts dynamiques)<text:bookmark-end text:name="_Toc226122708"/><text:bookmark-end text:name="_Toc230343526"/></text:h>
      <text:p text:style-name="P139"/>
      <text:p text:style-name="P140"><text:span text:style-name="T141"><text:s text:c="4"/># Initialiser le modèle Ollama</text:span></text:p>
      <text:p text:style-name="P142">    model = ChatOllama(</text:p>
      <text:p text:style-name="P143"><text:span text:style-name="T144">    model=</text:span><text:span text:style-name="T145">"llama3.2:3b"</text:span><text:span text:style-name="T146">,  <text:s/></text:span><text:span text:style-name="T147"># ou mistral, gemma, etc.</text:span></text:p>
      <text:p text:style-name="P148"><text:span text:style-name="T149">   <text:s/></text:span><text:span text:style-name="T150">temperature=</text:span><text:span text:style-name="T151">0</text:span></text:p>
      <text:p text:style-name="P152">    )</text:p>
      <text:p text:style-name="P153"/>
      <text:p text:style-name="P154">    agent = create_agent(</text:p>
      <text:p text:style-name="P155">    model=model,</text:p>
      <text:p text:style-name="P156">    tools=tools,</text:p>
      <text:p text:style-name="P157">    system_prompt=prompt</text:p>
      <text:p text:style-name="P158">    )</text:p>
      <text:p text:style-name="P159"><text:span text:style-name="T160">    config = {</text:span><text:span text:style-name="T161">"configurable"</text:span><text:span text:style-name="T162">: {</text:span><text:span text:style-name="T163">"thread_id"</text:span><text:span text:style-name="T164">:<text:s/></text:span><text:span text:style-name="T165">"1"</text:span><text:span text:style-name="T166">}}</text:span></text:p>
      <text:p text:style-name="P167"/>
      <text:p text:style-name="P168"><text:span text:style-name="T169">    response =<text:s/></text:span><text:span text:style-name="T170">await</text:span><text:span text:style-name="T171"><text:s/>agent.ainvoke(</text:span></text:p>
      <text:p text:style-name="P172"><text:span text:style-name="T173">    {</text:span><text:span text:style-name="T174">"messages"</text:span><text:span text:style-name="T175">: [HumanMessage(content=</text:span><text:span text:style-name="T176">"Tell me about the langchain-mcp-adapters library"</text:span><text:span text:style-name="T177">)]},</text:span></text:p>
      <text:p text:style-name="P178"><text:span text:style-name="T179">   <text:s/></text:span><text:span text:style-name="T180">config=config</text:span></text:p>
      <text:p text:style-name="P181">    )</text:p>
      <text:p text:style-name="P182">    print(response)</text:p>
      <text:p text:style-name="P183"/>
      <text:p text:style-name="P184">asyncio.run(main())</text:p>
      <text:p text:style-name="P185"/>
      <text:p text:style-name="P186">N.B : uv run --active python agentMCP.py pour exécuter<text:s/></text:p>
      <text:h text:style-name="Titre1" text:outline-level="1"><text:bookmark-start text:name="_Toc226122709"/><text:bookmark-start text:name="_Toc230343527"/><text:soft-page-break/><text:span text:style-name="T187">PARTIE 2 :<text:s/></text:span>Agent LLM avec outil MCP de temps (time server) pour interrogation de l’heure en zone spécifique<text:bookmark-start text:name="_Toc226122710"/><text:bookmark-end text:name="_Toc226122709"/><text:bookmark-end text:name="_Toc230343527"/></text:h>
      <text:h text:style-name="Titre2" text:outline-level="2"><text:bookmark-start text:name="_Toc230343528"/><text:span text:style-name="T188">Configuration et initialisation d’un client MCP pour un serveur de temps avec gestion de timezone</text:span><text:bookmark-end text:name="_Toc226122710"/><text:bookmark-end text:name="_Toc230343528"/></text:h>
      <text:p text:style-name="P189"><text:span text:style-name="T190">import</text:span><text:span text:style-name="T191"><text:s/>asyncio</text:span></text:p>
      <text:p text:style-name="P192"><text:span text:style-name="T193">from</text:span><text:span text:style-name="T194"><text:s/>langchain.agents<text:s/></text:span><text:span text:style-name="T195">import</text:span><text:span text:style-name="T196"><text:s/>create_agent</text:span></text:p>
      <text:p text:style-name="P197"><text:span text:style-name="T198">from</text:span><text:span text:style-name="T199"><text:s/>langchain_mcp_adapters.client<text:s/></text:span><text:span text:style-name="T200">import</text:span><text:span text:style-name="T201"><text:s/>MultiServerMCPClient</text:span></text:p>
      <text:p text:style-name="P202"><text:span text:style-name="T203">from</text:span><text:span text:style-name="T204"><text:s/>langchain.agents<text:s/></text:span><text:span text:style-name="T205">import</text:span><text:span text:style-name="T206"><text:s/>create_agent</text:span></text:p>
      <text:p text:style-name="P207"><text:span text:style-name="T208">from</text:span><text:span text:style-name="T209"><text:s/>langchain.messages<text:s/></text:span><text:span text:style-name="T210">import</text:span><text:span text:style-name="T211"><text:s/>HumanMessage</text:span></text:p>
      <text:p text:style-name="P212"><text:span text:style-name="T213">from</text:span><text:span text:style-name="T214"><text:s/>langchain_ollama<text:s/></text:span><text:span text:style-name="T215">import</text:span><text:span text:style-name="T216"><text:s/>ChatOllama</text:span></text:p>
      <text:p text:style-name="P217"/>
      <text:p text:style-name="P218"><text:span text:style-name="T219">async</text:span><text:span text:style-name="T220"><text:s/></text:span><text:span text:style-name="T221">def</text:span><text:span text:style-name="T222"><text:s/>main():</text:span></text:p>
      <text:p text:style-name="P223">    client = MultiServerMCPClient(</text:p>
      <text:p text:style-name="P224">    {</text:p>
      <text:p text:style-name="P225"><text:span text:style-name="T226">       <text:s/></text:span><text:span text:style-name="T227">"time"</text:span><text:span text:style-name="T228">: {</text:span></text:p>
      <text:p text:style-name="P229"><text:span text:style-name="T230">           <text:s/></text:span><text:span text:style-name="T231">"transport"</text:span><text:span text:style-name="T232">:<text:s/></text:span><text:span text:style-name="T233">"stdio"</text:span><text:span text:style-name="T234">,</text:span></text:p>
      <text:p text:style-name="P235"><text:span text:style-name="T236">           <text:s/></text:span><text:span text:style-name="T237">"command"</text:span><text:span text:style-name="T238">:<text:s/></text:span><text:span text:style-name="T239">"uvx"</text:span><text:span text:style-name="T240">,</text:span></text:p>
      <text:p text:style-name="P241"><text:span text:style-name="T242">           <text:s/></text:span><text:span text:style-name="T243">"args"</text:span><text:span text:style-name="T244">: [</text:span></text:p>
      <text:p text:style-name="P245"><text:span text:style-name="T246">               <text:s/></text:span><text:span text:style-name="T247">"mcp-server-time"</text:span><text:span text:style-name="T248">,</text:span></text:p>
      <text:p text:style-name="P249"><text:span text:style-name="T250">               <text:s/></text:span><text:span text:style-name="T251">"--local-timezone=America/New_York"</text:span></text:p>
      <text:p text:style-name="P252"><text:span text:style-name="T253">           <text:s/></text:span><text:span text:style-name="T254">]</text:span></text:p>
      <text:p text:style-name="P255">        }</text:p>
      <text:p text:style-name="P256">    }</text:p>
      <text:p text:style-name="P257">    )</text:p>
      <text:p text:style-name="P258"/>
      <text:h text:style-name="P259" text:outline-level="2"><text:bookmark-start text:name="_Toc226122711"/><text:bookmark-start text:name="_Toc230343529"/>Récupération dynamique des tools<text:bookmark-end text:name="_Toc226122711"/><text:bookmark-end text:name="_Toc230343529"/></text:h>
      <text:p text:style-name="P260"/>
      <text:p text:style-name="P261"><text:span text:style-name="T262">   <text:s/></text:span><text:span text:style-name="T263"># get tools</text:span></text:p>
      <text:p text:style-name="P264"><text:span text:style-name="T265">   <text:s/></text:span><text:span text:style-name="T266">tools =<text:s/></text:span><text:span text:style-name="T267">await</text:span><text:span text:style-name="T268"><text:s/>client.get_tools()</text:span></text:p>
      <text:h text:style-name="Titre2" text:outline-level="2"><text:bookmark-start text:name="_Toc226122712"/></text:h>
      <text:p text:style-name="Normal"/>
      <text:p text:style-name="Normal"/>
      <text:p text:style-name="Normal"/>
      <text:p text:style-name="Normal"/>
      <text:h text:style-name="Titre2" text:outline-level="2"><text:bookmark-start text:name="_Toc230343530"/><text:soft-page-break/>Création et exécution d’un agent LLM avec outils MCP pour la consultation du temps local<text:bookmark-end text:name="_Toc226122712"/><text:bookmark-end text:name="_Toc230343530"/></text:h>
      <text:p text:style-name="P269"><text:span text:style-name="T270">   <text:s/></text:span><text:span text:style-name="T271"># Initialiser le modèle Ollama</text:span></text:p>
      <text:p text:style-name="P272">    model = ChatOllama(</text:p>
      <text:p text:style-name="P273"><text:span text:style-name="T274">    model=</text:span><text:span text:style-name="T275">"llama3.2:3b"</text:span><text:span text:style-name="T276">,  <text:s/></text:span><text:span text:style-name="T277"># ou mistral, gemma, etc.</text:span></text:p>
      <text:p text:style-name="P278">   </text:p>
      <text:p text:style-name="P279"><text:span text:style-name="T280">   <text:s/></text:span><text:span text:style-name="T281">)</text:span></text:p>
      <text:p text:style-name="P282"/>
      <text:p text:style-name="P283">    agent = create_agent(</text:p>
      <text:p text:style-name="P284">    model=model,</text:p>
      <text:p text:style-name="P285"><text:span text:style-name="T286">   <text:s/></text:span><text:span text:style-name="T287">tools=tools,</text:span></text:p>
      <text:p text:style-name="P288">    )</text:p>
      <text:p text:style-name="P289"><text:span text:style-name="T290">    question = HumanMessage(content=</text:span><text:span text:style-name="T291">"</text:span><text:span text:style-name="T292">"What time is it in Japan</text:span><text:span text:style-name="T293">"</text:span><text:span text:style-name="T294">)</text:span></text:p>
      <text:p text:style-name="P295"/>
      <text:p text:style-name="P296"><text:span text:style-name="T297">   <text:s/></text:span><text:span text:style-name="T298">response =<text:s/></text:span><text:span text:style-name="T299">await</text:span><text:span text:style-name="T300"><text:s/>agent.ainvoke(</text:span></text:p>
      <text:p text:style-name="P301"><text:span text:style-name="T302">    {</text:span><text:span text:style-name="T303">"messages"</text:span><text:span text:style-name="T304">: [question]}</text:span></text:p>
      <text:p text:style-name="P305">                )</text:p>
      <text:p text:style-name="P306"/>
      <text:p text:style-name="P307"><text:span text:style-name="T308">    print(response[</text:span><text:span text:style-name="T309">'messages'</text:span><text:span text:style-name="T310">][-</text:span><text:span text:style-name="T311">1</text:span><text:span text:style-name="T312">].content)</text:span></text:p>
      <text:p text:style-name="P313"/>
      <text:p text:style-name="P314">asyncio.run(main())</text:p>
      <text:p text:style-name="Normal"/>
      <text:p text:style-name="P315">N.B : uv run --active python agentMCPTime.py pour exécuter<text:s/></text:p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h text:style-name="Titre1" text:outline-level="1"><text:bookmark-start text:name="_Toc230343531"/><text:soft-page-break/>PARTIE 3 : Agent pour se connecter à un serveur MCP distant via HTTP streaming<text:bookmark-end text:name="_Toc230343531"/></text:h>
      <text:p text:style-name="Normal"/>
      <text:p text:style-name="P329"><text:span text:style-name="T330">import</text:span><text:span text:style-name="T331"><text:s/>asyncio</text:span></text:p>
      <text:p text:style-name="P332"><text:span text:style-name="T333">from</text:span><text:span text:style-name="T334"><text:s/>langchain.agents<text:s/></text:span><text:span text:style-name="T335">import</text:span><text:span text:style-name="T336"><text:s/>create_agent</text:span></text:p>
      <text:p text:style-name="P337"><text:span text:style-name="T338">from</text:span><text:span text:style-name="T339"><text:s/>langchain_mcp_adapters.client<text:s/></text:span><text:span text:style-name="T340">import</text:span><text:span text:style-name="T341"><text:s/>MultiServerMCPClient</text:span></text:p>
      <text:p text:style-name="P342"><text:span text:style-name="T343">from</text:span><text:span text:style-name="T344"><text:s/>langchain.agents<text:s/></text:span><text:span text:style-name="T345">import</text:span><text:span text:style-name="T346"><text:s/>create_agent</text:span></text:p>
      <text:p text:style-name="P347"><text:span text:style-name="T348">from</text:span><text:span text:style-name="T349"><text:s/>langchain.messages<text:s/></text:span><text:span text:style-name="T350">import</text:span><text:span text:style-name="T351"><text:s/>HumanMessage</text:span></text:p>
      <text:p text:style-name="P352"><text:span text:style-name="T353">from</text:span><text:span text:style-name="T354"><text:s/>langgraph.checkpoint.memory<text:s/></text:span><text:span text:style-name="T355">import</text:span><text:span text:style-name="T356"><text:s/>InMemorySaver</text:span></text:p>
      <text:p text:style-name="P357"><text:span text:style-name="T358">from</text:span><text:span text:style-name="T359"><text:s/>dotenv<text:s/></text:span><text:span text:style-name="T360">import</text:span><text:span text:style-name="T361"><text:s/>load_dotenv</text:span></text:p>
      <text:p text:style-name="P362"><text:span text:style-name="T363"><text:line-break/></text:span><text:span text:style-name="T364"><text:line-break/></text:span><text:span text:style-name="T365">async</text:span><text:span text:style-name="T366"><text:s/></text:span><text:span text:style-name="T367">def</text:span><text:span text:style-name="T368"><text:s/>main():</text:span></text:p>
      <text:p text:style-name="P369"><text:span text:style-name="T370">   <text:s/></text:span><text:span text:style-name="T371">client = MultiServerMCPClient(</text:span></text:p>
      <text:p text:style-name="P372">    {</text:p>
      <text:p text:style-name="P373"><text:span text:style-name="T374">       <text:s/></text:span><text:span text:style-name="T375">"travel_server"</text:span><text:span text:style-name="T376">: {</text:span></text:p>
      <text:p text:style-name="P377"><text:span text:style-name="T378">               <text:s/></text:span><text:span text:style-name="T379">"transport"</text:span><text:span text:style-name="T380">:<text:s/></text:span><text:span text:style-name="T381">"streamable_http"</text:span><text:span text:style-name="T382">,</text:span></text:p>
      <text:p text:style-name="P383"><text:span text:style-name="T384">               <text:s/></text:span><text:span text:style-name="T385">"url"</text:span><text:span text:style-name="T386">:<text:s/></text:span><text:span text:style-name="T387">"https://mcp.kiwi.com"</text:span></text:p>
      <text:p text:style-name="P388">            }</text:p>
      <text:p text:style-name="P389">    }</text:p>
      <text:p text:style-name="P390">)</text:p>
      <text:p text:style-name="P391"/>
      <text:p text:style-name="P392"><text:span text:style-name="T393">   <text:s/></text:span><text:span text:style-name="T394"># get tools</text:span></text:p>
      <text:p text:style-name="P395"><text:span text:style-name="T396">    tools =<text:s/></text:span><text:span text:style-name="T397">await</text:span><text:span text:style-name="T398"><text:s/>client.get_tools()</text:span></text:p>
      <text:p text:style-name="P399"/>
      <text:p text:style-name="P400">    load_dotenv()</text:p>
      <text:p text:style-name="P401"/>
      <text:p text:style-name="P402">    agent = create_agent(</text:p>
      <text:p text:style-name="P403"><text:span text:style-name="T404">   <text:s/></text:span><text:span text:style-name="T405">"gpt-5-nano"</text:span><text:span text:style-name="T406">,</text:span></text:p>
      <text:p text:style-name="P407">    tools=tools,</text:p>
      <text:p text:style-name="P408">    checkpointer=InMemorySaver(),</text:p>
      <text:p text:style-name="P409"><text:span text:style-name="T410">    system_prompt=</text:span><text:span text:style-name="T411">"You are a travel agent. No follow up questions."</text:span></text:p>
      <text:p text:style-name="P412">    )</text:p>
      <text:p text:style-name="P413"><text:span text:style-name="T414">    config = {</text:span><text:span text:style-name="T415">"configurable"</text:span><text:span text:style-name="T416">: {</text:span><text:span text:style-name="T417">"thread_id"</text:span><text:span text:style-name="T418">:<text:s/></text:span><text:span text:style-name="T419">"1"</text:span><text:span text:style-name="T420">}}</text:span></text:p>
      <text:p text:style-name="P421"/>
      <text:p text:style-name="P422"><text:span text:style-name="T423">    response =<text:s/></text:span><text:span text:style-name="T424">await</text:span><text:span text:style-name="T425"><text:s/>agent.ainvoke(</text:span></text:p>
      <text:p text:style-name="P426"><text:span text:style-name="T427">    {</text:span><text:span text:style-name="T428">"messages"</text:span><text:span text:style-name="T429">: [HumanMessage(content=</text:span><text:span text:style-name="T430">"Get me a direct flight from Rabat to Agadir on<text:s/></text:span><text:span text:style-name="T431">August</text:span><text:span text:style-name="T432"><text:s/>31st"</text:span><text:span text:style-name="T433">)]},</text:span></text:p>
      <text:p text:style-name="P434"><text:span text:style-name="T435">   <text:s/></text:span><text:span text:style-name="T436">config</text:span></text:p>
      <text:p text:style-name="P437">    )</text:p>
      <text:p text:style-name="P438"/>
      <text:p text:style-name="P439">    print(response)</text:p>
      <text:p text:style-name="P440"/>
      <text:p text:style-name="P441"><text:span text:style-name="T442">asyncio.run(main()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365F9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365F9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365F9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365F91"/>
    </style:style>
    <style:style style:name="Citationintense" style:display-name="Citation intens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365F9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365F9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margin-top="0.1666in" fo:margin-bottom="0in" fo:line-height="105%"/>
      <style:text-properties style:font-name="Calibri Light" fo:color="#2F5496" fo:font-size="16pt" style:font-size-asian="16pt" style:font-size-complex="16pt" fo:language="fr" fo:country="MA" style:language-asian="fr" style:country-asian="MA"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SMA et IAD</text:span><text:span text:style-name="T4"><text:tab/>Master SDIA Prof. RETAL SAR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 Ob</meta:initial-creator>
    <dc:creator>user</dc:creator>
    <meta:creation-date>2025-03-18T10:48:00Z</meta:creation-date>
    <dc:date>2026-05-22T14:08:00Z</dc:date>
    <meta:print-date>2026-05-22T10:58:00Z</meta:print-date>
    <meta:template xlink:href="Normal" xlink:type="simple"/>
    <meta:editing-cycles>45</meta:editing-cycles>
    <meta:editing-duration>PT40320S</meta:editing-duration>
    <meta:document-statistic meta:page-count="6" meta:paragraph-count="11" meta:word-count="859" meta:character-count="5575" meta:row-count="39" meta:non-whitespace-character-count="4727"/>
  </office:meta>
</office:document-meta>
</file>