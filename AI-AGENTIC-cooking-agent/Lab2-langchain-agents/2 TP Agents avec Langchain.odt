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P3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4472c4" style:text-line-through-style="none" style:text-line-through-type="none" style:text-position="0% 100%"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7" style:family="paragraph" style:parent-style-name="Standard" style:master-page-name="Standard">
      <style:paragraph-properties fo:margin-left="0in" fo:margin-right="0in" fo:margin-top="0in" fo:margin-bottom="0.139in" loext:contextual-spacing="false" fo:line-height="115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.1665in" fo:margin-bottom="0in" loext:contextual-spacing="false" fo:line-height="106%" fo:text-align="start" style:justify-single-word="false" fo:keep-together="always" fo:orphans="2" fo:widows="2" fo:text-indent="0in" style:auto-text-indent="false" fo:break-before="auto" fo:break-after="auto" fo:padding="0in" fo:border="none" fo:keep-with-next="always"/>
    </style:style>
    <style:style style:name="P9" style:family="paragraph" style:parent-style-name="Standard" style:list-style-name="WWNum1">
      <style:paragraph-properties fo:margin-left="0in" fo:margin-right="0in" fo:margin-top="0.111in" fo:margin-bottom="0.0555in" loext:contextual-spacing="false" fo:line-height="115%" fo:text-align="start" style:justify-single-word="false" fo:keep-together="always" fo:orphans="2" fo:widows="2" fo:text-indent="0in" style:auto-text-indent="false" fo:break-before="auto" fo:break-after="auto" fo:padding="0in" fo:border="none" fo:keep-with-next="always">
        <style:tab-stops>
          <style:tab-stop style:position="0in"/>
        </style:tab-stops>
      </style:paragraph-properties>
    </style:style>
    <style:style style:name="P10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</style:style>
    <style:style style:name="P11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  <style:text-properties fo:font-variant="normal" fo:text-transform="none" fo:color="#4472c4" style:text-line-through-style="none" style:text-line-through-type="none" style:text-position="0% 100%"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0693in" fo:margin-bottom="0.0693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1528in" fo:margin-right="0in" fo:margin-top="0in" fo:margin-bottom="0.0693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1402in" style:type="right"/>
        </style:tab-stops>
      </style:paragraph-properties>
    </style:style>
    <style:style style:name="P21" style:family="paragraph" style:parent-style-name="Standard">
      <style:paragraph-properties fo:margin-left="0.1528in" fo:margin-right="0in" fo:margin-top="0in" fo:margin-bottom="0.0693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1402in" style:type="right"/>
        </style:tab-stops>
      </style:paragraph-properties>
    </style:style>
    <style:style style:name="P22" style:family="paragraph" style:parent-style-name="Standard">
      <style:paragraph-properties fo:margin-left="0.3055in" fo:margin-right="0in" fo:margin-top="0in" fo:margin-bottom="0.0693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5.9874in" style:type="right"/>
        </style:tab-stops>
      </style:paragraph-properties>
    </style:style>
    <style:style style:name="P23" style:family="paragraph" style:parent-style-name="Standard">
      <style:paragraph-properties fo:margin-left="0.3098in" fo:margin-right="0in" fo:margin-top="0in" fo:margin-bottom="0.0693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24" style:family="paragraph" style:parent-style-name="Standard" style:list-style-name="WWNum2">
      <style:paragraph-properties fo:margin-left="0.5in" fo:margin-right="0in" fo:margin-top="0.0693in" fo:margin-bottom="0.0693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bold" style:font-name-asian="Calibri1" style:font-size-asian="16pt" style:font-style-asian="normal" style:font-weight-asian="bold" style:font-name-complex="Calibri1" style:font-size-complex="16pt" style:font-style-complex="normal" style:font-weight-complex="bold"/>
    </style:style>
    <style:style style:name="T7" style:family="text"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" style:family="text">
      <style:text-properties fo:font-variant="normal" fo:text-transform="none" fo:color="#0563c1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9" style:family="text">
      <style:text-properties fo:font-variant="normal" fo:text-transform="none" fo:color="#000080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0" style:family="text">
      <style:text-properties fo:font-variant="normal" fo:text-transform="none" fo:color="#365f91" style:text-line-through-style="none" style:text-line-through-type="none" style:text-position="0% 100%" style:font-name="Cambria" fo:font-size="16pt" fo:font-style="normal" style:text-underline-style="none" fo:font-weight="normal" style:font-name-asian="Cambria1" style:font-size-asian="16pt" style:font-style-asian="normal" style:font-weight-asian="normal" style:font-name-complex="Cambria1" style:font-size-complex="16pt" style:font-style-complex="normal" style:font-weight-complex="normal"/>
    </style:style>
    <style:style style:name="T11" style:family="text">
      <style:text-properties fo:font-variant="normal" fo:text-transform="none" fo:color="#365f91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13" style:family="text">
      <style:text-properties fo:font-variant="normal" fo:text-transform="none" fo:color="#008000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14" style:family="text">
      <style:text-properties fo:font-variant="normal" fo:text-transform="none" fo:color="#a31515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15" style:family="text">
      <style:text-properties fo:font-variant="normal" fo:text-transform="none" fo:color="#098658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LAB : Agents avec Langchain</text:span></text:p>
      <text:p text:style-name="P2"/>
      <text:p text:style-name="P2"/>
      <text:p text:style-name="P8"><text:span text:style-name="T6">Table des matières</text:span></text:p>
      <text:p text:style-name="P1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0"><text:a xlink:type="simple" xlink:href="#_hkh2po7ivi98" text:style-name="Index_20_Link" text:visited-style-name="Index_20_Link"><text:span text:style-name="T8">Création d’un nouveau agent sans System Message</text:span></text:a><text:a xlink:type="simple" xlink:href="#_hkh2po7ivi98" text:style-name="Index_20_Link" text:visited-style-name="Index_20_Link"><text:span text:style-name="T9"><text:tab/>2</text:span></text:a></text:p>
          <text:p text:style-name="P20"><text:a xlink:type="simple" xlink:href="#_j83hmprlm11v" text:style-name="Index_20_Link" text:visited-style-name="Index_20_Link"><text:span text:style-name="T8">Agent avec System Message : un message de contrôle qui définit le comportement global du modèle</text:span></text:a><text:a xlink:type="simple" xlink:href="#_j83hmprlm11v" text:style-name="Index_20_Link" text:visited-style-name="Index_20_Link"><text:span text:style-name="T9"><text:tab/>2</text:span></text:a></text:p>
          <text:p text:style-name="P20"><text:a xlink:type="simple" xlink:href="#_4y18jy1zfh3m" text:style-name="Index_20_Link" text:visited-style-name="Index_20_Link"><text:span text:style-name="T8">Agent avec Few-shot learning : une méthode où le modèle apprend une nouvelle tâche ou classe à partir de quelques exemples seulement</text:span></text:a><text:a xlink:type="simple" xlink:href="#_4y18jy1zfh3m" text:style-name="Index_20_Link" text:visited-style-name="Index_20_Link"><text:span text:style-name="T9"><text:tab/>3</text:span></text:a></text:p>
          <text:p text:style-name="P20"><text:a xlink:type="simple" xlink:href="#_imuai23t3z3o" text:style-name="Index_20_Link" text:visited-style-name="Index_20_Link"><text:span text:style-name="T8">Agent avec réponse structurée: une sortie organisée selon un format prédéfini, plutôt que du texte libre.</text:span></text:a><text:a xlink:type="simple" xlink:href="#_imuai23t3z3o" text:style-name="Index_20_Link" text:visited-style-name="Index_20_Link"><text:span text:style-name="T9"><text:tab/>3</text:span></text:a></text:p>
          <text:p text:style-name="P20"><text:a xlink:type="simple" xlink:href="#_x12la4uotkf6" text:style-name="Index_20_Link" text:visited-style-name="Index_20_Link"><text:span text:style-name="T8">Agent avec réponse structurée en utilisant BaseModel : rendre la réponse facile à exploiter automatiquement par un programme ou un système.</text:span></text:a><text:a xlink:type="simple" xlink:href="#_x12la4uotkf6" text:style-name="Index_20_Link" text:visited-style-name="Index_20_Link"><text:span text:style-name="T9"><text:tab/>4</text:span></text:a></text:p>
          <text:p text:style-name="P20"><text:a xlink:type="simple" xlink:href="#_k8kcbhf08qkd" text:style-name="Index_20_Link" text:visited-style-name="Index_20_Link"><text:span text:style-name="T8">Les tools (outils) : une fonction externe que le modèle peut appeler pour effectuer une action précise qu’il ne peut pas faire seul</text:span></text:a><text:a xlink:type="simple" xlink:href="#_k8kcbhf08qkd" text:style-name="Index_20_Link" text:visited-style-name="Index_20_Link"><text:span text:style-name="T9"><text:tab/>5</text:span></text:a></text:p>
          <text:p text:style-name="P22"><text:a xlink:type="simple" xlink:href="#_l3mv6fty3s84" text:style-name="Index_20_Link" text:visited-style-name="Index_20_Link"><text:span text:style-name="T8">Création du Tool</text:span></text:a><text:a xlink:type="simple" xlink:href="#_l3mv6fty3s84" text:style-name="Index_20_Link" text:visited-style-name="Index_20_Link"><text:span text:style-name="T9"><text:tab/>5</text:span></text:a></text:p>
          <text:p text:style-name="P22"><text:a xlink:type="simple" xlink:href="#_plkoetjj63mo" text:style-name="Index_20_Link" text:visited-style-name="Index_20_Link"><text:span text:style-name="T8">Ajout du Tool à l’agent</text:span></text:a><text:a xlink:type="simple" xlink:href="#_plkoetjj63mo" text:style-name="Index_20_Link" text:visited-style-name="Index_20_Link"><text:span text:style-name="T9"><text:tab/>6</text:span></text:a></text:p>
          <text:p text:style-name="P20"><text:a xlink:type="simple" xlink:href="#_sf6j99qs75jm" text:style-name="Index_20_Link" text:visited-style-name="Index_20_Link"><text:span text:style-name="T8">Agent sans Web Search Tool</text:span></text:a><text:a xlink:type="simple" xlink:href="#_sf6j99qs75jm" text:style-name="Index_20_Link" text:visited-style-name="Index_20_Link"><text:span text:style-name="T9"><text:tab/>6</text:span></text:a></text:p>
          <text:p text:style-name="P20"><text:a xlink:type="simple" xlink:href="#_uzilrtn572gr" text:style-name="Index_20_Link" text:visited-style-name="Index_20_Link"><text:span text:style-name="T8">Agent avec Web Search Tool</text:span></text:a><text:a xlink:type="simple" xlink:href="#_uzilrtn572gr" text:style-name="Index_20_Link" text:visited-style-name="Index_20_Link"><text:span text:style-name="T9"><text:tab/>6</text:span></text:a></text:p>
          <text:p text:style-name="P22"><text:a xlink:type="simple" xlink:href="#_s5i3lz2o0x9y" text:style-name="Index_20_Link" text:visited-style-name="Index_20_Link"><text:span text:style-name="T8">Sortie du Tool</text:span></text:a><text:a xlink:type="simple" xlink:href="#_s5i3lz2o0x9y" text:style-name="Index_20_Link" text:visited-style-name="Index_20_Link"><text:span text:style-name="T9"><text:tab/>6</text:span></text:a></text:p>
          <text:p text:style-name="P22"><text:a xlink:type="simple" xlink:href="#_hqev3140nnyj" text:style-name="Index_20_Link" text:visited-style-name="Index_20_Link"><text:span text:style-name="T8">Sortie de l’agent</text:span></text:a><text:a xlink:type="simple" xlink:href="#_hqev3140nnyj" text:style-name="Index_20_Link" text:visited-style-name="Index_20_Link"><text:span text:style-name="T9"><text:tab/>7</text:span></text:a></text:p>
          <text:p text:style-name="P20"><text:a xlink:type="simple" xlink:href="#_t6sgbmvx6h24" text:style-name="Index_20_Link" text:visited-style-name="Index_20_Link"><text:span text:style-name="T8">Agent sans mémoire</text:span></text:a><text:a xlink:type="simple" xlink:href="#_t6sgbmvx6h24" text:style-name="Index_20_Link" text:visited-style-name="Index_20_Link"><text:span text:style-name="T9"><text:tab/>7</text:span></text:a></text:p>
          <text:p text:style-name="P20"><text:a xlink:type="simple" xlink:href="#_20j38jf2jf2e" text:style-name="Index_20_Link" text:visited-style-name="Index_20_Link"><text:span text:style-name="T8">Agent avec mémoire</text:span></text:a><text:a xlink:type="simple" xlink:href="#_20j38jf2jf2e" text:style-name="Index_20_Link" text:visited-style-name="Index_20_Link"><text:span text:style-name="T9"><text:tab/>8</text:span></text:a></text:p>
          <text:p text:style-name="P20"><text:a xlink:type="simple" xlink:href="#_mcmqpctq85ak" text:style-name="Index_20_Link" text:visited-style-name="Index_20_Link"><text:span text:style-name="T8">TP : Chef personnel</text:span></text:a><text:a xlink:type="simple" xlink:href="#_mcmqpctq85ak" text:style-name="Index_20_Link" text:visited-style-name="Index_20_Link"><text:span text:style-name="T9"><text:tab/>8</text:span></text:a></text:p>
        </text:index-body>
      </text:table-of-content>
      <text:p text:style-name="P4"><text:soft-page-break/></text:p>
      <text:p text:style-name="P23"/>
      <text:p text:style-name="P4"/>
      <text:p text:style-name="P23"/>
      <text:p text:style-name="P2"/>
      <text:p text:style-name="P2"/>
      <text:p text:style-name="P3"/>
      <text:p text:style-name="P3"/>
      <text:list xml:id="list2212711261" text:style-name="WWNum1">
        <text:list-item>
          <text:list>
            <text:list-item>
              <text:p text:style-name="P9"><text:bookmark text:name="_hkh2po7ivi98"/><text:span text:style-name="T10">Création d’un nouveau agent sans System Message  </text:span></text:p>
            </text:list-item>
          </text:list>
        </text:list-item>
      </text:list>
      <text:p text:style-name="P10"><text:span text:style-name="T12">from</text:span><text:span text:style-name="T3"> langchain.agents </text:span><text:span text:style-name="T12">import</text:span><text:span text:style-name="T3"> create_agent</text:span></text:p>
      <text:p text:style-name="P10"><text:span text:style-name="T12">from</text:span><text:span text:style-name="T3"> langchain.messages </text:span><text:span text:style-name="T12">import</text:span><text:span text:style-name="T3"> HumanMessage</text:span></text:p>
      <text:p text:style-name="P10"><text:span text:style-name="T12">from</text:span><text:span text:style-name="T3"> langchain_ollama </text:span><text:span text:style-name="T12">import</text:span><text:span text:style-name="T3"> ChatOllama</text:span></text:p>
      <text:p text:style-name="P11"/>
      <text:p text:style-name="P10"><text:span text:style-name="T13"># Initialiser le modèle Ollama</text:span></text:p>
      <text:p text:style-name="P10"><text:span text:style-name="T3">model = ChatOllama(</text:span></text:p>
      <text:p text:style-name="P10"><text:span text:style-name="T3">    model=</text:span><text:span text:style-name="T14">"llama3.2:3b"</text:span><text:span text:style-name="T3">,   </text:span><text:span text:style-name="T13"># ou mistral, gemma, etc.</text:span></text:p>
      <text:p text:style-name="P10"><text:span text:style-name="T3">    temperature=</text:span><text:span text:style-name="T15">0</text:span></text:p>
      <text:p text:style-name="P10"><text:span text:style-name="T3">)</text:span></text:p>
      <text:p text:style-name="P10"><text:span text:style-name="T3">agent = create_agent(model=model)</text:span></text:p>
      <text:p text:style-name="P11"/>
      <text:p text:style-name="P10"><text:span text:style-name="T3">question = HumanMessage(content=</text:span><text:span text:style-name="T14">"Quelle est la capitale de la lune ?"</text:span><text:span text:style-name="T3">)</text:span></text:p>
      <text:p text:style-name="P11"><text:soft-page-break/></text:p>
      <text:p text:style-name="P10"><text:span text:style-name="T3">response = agent.invoke(</text:span></text:p>
      <text:p text:style-name="P10"><text:span text:style-name="T3">    {</text:span><text:span text:style-name="T14">"messages"</text:span><text:span text:style-name="T3">: [question]}</text:span></text:p>
      <text:p text:style-name="P10"><text:span text:style-name="T3">)</text:span></text:p>
      <text:p text:style-name="P11"/>
      <text:p text:style-name="P10"><text:span text:style-name="T3">print(response[</text:span><text:span text:style-name="T14">'messages'</text:span><text:span text:style-name="T3">][-</text:span><text:span text:style-name="T15">1</text:span><text:span text:style-name="T3">].content)</text:span></text:p>
      <text:p text:style-name="P4"/>
      <text:list xml:id="list122461469183950" text:continue-numbering="true" text:style-name="WWNum1">
        <text:list-item>
          <text:list>
            <text:list-item>
              <text:p text:style-name="P9"><text:bookmark text:name="_j83hmprlm11v"/><text:span text:style-name="T10">Agent avec System Message : un message de contrôle qui définit le comportement global du modèle</text:span></text:p>
            </text:list-item>
          </text:list>
        </text:list-item>
      </text:list>
      <text:p text:style-name="P10"><text:span text:style-name="T3">system_prompt = </text:span><text:span text:style-name="T14">"Vous êtes un auteur de science-fiction ; créez une capitale à la demande des utilisateurs."</text:span></text:p>
      <text:p text:style-name="P11"/>
      <text:p text:style-name="P10"><text:span text:style-name="T3">scifi_agent = create_agent(</text:span></text:p>
      <text:p text:style-name="P10"><text:span text:style-name="T3">    model=model,</text:span></text:p>
      <text:p text:style-name="P10"><text:span text:style-name="T3">    system_prompt=system_prompt</text:span></text:p>
      <text:p text:style-name="P10"><text:span text:style-name="T3">)</text:span></text:p>
      <text:p text:style-name="P11"/>
      <text:p text:style-name="P10"><text:span text:style-name="T3">response = scifi_agent.invoke(</text:span></text:p>
      <text:p text:style-name="P10"><text:span text:style-name="T3">    {</text:span><text:span text:style-name="T14">"messages"</text:span><text:span text:style-name="T3">: [question]}</text:span></text:p>
      <text:p text:style-name="P10"><text:span text:style-name="T3">)</text:span></text:p>
      <text:p text:style-name="P11"/>
      <text:p text:style-name="P10"><text:span text:style-name="T3">print(response[</text:span><text:span text:style-name="T14">'messages'</text:span><text:span text:style-name="T3">][-</text:span><text:span text:style-name="T15">1</text:span><text:span text:style-name="T3">].content)</text:span></text:p>
      <text:p text:style-name="P6"/>
      <text:p text:style-name="P6"><text:soft-page-break/></text:p>
      <text:p text:style-name="P6"/>
      <text:p text:style-name="P6"/>
      <text:list xml:id="list122459691657381" text:continue-numbering="true" text:style-name="WWNum1">
        <text:list-item>
          <text:list>
            <text:list-item>
              <text:p text:style-name="P9"><text:bookmark text:name="_4y18jy1zfh3m"/><text:span text:style-name="T10">Agent avec Few-shot learning : une méthode où le modèle apprend une nouvelle tâche ou classe à partir de quelques exemples seulement</text:span></text:p>
            </text:list-item>
          </text:list>
        </text:list-item>
      </text:list>
      <text:p text:style-name="P10"><text:span text:style-name="T3">system_prompt = </text:span><text:span text:style-name="T14">"""</text:span></text:p>
      <text:p text:style-name="P11"/>
      <text:p text:style-name="P10"><text:span text:style-name="T14">Vous êtes un auteur de science-fiction et vous devez créer une capitale spatiale à la demande d'un utilisateur.</text:span></text:p>
      <text:p text:style-name="P11"/>
      <text:p text:style-name="P10"><text:span text:style-name="T14">Utilisateur : Quelle est la capitale de Mars ?</text:span></text:p>
      <text:p text:style-name="P11"/>
      <text:p text:style-name="P10"><text:span text:style-name="T14">Auteur : Marsialis</text:span></text:p>
      <text:p text:style-name="P11"/>
      <text:p text:style-name="P10"><text:span text:style-name="T14">Utilisateur : Quelle est la capitale de Vénus ?</text:span></text:p>
      <text:p text:style-name="P11"/>
      <text:p text:style-name="P10"><text:span text:style-name="T14">Auteur : Venusovia</text:span></text:p>
      <text:p text:style-name="P11"/>
      <text:p text:style-name="P10"><text:span text:style-name="T14">"""</text:span></text:p>
      <text:p text:style-name="P11"/>
      <text:p text:style-name="P10"><text:span text:style-name="T3">scifi_agent = create_agent(</text:span></text:p>
      <text:p text:style-name="P10"><text:span text:style-name="T3">    model=model,</text:span></text:p>
      <text:p text:style-name="P10"><text:span text:style-name="T3">    system_prompt=system_prompt</text:span></text:p>
      <text:p text:style-name="P10"><text:soft-page-break/><text:span text:style-name="T3">)</text:span></text:p>
      <text:p text:style-name="P11"/>
      <text:p text:style-name="P10"><text:span text:style-name="T3">response = scifi_agent.invoke(</text:span></text:p>
      <text:p text:style-name="P10"><text:span text:style-name="T3">    {</text:span><text:span text:style-name="T14">"messages"</text:span><text:span text:style-name="T3">: [question]}</text:span></text:p>
      <text:p text:style-name="P10"><text:span text:style-name="T3">)</text:span></text:p>
      <text:p text:style-name="P11"/>
      <text:p text:style-name="P10"><text:span text:style-name="T3">print(response[</text:span><text:span text:style-name="T14">'messages'</text:span><text:span text:style-name="T3">][-</text:span><text:span text:style-name="T15">1</text:span><text:span text:style-name="T3">].content)</text:span></text:p>
      <text:p text:style-name="P4"/>
      <text:list xml:id="list122459545796764" text:continue-numbering="true" text:style-name="WWNum1">
        <text:list-item>
          <text:list>
            <text:list-item>
              <text:p text:style-name="P9"><text:bookmark text:name="_imuai23t3z3o"/><text:span text:style-name="T10">Agent avec réponse structurée: une sortie organisée selon un format prédéfini, plutôt que du texte libre. </text:span></text:p>
            </text:list-item>
          </text:list>
        </text:list-item>
      </text:list>
      <text:p text:style-name="P10"><text:span text:style-name="T3">system_prompt = </text:span><text:span text:style-name="T14">"""</text:span></text:p>
      <text:p text:style-name="P11"/>
      <text:p text:style-name="P10"><text:span text:style-name="T14">Vous êtes un auteur de science-fiction et vous devez créer une capitale spatiale à la demande d'un utilisateur.</text:span></text:p>
      <text:p text:style-name="P11"/>
      <text:p text:style-name="P10"><text:span text:style-name="T14">Veuillez respecter la structure ci-dessous.</text:span></text:p>
      <text:p text:style-name="P11"/>
      <text:p text:style-name="P10"><text:span text:style-name="T14">Nom : Nom de la capitale</text:span></text:p>
      <text:p text:style-name="P11"/>
      <text:p text:style-name="P10"><text:span text:style-name="T14">Localisation : Lieu où elle est située</text:span></text:p>
      <text:p text:style-name="P11"/>
      <text:p text:style-name="P10"><text:span text:style-name="T14">Ambiance : Description en 2 ou 3 mots</text:span></text:p>
      <text:p text:style-name="P11"/>
      <text:p text:style-name="P10"><text:soft-page-break/><text:span text:style-name="T14">Économie : Principaux secteurs d'activité</text:span></text:p>
      <text:p text:style-name="P11"/>
      <text:p text:style-name="P10"><text:span text:style-name="T14">"""</text:span></text:p>
      <text:p text:style-name="P11"/>
      <text:p text:style-name="P10"><text:span text:style-name="T3">scifi_agent = create_agent(</text:span></text:p>
      <text:p text:style-name="P10"><text:span text:style-name="T3">    model=model,</text:span></text:p>
      <text:p text:style-name="P10"><text:span text:style-name="T3">    system_prompt=system_prompt</text:span></text:p>
      <text:p text:style-name="P10"><text:span text:style-name="T3">)</text:span></text:p>
      <text:p text:style-name="P11"/>
      <text:p text:style-name="P10"><text:span text:style-name="T3">response = scifi_agent.invoke(</text:span></text:p>
      <text:p text:style-name="P10"><text:span text:style-name="T3">    {</text:span><text:span text:style-name="T14">"messages"</text:span><text:span text:style-name="T3">: [question]}</text:span></text:p>
      <text:p text:style-name="P10"><text:span text:style-name="T3">)</text:span></text:p>
      <text:p text:style-name="P11"/>
      <text:p text:style-name="P10"><text:span text:style-name="T3">print(response[</text:span><text:span text:style-name="T14">'messages'</text:span><text:span text:style-name="T3">][-</text:span><text:span text:style-name="T15">1</text:span><text:span text:style-name="T3">].content)</text:span></text:p>
      <text:p text:style-name="P6"/>
      <text:list xml:id="list122461033285560" text:continue-numbering="true" text:style-name="WWNum1">
        <text:list-item>
          <text:list>
            <text:list-item>
              <text:p text:style-name="P9"><text:bookmark text:name="_x12la4uotkf6"/><text:span text:style-name="T10">Agent avec réponse structurée en utilisant BaseModel : rendre la réponse facile à exploiter automatiquement par un programme ou un système.</text:span></text:p>
            </text:list-item>
          </text:list>
        </text:list-item>
      </text:list>
      <text:p text:style-name="P10"><text:span text:style-name="T12">from</text:span><text:span text:style-name="T3"> langchain.agents </text:span><text:span text:style-name="T12">import</text:span><text:span text:style-name="T3"> create_agent</text:span></text:p>
      <text:p text:style-name="P10"><text:span text:style-name="T12">from</text:span><text:span text:style-name="T3"> langchain.messages </text:span><text:span text:style-name="T12">import</text:span><text:span text:style-name="T3"> HumanMessage</text:span></text:p>
      <text:p text:style-name="P10"><text:span text:style-name="T12">from</text:span><text:span text:style-name="T3"> pydantic </text:span><text:span text:style-name="T12">import</text:span><text:span text:style-name="T3"> BaseModel</text:span></text:p>
      <text:p text:style-name="P11"/>
      <text:p text:style-name="P10"><text:span text:style-name="T12">class</text:span><text:span text:style-name="T3"> CapitalInfo(BaseModel):</text:span></text:p>
      <text:p text:style-name="P10"><text:soft-page-break/><text:span text:style-name="T3">    nom: str</text:span></text:p>
      <text:p text:style-name="P10"><text:span text:style-name="T3">    Localisation: str</text:span></text:p>
      <text:p text:style-name="P10"><text:span text:style-name="T3">    Ambiance: str</text:span></text:p>
      <text:p text:style-name="P10"><text:span text:style-name="T3">    Économie: str</text:span></text:p>
      <text:p text:style-name="P11"/>
      <text:p text:style-name="P10"><text:span text:style-name="T3">system_prompt = </text:span><text:span text:style-name="T14">"""</text:span></text:p>
      <text:p text:style-name="P11"/>
      <text:p text:style-name="P10"><text:span text:style-name="T14">Vous êtes un auteur de science-fiction et vous devez créer une capitale spatiale à la demande d'un utilisateur.</text:span></text:p>
      <text:p text:style-name="P11"/>
      <text:p text:style-name="P10"><text:span text:style-name="T14">Veuillez respecter la structure ci-dessous.</text:span></text:p>
      <text:p text:style-name="P11"/>
      <text:p text:style-name="P10"><text:span text:style-name="T14">Nom : Nom de la capitale</text:span></text:p>
      <text:p text:style-name="P11"/>
      <text:p text:style-name="P10"><text:span text:style-name="T14">Localisation : Lieu où elle est située</text:span></text:p>
      <text:p text:style-name="P11"/>
      <text:p text:style-name="P10"><text:span text:style-name="T14">Ambiance : Description en 2 ou 3 mots</text:span></text:p>
      <text:p text:style-name="P11"/>
      <text:p text:style-name="P10"><text:span text:style-name="T14">Économie : Principaux secteurs d'activité</text:span></text:p>
      <text:p text:style-name="P11"/>
      <text:p text:style-name="P10"><text:span text:style-name="T14">"""</text:span></text:p>
      <text:p text:style-name="P10"><text:span text:style-name="T3">agent = create_agent(</text:span></text:p>
      <text:p text:style-name="P10"><text:soft-page-break/><text:span text:style-name="T3">    model=model,</text:span></text:p>
      <text:p text:style-name="P10"><text:span text:style-name="T3">    system_prompt=system_prompt,</text:span></text:p>
      <text:p text:style-name="P10"><text:span text:style-name="T3">    response_format=CapitalInfo</text:span></text:p>
      <text:p text:style-name="P10"><text:span text:style-name="T3">)</text:span></text:p>
      <text:p text:style-name="P11"/>
      <text:p text:style-name="P10"><text:span text:style-name="T3">question = HumanMessage(content=</text:span><text:span text:style-name="T14">"Quelle est la capitale de la lune ?"</text:span><text:span text:style-name="T3">)</text:span></text:p>
      <text:p text:style-name="P11"/>
      <text:p text:style-name="P10"><text:span text:style-name="T3">response = agent.invoke(</text:span></text:p>
      <text:p text:style-name="P10"><text:span text:style-name="T3">    {</text:span><text:span text:style-name="T14">"messages"</text:span><text:span text:style-name="T3">: [question]}</text:span></text:p>
      <text:p text:style-name="P10"><text:span text:style-name="T3">)</text:span></text:p>
      <text:p text:style-name="P11"/>
      <text:p text:style-name="P10"><text:span text:style-name="T3">response[</text:span><text:span text:style-name="T14">"structured_response"</text:span><text:span text:style-name="T3">]</text:span></text:p>
      <text:p text:style-name="P11"/>
      <text:list xml:id="list122460499948124" text:continue-numbering="true" text:style-name="WWNum1">
        <text:list-item>
          <text:list>
            <text:list-item>
              <text:p text:style-name="P9"><text:bookmark text:name="_k8kcbhf08qkd"/><text:span text:style-name="T10">Les tools (outils) : une fonction externe que le modèle peut appeler pour effectuer une action précise qu’il ne peut pas faire seul</text:span></text:p>
              <text:list>
                <text:list-item>
                  <text:p text:style-name="P9"><text:bookmark text:name="_l3mv6fty3s84"/><text:span text:style-name="T11">Création du Tool</text:span></text:p>
                </text:list-item>
              </text:list>
            </text:list-item>
          </text:list>
        </text:list-item>
      </text:list>
      <text:p text:style-name="P15"/>
      <text:p text:style-name="P10"><text:span text:style-name="T12">from</text:span><text:span text:style-name="T3"> langchain.tools </text:span><text:span text:style-name="T12">import</text:span><text:span text:style-name="T3"> tool</text:span></text:p>
      <text:p text:style-name="P11"/>
      <text:p text:style-name="P10"><text:span text:style-name="T3">@tool(</text:span><text:span text:style-name="T14">"meteo_capitale"</text:span><text:span text:style-name="T3">)</text:span></text:p>
      <text:p text:style-name="P10"><text:span text:style-name="T12">def</text:span><text:span text:style-name="T3"> meteo_capitale(ville: str) -&gt; str:</text:span></text:p>
      <text:p text:style-name="P10"><text:span text:style-name="T3">    </text:span><text:span text:style-name="T14">"""</text:span></text:p>
      <text:p text:style-name="P10"><text:soft-page-break/><text:span text:style-name="T14">    Donne la météo d'une capitale (valeurs fixes pour test).</text:span></text:p>
      <text:p text:style-name="P10"><text:span text:style-name="T14">    </text:span></text:p>
      <text:p text:style-name="P10"><text:span text:style-name="T14">    Args:</text:span></text:p>
      <text:p text:style-name="P10"><text:span text:style-name="T14">        ville: nom de la capitale</text:span></text:p>
      <text:p text:style-name="P10"><text:span text:style-name="T14">    """</text:span></text:p>
      <text:p text:style-name="P10"><text:span text:style-name="T3">    print(</text:span><text:span text:style-name="T14">"tool meteo_capitale utilisé"</text:span><text:span text:style-name="T3">)</text:span></text:p>
      <text:p text:style-name="P11"/>
      <text:p text:style-name="P10"><text:span text:style-name="T3">    temperature = </text:span><text:span text:style-name="T15">25</text:span><text:span text:style-name="T3">  </text:span></text:p>
      <text:p text:style-name="P10"><text:span text:style-name="T3">    humidite = </text:span><text:span text:style-name="T15">60</text:span><text:span text:style-name="T3">     </text:span></text:p>
      <text:p text:style-name="P10"><text:span text:style-name="T3">    pression = </text:span><text:span text:style-name="T15">1013</text:span><text:span text:style-name="T3">   </text:span></text:p>
      <text:p text:style-name="P11"/>
      <text:p text:style-name="P10"><text:span text:style-name="T3">    </text:span><text:span text:style-name="T12">return</text:span><text:span text:style-name="T3"> (</text:span></text:p>
      <text:p text:style-name="P10"><text:span text:style-name="T3">        </text:span><text:span text:style-name="T12">f</text:span><text:span text:style-name="T14">"Météo à </text:span><text:span text:style-name="T3">{ville}</text:span><text:span text:style-name="T14"> : "</text:span></text:p>
      <text:p text:style-name="P10"><text:span text:style-name="T3">        </text:span><text:span text:style-name="T12">f</text:span><text:span text:style-name="T14">"Température = </text:span><text:span text:style-name="T3">{temperature}</text:span><text:span text:style-name="T14">°C, "</text:span></text:p>
      <text:p text:style-name="P10"><text:span text:style-name="T3">        </text:span><text:span text:style-name="T12">f</text:span><text:span text:style-name="T14">"Humidité = </text:span><text:span text:style-name="T3">{humidite}</text:span><text:span text:style-name="T14">%, "</text:span></text:p>
      <text:p text:style-name="P10"><text:span text:style-name="T3">        </text:span><text:span text:style-name="T12">f</text:span><text:span text:style-name="T14">"Pression = </text:span><text:span text:style-name="T3">{pression}</text:span><text:span text:style-name="T14"> hPa"</text:span></text:p>
      <text:p text:style-name="P10"><text:span text:style-name="T3">    )</text:span></text:p>
      <text:p text:style-name="P6"/>
      <text:p text:style-name="P6"/>
      <text:p text:style-name="P4"/>
      <text:list xml:id="list122460559106080" text:continue-numbering="true" text:style-name="WWNum1">
        <text:list-item>
          <text:list>
            <text:list-item>
              <text:list>
                <text:list-item>
                  <text:p text:style-name="P9"><text:bookmark text:name="_plkoetjj63mo"/><text:span text:style-name="T11">Ajout du Tool à l’agent</text:span></text:p>
                </text:list-item>
              </text:list>
            </text:list-item>
          </text:list>
        </text:list-item>
      </text:list>
      <text:p text:style-name="P11"><text:soft-page-break/></text:p>
      <text:p text:style-name="P10"><text:span text:style-name="T3">system_prompt = </text:span><text:span text:style-name="T14">"Utilises les tools pour répondre aux questions"</text:span></text:p>
      <text:p text:style-name="P10"><text:span text:style-name="T3">agent = create_agent(</text:span></text:p>
      <text:p text:style-name="P10"><text:span text:style-name="T3">    model=model,</text:span></text:p>
      <text:p text:style-name="P10"><text:span text:style-name="T3">    tools=[meteo_capitale],</text:span></text:p>
      <text:p text:style-name="P10"><text:span text:style-name="T3">    system_prompt=system_prompt,</text:span></text:p>
      <text:p text:style-name="P10"><text:span text:style-name="T3">)</text:span></text:p>
      <text:p text:style-name="P11"/>
      <text:p text:style-name="P10"><text:span text:style-name="T3">question = HumanMessage(content=</text:span><text:span text:style-name="T14">"Quelle est la météo à Capitole lunaire ?"</text:span><text:span text:style-name="T3">)</text:span></text:p>
      <text:p text:style-name="P11"/>
      <text:p text:style-name="P10"><text:span text:style-name="T3">response = agent.invoke(</text:span></text:p>
      <text:p text:style-name="P10"><text:span text:style-name="T3">    {</text:span><text:span text:style-name="T14">"messages"</text:span><text:span text:style-name="T3">: [question]}</text:span></text:p>
      <text:p text:style-name="P10"><text:span text:style-name="T3">)</text:span></text:p>
      <text:p text:style-name="P11"/>
      <text:p text:style-name="P10"><text:span text:style-name="T3">print(response[</text:span><text:span text:style-name="T14">'messages'</text:span><text:span text:style-name="T3">][-</text:span><text:span text:style-name="T15">1</text:span><text:span text:style-name="T3">].content)</text:span></text:p>
      <text:p text:style-name="P12"/>
      <text:list xml:id="list122460292408900" text:continue-numbering="true" text:style-name="WWNum1">
        <text:list-item>
          <text:list>
            <text:list-item>
              <text:p text:style-name="P9"><text:bookmark text:name="_sf6j99qs75jm"/><text:span text:style-name="T10">Agent sans Web Search Tool</text:span></text:p>
            </text:list-item>
          </text:list>
        </text:list-item>
      </text:list>
      <text:p text:style-name="P4"/>
      <text:p text:style-name="P10"><text:span text:style-name="T3">agent = create_agent(</text:span></text:p>
      <text:p text:style-name="P10"><text:span text:style-name="T3">    model=model,</text:span></text:p>
      <text:p text:style-name="P10"><text:span text:style-name="T3">)</text:span></text:p>
      <text:p text:style-name="P10"><text:soft-page-break/><text:span text:style-name="T3">question = HumanMessage(content=</text:span><text:span text:style-name="T14">"Vos connaissances en matière d'apprentissage sont-elles à jour ?"</text:span><text:span text:style-name="T3">)</text:span></text:p>
      <text:p text:style-name="P11"/>
      <text:p text:style-name="P10"><text:span text:style-name="T3">response = agent.invoke(</text:span></text:p>
      <text:p text:style-name="P10"><text:span text:style-name="T3">    {</text:span><text:span text:style-name="T14">"messages"</text:span><text:span text:style-name="T3">: [question]}</text:span></text:p>
      <text:p text:style-name="P10"><text:span text:style-name="T3">)</text:span></text:p>
      <text:p text:style-name="P10"><text:span text:style-name="T3">print(response[</text:span><text:span text:style-name="T14">'messages'</text:span><text:span text:style-name="T3">][-</text:span><text:span text:style-name="T15">1</text:span><text:span text:style-name="T3">].content)</text:span></text:p>
      <text:p text:style-name="P4"/>
      <text:list xml:id="list122459482081966" text:continue-numbering="true" text:style-name="WWNum1">
        <text:list-item>
          <text:list>
            <text:list-item>
              <text:p text:style-name="P9"><text:bookmark text:name="_uzilrtn572gr"/><text:span text:style-name="T10">Agent avec Web Search Tool</text:span></text:p>
            </text:list-item>
          </text:list>
        </text:list-item>
      </text:list>
      <text:p text:style-name="P13"/>
      <text:list xml:id="list122460239259956" text:continue-numbering="true" text:style-name="WWNum1">
        <text:list-item>
          <text:list>
            <text:list-item>
              <text:list>
                <text:list-item>
                  <text:p text:style-name="P9"><text:bookmark text:name="_s5i3lz2o0x9y"/><text:span text:style-name="T11">Sortie du Tool</text:span></text:p>
                </text:list-item>
              </text:list>
            </text:list-item>
          </text:list>
        </text:list-item>
      </text:list>
      <text:p text:style-name="P15"/>
      <text:p text:style-name="P10"><text:span text:style-name="T12">from</text:span><text:span text:style-name="T3"> typing </text:span><text:span text:style-name="T12">import</text:span><text:span text:style-name="T3"> Dict, Any</text:span></text:p>
      <text:p text:style-name="P10"><text:span text:style-name="T12">from</text:span><text:span text:style-name="T3"> tavily </text:span><text:span text:style-name="T12">import</text:span><text:span text:style-name="T3"> TavilyClient</text:span></text:p>
      <text:p text:style-name="P10"><text:span text:style-name="T12">from</text:span><text:span text:style-name="T3"> dotenv </text:span><text:span text:style-name="T12">import</text:span><text:span text:style-name="T3"> load_dotenv</text:span></text:p>
      <text:p text:style-name="P11"/>
      <text:p text:style-name="P10"><text:span text:style-name="T3">load_dotenv()</text:span></text:p>
      <text:p text:style-name="P11"/>
      <text:p text:style-name="P10"><text:span text:style-name="T3">tavily_client = TavilyClient()</text:span></text:p>
      <text:p text:style-name="P11"/>
      <text:p text:style-name="P10"><text:span text:style-name="T3">@tool</text:span></text:p>
      <text:p text:style-name="P10"><text:span text:style-name="T12">def</text:span><text:span text:style-name="T3"> web_search(query: str) -&gt; Dict[str, Any]:</text:span></text:p>
      <text:p text:style-name="P11"><text:soft-page-break/></text:p>
      <text:p text:style-name="P10"><text:span text:style-name="T3">    </text:span><text:span text:style-name="T12">return</text:span><text:span text:style-name="T3"> tavily_client.search(query)</text:span></text:p>
      <text:p text:style-name="P11"/>
      <text:p text:style-name="P10"><text:span text:style-name="T3">web_search.invoke(</text:span><text:span text:style-name="T14">"Qui est le Président de commune actuel de Marrakech ?"</text:span><text:span text:style-name="T3">)</text:span></text:p>
      <text:p text:style-name="P4"/>
      <text:list xml:id="list122460825068903" text:continue-numbering="true" text:style-name="WWNum1">
        <text:list-item>
          <text:list>
            <text:list-item>
              <text:list>
                <text:list-item>
                  <text:p text:style-name="P9"><text:bookmark text:name="_hqev3140nnyj"/><text:span text:style-name="T11">Sortie de l’agent</text:span></text:p>
                </text:list-item>
              </text:list>
            </text:list-item>
          </text:list>
        </text:list-item>
      </text:list>
      <text:p text:style-name="P10"><text:span text:style-name="T3">agent = create_agent(</text:span></text:p>
      <text:p text:style-name="P10"><text:span text:style-name="T3">    model=model,</text:span></text:p>
      <text:p text:style-name="P10"><text:span text:style-name="T3">    tools=[web_search]</text:span></text:p>
      <text:p text:style-name="P10"><text:span text:style-name="T3">)</text:span></text:p>
      <text:p text:style-name="P11"/>
      <text:p text:style-name="P10"><text:span text:style-name="T3">question = HumanMessage(content=</text:span><text:span text:style-name="T14">"Qui est le Président de commune actuel de Marrakech ?"</text:span><text:span text:style-name="T3">)</text:span></text:p>
      <text:p text:style-name="P11"/>
      <text:p text:style-name="P10"><text:span text:style-name="T3">response = agent.invoke(</text:span></text:p>
      <text:p text:style-name="P10"><text:span text:style-name="T3">    {</text:span><text:span text:style-name="T14">"messages"</text:span><text:span text:style-name="T3">: [question]})</text:span></text:p>
      <text:p text:style-name="P10"><text:span text:style-name="T3">print(response[</text:span><text:span text:style-name="T14">'messages'</text:span><text:span text:style-name="T3">][-</text:span><text:span text:style-name="T15">1</text:span><text:span text:style-name="T3">].content)</text:span></text:p>
      <text:p text:style-name="P4"/>
      <text:list xml:id="list122461447192723" text:continue-numbering="true" text:style-name="WWNum1">
        <text:list-item>
          <text:list>
            <text:list-item>
              <text:p text:style-name="P9"><text:bookmark text:name="_t6sgbmvx6h24"/><text:span text:style-name="T10">Agent sans mémoire</text:span></text:p>
            </text:list-item>
          </text:list>
        </text:list-item>
      </text:list>
      <text:p text:style-name="P11"/>
      <text:p text:style-name="P10"><text:span text:style-name="T3">agent = create_agent(</text:span></text:p>
      <text:p text:style-name="P10"><text:span text:style-name="T3">    model= model)</text:span></text:p>
      <text:p text:style-name="P10"><text:soft-page-break/><text:span text:style-name="T3">question = HumanMessage(content=</text:span><text:span text:style-name="T14">"Bonjour, mon nom est Sami et je suis un développeur."</text:span><text:span text:style-name="T3">)</text:span></text:p>
      <text:p text:style-name="P11"/>
      <text:p text:style-name="P10"><text:span text:style-name="T3">response = agent.invoke(</text:span></text:p>
      <text:p text:style-name="P10"><text:span text:style-name="T3">    {</text:span><text:span text:style-name="T14">"messages"</text:span><text:span text:style-name="T3">: [question]} </text:span></text:p>
      <text:p text:style-name="P10"><text:span text:style-name="T3">)</text:span></text:p>
      <text:p text:style-name="P10"><text:span text:style-name="T3">print(response[</text:span><text:span text:style-name="T14">'messages'</text:span><text:span text:style-name="T3">][-</text:span><text:span text:style-name="T15">1</text:span><text:span text:style-name="T3">].content)</text:span></text:p>
      <text:p text:style-name="P11"/>
      <text:p text:style-name="P10"><text:span text:style-name="T3">question = HumanMessage(content=</text:span><text:span text:style-name="T14">"Quel est mon métier ?"</text:span><text:span text:style-name="T3">)</text:span></text:p>
      <text:p text:style-name="P11"/>
      <text:p text:style-name="P10"><text:span text:style-name="T3">response = agent.invoke(</text:span></text:p>
      <text:p text:style-name="P10"><text:span text:style-name="T3">    {</text:span><text:span text:style-name="T14">"messages"</text:span><text:span text:style-name="T3">: [question]} </text:span></text:p>
      <text:p text:style-name="P10"><text:span text:style-name="T3">)</text:span></text:p>
      <text:p text:style-name="P11"/>
      <text:p text:style-name="P10"><text:span text:style-name="T3">print(response[</text:span><text:span text:style-name="T14">'messages'</text:span><text:span text:style-name="T3">][-</text:span><text:span text:style-name="T15">1</text:span><text:span text:style-name="T3">].content)</text:span></text:p>
      <text:p text:style-name="P4"/>
      <text:p text:style-name="P16"/>
      <text:p text:style-name="P16"/>
      <text:p text:style-name="P16"/>
      <text:p text:style-name="P16"/>
      <text:list xml:id="list122459922118696" text:continue-numbering="true" text:style-name="WWNum1">
        <text:list-item>
          <text:list>
            <text:list-item>
              <text:p text:style-name="P9"><text:bookmark text:name="_20j38jf2jf2e"/><text:span text:style-name="T10">Agent avec mémoire</text:span></text:p>
            </text:list-item>
          </text:list>
        </text:list-item>
      </text:list>
      <text:p text:style-name="P4"/>
      <text:p text:style-name="P10"><text:soft-page-break/><text:span text:style-name="T12">from</text:span><text:span text:style-name="T3"> langgraph.checkpoint.memory </text:span><text:span text:style-name="T12">import</text:span><text:span text:style-name="T3"> InMemorySaver  </text:span></text:p>
      <text:p text:style-name="P11"/>
      <text:p text:style-name="P10"><text:span text:style-name="T3">agent = create_agent(</text:span></text:p>
      <text:p text:style-name="P10"><text:span text:style-name="T3">    model=model,</text:span></text:p>
      <text:p text:style-name="P10"><text:span text:style-name="T3">    checkpointer=InMemorySaver(),  </text:span></text:p>
      <text:p text:style-name="P10"><text:span text:style-name="T3">)</text:span></text:p>
      <text:p text:style-name="P10"><text:span text:style-name="T3">question = HumanMessage(content=</text:span><text:span text:style-name="T14">"Bonjour, mon nom est Sami et je suis un développeur."</text:span><text:span text:style-name="T3">)</text:span></text:p>
      <text:p text:style-name="P10"><text:span text:style-name="T3">config = {</text:span><text:span text:style-name="T14">"configurable"</text:span><text:span text:style-name="T3">: {</text:span><text:span text:style-name="T14">"thread_id"</text:span><text:span text:style-name="T3">: </text:span><text:span text:style-name="T14">"1"</text:span><text:span text:style-name="T3">}}</text:span></text:p>
      <text:p text:style-name="P11"/>
      <text:p text:style-name="P10"><text:span text:style-name="T3">response = agent.invoke(</text:span></text:p>
      <text:p text:style-name="P10"><text:span text:style-name="T3">    {</text:span><text:span text:style-name="T14">"messages"</text:span><text:span text:style-name="T3">: [question]},</text:span></text:p>
      <text:p text:style-name="P10"><text:span text:style-name="T3">    config,  </text:span></text:p>
      <text:p text:style-name="P10"><text:span text:style-name="T3">)</text:span></text:p>
      <text:p text:style-name="P11"/>
      <text:p text:style-name="P10"><text:span text:style-name="T3">question = HumanMessage(content=</text:span><text:span text:style-name="T14">"Quel est mon métier ?"</text:span><text:span text:style-name="T3">)</text:span></text:p>
      <text:p text:style-name="P11"/>
      <text:p text:style-name="P10"><text:span text:style-name="T3">response = agent.invoke(</text:span></text:p>
      <text:p text:style-name="P10"><text:span text:style-name="T3">    {</text:span><text:span text:style-name="T14">"messages"</text:span><text:span text:style-name="T3">: [question]},</text:span></text:p>
      <text:p text:style-name="P10"><text:span text:style-name="T3">    config,  </text:span></text:p>
      <text:p text:style-name="P10"><text:span text:style-name="T3">)</text:span></text:p>
      <text:p text:style-name="P10"><text:span text:style-name="T3">print(response[</text:span><text:span text:style-name="T14">'messages'</text:span><text:span text:style-name="T3">][-</text:span><text:span text:style-name="T15">1</text:span><text:span text:style-name="T3">].content)</text:span></text:p>
      <text:p text:style-name="P11"><text:soft-page-break/></text:p>
      <text:p text:style-name="P4"/>
      <text:list xml:id="list122460822439157" text:continue-numbering="true" text:style-name="WWNum1">
        <text:list-item>
          <text:list>
            <text:list-item>
              <text:p text:style-name="P9"><text:bookmark text:name="_mcmqpctq85ak"/><text:span text:style-name="T10">TP : Chef personnel </text:span></text:p>
            </text:list-item>
          </text:list>
        </text:list-item>
      </text:list>
      <text:p text:style-name="P19"><text:span text:style-name="T4">En vous appuyant sur un system message, l’outil de recherche web et le mécanisme de mémoire, vous devez concevoir un agent intelligent jouant le rôle d’un chef cuisinier personnel.</text:span></text:p>
      <text:p text:style-name="P19"><text:span text:style-name="T4">L’agent doit être capable de :</text:span></text:p>
      <text:list xml:id="list3867999720" text:style-name="WWNum2">
        <text:list-item>
          <text:p text:style-name="P24"><text:span text:style-name="T4">recevoir la liste des ingrédients disponibles dans le réfrigérateur, </text:span></text:p>
        </text:list-item>
        <text:list-item>
          <text:p text:style-name="P24"><text:span text:style-name="T4">mémoriser les préférences ou informations fournies par l’utilisateur (mémoire), </text:span></text:p>
        </text:list-item>
        <text:list-item>
          <text:p text:style-name="P24"><text:span text:style-name="T4">utiliser un outil de recherche web pour compléter ses connaissances culinaires si nécessaire (recettes, techniques, associations d’ingrédients), </text:span></text:p>
        </text:list-item>
        <text:list-item>
          <text:p text:style-name="P24"><text:span text:style-name="T4">proposer un ou plusieurs plats adaptés aux ingrédients disponibles.</text:span></text:p>
        </text:list-item>
      </text:list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MA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MA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fo:font-weight="normal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5in" fo:margin-bottom="0.5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left="0in" fo:margin-right="0in" fo:margin-bottom="0.4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MA et IAD<text:tab/>Master SDIA Prof. RETAL SARA</text:span></text:p>
      </style:header>
      <style:footer>
        <text:p text:style-name="MP2"><text:page-number text:select-page="current">15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5" meta:paragraph-count="204" meta:word-count="957" meta:character-count="7210" meta:non-whitespace-character-count="6176"/>
    <meta:generator>LibreOfficeDev/6.0.5.2$Linux_X86_64 LibreOffice_project/</meta:generator>
  </office:meta>
</office:document-meta>
</file>